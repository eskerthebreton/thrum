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3984in"/>
    </style:style>
    <style:style style:name="co2" style:family="table-column">
      <style:table-column-properties fo:break-before="auto" style:column-width="1.5709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0.4846in"/>
    </style:style>
    <style:style style:name="co5" style:family="table-column">
      <style:table-column-properties fo:break-before="auto" style:column-width="2.0728in"/>
    </style:style>
    <style:style style:name="co6" style:family="table-column">
      <style:table-column-properties fo:break-before="auto" style:column-width="1.6547in"/>
    </style:style>
    <style:style style:name="co7" style:family="table-column">
      <style:table-column-properties fo:break-before="auto" style:column-width="1.5957in"/>
    </style:style>
    <style:style style:name="co8" style:family="table-column">
      <style:table-column-properties fo:break-before="auto" style:column-width="0.4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008in"/>
    </style:style>
    <style:style style:name="co11" style:family="table-column">
      <style:table-column-properties fo:break-before="auto" style:column-width="2.189in"/>
    </style:style>
    <style:style style:name="co12" style:family="table-column">
      <style:table-column-properties fo:break-before="auto" style:column-width="1.7717in"/>
    </style:style>
    <style:style style:name="co13" style:family="table-column">
      <style:table-column-properties fo:break-before="auto" style:column-width="0.4756in"/>
    </style:style>
    <style:style style:name="co14" style:family="table-column">
      <style:table-column-properties fo:break-before="auto" style:column-width="0.2925in"/>
    </style:style>
    <style:style style:name="co15" style:family="table-column">
      <style:table-column-properties fo:break-before="auto" style:column-width="2.3071in"/>
    </style:style>
    <style:style style:name="co16" style:family="table-column">
      <style:table-column-properties fo:break-before="auto" style:column-width="1.7047in"/>
    </style:style>
    <style:style style:name="co17" style:family="table-column">
      <style:table-column-properties fo:break-before="auto" style:column-width="0.3173in"/>
    </style:style>
    <style:style style:name="co18" style:family="table-column">
      <style:table-column-properties fo:break-before="auto" style:column-width="1.3535in"/>
    </style:style>
    <style:style style:name="co19" style:family="table-column">
      <style:table-column-properties fo:break-before="auto" style:column-width="2.148in"/>
    </style:style>
    <style:style style:name="co20" style:family="table-column">
      <style:table-column-properties fo:break-before="auto" style:column-width="1.2118in"/>
    </style:style>
    <style:style style:name="co21" style:family="table-column">
      <style:table-column-properties fo:break-before="auto" style:column-width="1.0945in"/>
    </style:style>
    <style:style style:name="co22" style:family="table-column">
      <style:table-column-properties fo:break-before="auto" style:column-width="1.0528in"/>
    </style:style>
    <style:style style:name="co23" style:family="table-column">
      <style:table-column-properties fo:break-before="auto" style:column-width="1.2366in"/>
    </style:style>
    <style:style style:name="co24" style:family="table-column">
      <style:table-column-properties fo:break-before="auto" style:column-width="0.2673in"/>
    </style:style>
    <style:style style:name="co25" style:family="table-column">
      <style:table-column-properties fo:break-before="auto" style:column-width="2.2563in"/>
    </style:style>
    <style:style style:name="co26" style:family="table-column">
      <style:table-column-properties fo:break-before="auto" style:column-width="1.3201in"/>
    </style:style>
    <style:style style:name="co27" style:family="table-column">
      <style:table-column-properties fo:break-before="auto" style:column-width="0.3673in"/>
    </style:style>
    <style:style style:name="co28" style:family="table-column">
      <style:table-column-properties fo:break-before="auto" style:column-width="2.022in"/>
    </style:style>
    <style:style style:name="co29" style:family="table-column">
      <style:table-column-properties fo:break-before="auto" style:column-width="1.1693in"/>
    </style:style>
    <style:style style:name="co30" style:family="table-column">
      <style:table-column-properties fo:break-before="auto" style:column-width="1.0862in"/>
    </style:style>
    <style:style style:name="co31" style:family="table-column">
      <style:table-column-properties fo:break-before="auto" style:column-width="0.2839in"/>
    </style:style>
    <style:style style:name="co32" style:family="table-column">
      <style:table-column-properties fo:break-before="auto" style:column-width="3.8862in"/>
    </style:style>
    <style:style style:name="co33" style:family="table-column">
      <style:table-column-properties fo:break-before="auto" style:column-width="4.4382in"/>
    </style:style>
    <style:style style:name="co34" style:family="table-column">
      <style:table-column-properties fo:break-before="auto" style:column-width="0.4839in"/>
    </style:style>
    <style:style style:name="co35" style:family="table-column">
      <style:table-column-properties fo:break-before="auto" style:column-width="0.2165in"/>
    </style:style>
    <style:style style:name="co36" style:family="table-column">
      <style:table-column-properties fo:break-before="auto" style:column-width="1.2035in"/>
    </style:style>
    <style:style style:name="co37" style:family="table-column">
      <style:table-column-properties fo:break-before="auto" style:column-width="6.578in"/>
    </style:style>
    <style:style style:name="co38" style:family="table-column">
      <style:table-column-properties fo:break-before="auto" style:column-width="2.4484in"/>
    </style:style>
    <style:style style:name="co39" style:family="table-column">
      <style:table-column-properties fo:break-before="auto" style:column-width="1.6799in"/>
    </style:style>
    <style:style style:name="co40" style:family="table-column">
      <style:table-column-properties fo:break-before="auto" style:column-width="1.8555in"/>
    </style:style>
    <style:style style:name="co41" style:family="table-column">
      <style:table-column-properties fo:break-before="auto" style:column-width="6.3937in"/>
    </style:style>
    <style:style style:name="co42" style:family="table-column">
      <style:table-column-properties fo:break-before="auto" style:column-width="4.4299in"/>
    </style:style>
    <style:style style:name="co43" style:family="table-column">
      <style:table-column-properties fo:break-before="auto" style:column-width="0.7437in"/>
    </style:style>
    <style:style style:name="co44" style:family="table-column">
      <style:table-column-properties fo:break-before="auto" style:column-width="0.9571in"/>
    </style:style>
    <style:style style:name="co45" style:family="table-column">
      <style:table-column-properties fo:break-before="auto" style:column-width="1.4417in"/>
    </style:style>
    <style:style style:name="co46" style:family="table-column">
      <style:table-column-properties fo:break-before="auto" style:column-width="0.6138in"/>
    </style:style>
    <style:style style:name="co47" style:family="table-column">
      <style:table-column-properties fo:break-before="auto" style:column-width="6.0846in"/>
    </style:style>
    <style:style style:name="co48" style:family="table-column">
      <style:table-column-properties fo:break-before="auto" style:column-width="6.2772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2736in" fo:break-before="auto" style:use-optimal-row-height="true"/>
    </style:style>
    <style:style style:name="ro7" style:family="table-row">
      <style:table-row-properties style:row-height="0.3091in" fo:break-before="auto" style:use-optimal-row-height="false"/>
    </style:style>
    <style:style style:name="ro8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08in" fo:break-before="auto" style:use-optimal-row-height="false"/>
    </style:style>
    <style:style style:name="ro10" style:family="table-row">
      <style:table-row-properties style:row-height="0.2339in" fo:break-before="auto" style:use-optimal-row-height="false"/>
    </style:style>
    <style:style style:name="ro11" style:family="table-row">
      <style:table-row-properties style:row-height="0.2673in" fo:break-before="auto" style:use-optimal-row-height="false"/>
    </style:style>
    <style:style style:name="ro12" style:family="table-row">
      <style:table-row-properties style:row-height="0.5772in" fo:break-before="auto" style:use-optimal-row-height="false"/>
    </style:style>
    <style:style style:name="ro13" style:family="table-row">
      <style:table-row-properties style:row-height="0.4929in" fo:break-before="auto" style:use-optimal-row-height="true"/>
    </style:style>
    <style:style style:name="ro14" style:family="table-row">
      <style:table-row-properties style:row-height="0.861in" fo:break-before="auto" style:use-optimal-row-height="false"/>
    </style:style>
    <style:style style:name="ro15" style:family="table-row">
      <style:table-row-properties style:row-height="0.9701in" fo:break-before="auto" style:use-optimal-row-height="true"/>
    </style:style>
    <style:style style:name="ro16" style:family="table-row">
      <style:table-row-properties style:row-height="0.3339in" fo:break-before="auto" style:use-optimal-row-height="true"/>
    </style:style>
    <style:style style:name="ro17" style:family="table-row">
      <style:table-row-properties style:row-height="0.811in" fo:break-before="auto" style:use-optimal-row-height="true"/>
    </style:style>
    <style:style style:name="ro18" style:family="table-row">
      <style:table-row-properties style:row-height="0.652in" fo:break-before="auto" style:use-optimal-row-height="true"/>
    </style:style>
    <style:style style:name="ro19" style:family="table-row">
      <style:table-row-properties style:row-height="1.7654in" fo:break-before="auto" style:use-optimal-row-height="true"/>
    </style:style>
    <style:style style:name="ro20" style:family="table-row">
      <style:table-row-properties style:row-height="1.2882in" fo:break-before="auto" style:use-optimal-row-height="true"/>
    </style:style>
    <style:style style:name="ro21" style:family="table-row">
      <style:table-row-properties style:row-height="1.1291in" fo:break-before="auto" style:use-optimal-row-height="true"/>
    </style:style>
    <style:style style:name="ro22" style:family="table-row">
      <style:table-row-properties style:row-height="1.9244in" fo:break-before="auto" style:use-optimal-row-height="true"/>
    </style:style>
    <style:style style:name="ro23" style:family="table-row">
      <style:table-row-properties style:row-height="0.6854in" fo:break-before="auto" style:use-optimal-row-height="false"/>
    </style:style>
    <style:style style:name="ro24" style:family="table-row">
      <style:table-row-properties style:row-height="0.3764in" fo:break-before="auto" style:use-optimal-row-height="false"/>
    </style:style>
    <style:style style:name="ro25" style:family="table-row">
      <style:table-row-properties style:row-height="1.6063in" fo:break-before="auto" style:use-optimal-row-height="true"/>
    </style:style>
    <style:style style:name="ro26" style:family="table-row">
      <style:table-row-properties style:row-height="1.4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5" style:family="table-cell" style:parent-style-name="Default">
      <style:table-cell-properties fo:border-bottom="1.11pt double-thin #000000" style:border-line-width-bottom="0.0071in 0.0016in 0.0071in" fo:background-color="#9e9e9e" style:text-align-source="fix" style:repeat-content="false" fo:border-left="1.11pt double-thin #000000" style:border-line-width-left="0.0071in 0.0016in 0.0071in" fo:padding="0.028in" fo:border-right="none" fo:border-top="1.11pt double-thin #000000" style:border-line-width-top="0.0071in 0.0016in 0.0071in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color="#333333"/>
    </style:style>
    <style:style style:name="ce107" style:family="table-cell" style:parent-style-name="Default">
      <style:table-cell-properties fo:background-color="#bdbdb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12]&lt;0)" style:apply-style-name="Illegal" style:base-cell-address="Build.A12"/>
      <style:map style:condition="is-true-formula([.$B$12]&gt;0)" style:apply-style-name="Unspent" style:base-cell-address="Build.A12"/>
      <style:map style:condition="is-true-formula([.$B$12]=0)" style:apply-style-name="Chameleon" style:base-cell-address="Build.A12"/>
    </style:style>
    <style:style style:name="ce115" style:family="table-cell" style:parent-style-name="Default">
      <style:text-properties fo:color="#333333" fo:font-size="14pt" style:font-size-asian="14pt" style:font-size-complex="14pt"/>
    </style:style>
    <style:style style:name="ce14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OR([.$B$18]&lt;0;[.$C$18]&lt;0))" style:apply-style-name="Illegal" style:base-cell-address="Build.A18"/>
      <style:map style:condition="is-true-formula(OR([.$B$18]&gt;0;[.$C$18]&lt;0))" style:apply-style-name="Unspent" style:base-cell-address="Build.A18"/>
      <style:map style:condition="is-true-formula(AND([.$B$18]=0;[.$C$18]=0))" style:apply-style-name="Chameleon" style:base-cell-address="Build.A18"/>
    </style:style>
    <style:style style:name="ce10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32]&gt;0)" style:apply-style-name="Unspent" style:base-cell-address="Build.A32"/>
      <style:map style:condition="is-true-formula([.$B$32]&lt;0)" style:apply-style-name="Illegal" style:base-cell-address="Build.A32"/>
      <style:map style:condition="is-true-formula([.$B$32]=0)" style:apply-style-name="Ghost_20_Text" style:base-cell-address="Build.A32"/>
    </style:style>
    <style:style style:name="ce118" style:family="table-cell" style:parent-style-name="Default">
      <style:table-cell-properties fo:background-color="#ba68c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52]&lt;0)" style:apply-style-name="Illegal" style:base-cell-address="Build.A52"/>
      <style:map style:condition="is-true-formula([.$B$52]=0)" style:apply-style-name="Chameleon" style:base-cell-address="Build.A52"/>
      <style:map style:condition="is-true-formula([.$B$52]&gt;0)" style:apply-style-name="Unspent" style:base-cell-address="Build.A52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27" style:family="table-cell" style:parent-style-name="Default">
      <style:table-cell-properties fo:background-color="#e0e0e0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32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33" style:family="table-cell" style:parent-style-name="Default">
      <style:table-cell-properties fo:background-color="#c5e1a5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34" style:family="table-cell" style:parent-style-name="Default">
      <style:table-cell-properties fo:background-color="#81d4f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35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44" style:family="table-cell" style:parent-style-name="Default" style:data-style-name="N0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12]&lt;0)" style:apply-style-name="Illegal" style:base-cell-address="Build.A12"/>
      <style:map style:condition="is-true-formula([.$B$12]&gt;0)" style:apply-style-name="Unspent" style:base-cell-address="Build.A12"/>
      <style:map style:condition="is-true-formula([.$B$12]=0)" style:apply-style-name="Chameleon" style:base-cell-address="Build.A12"/>
    </style:style>
    <style:style style:name="ce46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c5e1a5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80deea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cell-content()=0" style:apply-style-name="Chameleon" style:base-cell-address="Build.B18"/>
      <style:map style:condition="cell-content()&gt;0" style:apply-style-name="Unspent" style:base-cell-address="Build.B18"/>
      <style:map style:condition="cell-content()&lt;0" style:apply-style-name="Illegal" style:base-cell-address="Build.B18"/>
    </style:style>
    <style:style style:name="ce62" style:family="table-cell" style:parent-style-name="Default">
      <style:text-properties fo:color="#333333"/>
    </style:style>
    <style:style style:name="ce52" style:family="table-cell" style:parent-style-name="Default" style:data-style-name="N133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53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2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  <style:text-properties fo:color="#333333"/>
    </style:style>
    <style:style style:name="ce65" style:family="table-cell" style:parent-style-name="Default" style:data-style-name="N134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9e9e9e"/>
      <style:text-properties fo:color="#333333"/>
    </style:style>
    <style:style style:name="ce81" style:family="table-cell" style:parent-style-name="Default" style:data-style-name="N134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ackground-color="#9e9e9e"/>
      <style:text-properties fo:color="#333333"/>
      <style:map style:condition="is-true-formula([.$B$32]&gt;0)" style:apply-style-name="Unspent" style:base-cell-address="Build.A32"/>
      <style:map style:condition="is-true-formula([.$B$32]&lt;0)" style:apply-style-name="Illegal" style:base-cell-address="Build.A32"/>
      <style:map style:condition="is-true-formula([.$B$32]=0)" style:apply-style-name="Ghost_20_Text" style:base-cell-address="Build.A32"/>
    </style:style>
    <style:style style:name="ce79" style:family="table-cell" style:parent-style-name="Default">
      <style:table-cell-properties fo:background-color="#9e9e9e"/>
      <style:text-properties fo:color="#333333"/>
      <style:map style:condition="is-true-formula([.$B$52]&lt;0)" style:apply-style-name="Illegal" style:base-cell-address="Build.A52"/>
      <style:map style:condition="is-true-formula([.$B$52]=0)" style:apply-style-name="Chameleon" style:base-cell-address="Build.A52"/>
      <style:map style:condition="is-true-formula([.$B$52]&gt;0)" style:apply-style-name="Unspent" style:base-cell-address="Build.A52"/>
    </style:style>
    <style:style style:name="ce82" style:family="table-cell" style:parent-style-name="Default" style:data-style-name="N99">
      <style:text-properties fo:color="#fafafa"/>
    </style:style>
    <style:style style:name="ce56" style:family="table-cell" style:parent-style-name="Default" style:data-style-name="N0">
      <style:text-properties fo:color="#fafafa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73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 style:data-style-name="N134">
      <style:table-cell-properties fo:background-color="#f44336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76" style:family="table-cell" style:parent-style-name="Default" style:data-style-name="N134">
      <style:table-cell-properties fo:background-color="#8bc34a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77" style:family="table-cell" style:parent-style-name="Default" style:data-style-name="N134">
      <style:table-cell-properties fo:background-color="#03a9f4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92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OR([.$F$18]&lt;0;[.$G$18]&lt;0))" style:apply-style-name="Illegal" style:base-cell-address="Build.E18"/>
      <style:map style:condition="is-true-formula(OR([.$F$18]&gt;0;[.$G$18]&gt;0))" style:apply-style-name="Unspent" style:base-cell-address="Build.E18"/>
      <style:map style:condition="is-true-formula(AND([.$F$18]=0;[.$G$18]=0))" style:apply-style-name="Chameleon" style:base-cell-address="Build.E18"/>
    </style:style>
    <style:style style:name="ce157" style:family="table-cell" style:parent-style-name="Default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32]&lt;0)" style:apply-style-name="Illegal" style:base-cell-address="Build.E32"/>
      <style:map style:condition="is-true-formula([.$F$32]=0)" style:apply-style-name="Chameleon" style:base-cell-address="Build.E32"/>
      <style:map style:condition="is-true-formula([.$F$32]&gt;0)" style:apply-style-name="Unspent" style:base-cell-address="Build.E32"/>
    </style:style>
    <style:style style:name="ce159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55]-#REF!&lt;1)" style:apply-style-name="Accent" style:base-cell-address="Build.E46"/>
    </style:style>
    <style:style style:name="ce158" style:family="table-cell" style:parent-style-name="Default">
      <style:table-cell-properties fo:background-color="#ffc107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>
      <style:table-cell-properties fo:background-color="#9e9e9e" style:text-align-source="fix" style:repeat-content="false" fo:border="non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32" style:family="table-cell" style:parent-style-name="Default" style:data-style-name="N0">
      <style:table-cell-properties fo:background-color="#ffc107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1" style:family="table-cell" style:parent-style-name="Default" style:data-style-name="N1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 style:data-style-name="N1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33">
      <style:table-cell-properties fo:background-color="#ffe082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13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55]-#REF!&lt;1)" style:apply-style-name="Accent" style:base-cell-address="Build.E46"/>
    </style:style>
    <style:style style:name="ce155" style:family="table-cell" style:parent-style-name="Default" style:data-style-name="N134">
      <style:table-cell-properties fo:background-color="#bdbdbd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44" style:family="table-cell" style:parent-style-name="Default" style:data-style-name="N134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fo:background-color="#9e9e9e"/>
      <style:text-properties fo:color="#333333"/>
      <style:map style:condition="is-true-formula([.$F$32]&lt;0)" style:apply-style-name="Illegal" style:base-cell-address="Build.E32"/>
      <style:map style:condition="is-true-formula([.$F$32]=0)" style:apply-style-name="Chameleon" style:base-cell-address="Build.E32"/>
      <style:map style:condition="is-true-formula([.$F$32]&gt;0)" style:apply-style-name="Unspent" style:base-cell-address="Build.E32"/>
    </style:style>
    <style:style style:name="ce166" style:family="table-cell" style:parent-style-name="Default" style:data-style-name="N0">
      <style:table-cell-properties fo:background-color="#fff9c4" style:text-align-source="fix" style:repeat-content="false" fo:border="0.74pt solid #000000"/>
      <style:paragraph-properties fo:text-align="center" fo:margin-left="0in"/>
      <style:text-properties fo:color="#424242" fo:font-size="16pt" style:font-size-asian="16pt" style:font-size-complex="16pt"/>
    </style:style>
    <style:style style:name="ce123" style:family="table-cell" style:parent-style-name="Default">
      <style:table-cell-properties fo:background-color="#ffc107" style:text-align-source="fix" style:repeat-content="false"/>
      <style:paragraph-properties fo:text-align="center" fo:margin-left="0in"/>
      <style:text-properties fo:color="#424242" fo:font-size="16pt" style:font-size-asian="16pt" style:font-size-complex="16pt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24242" fo:font-size="16pt" style:font-size-asian="16pt" style:font-size-complex="16pt"/>
    </style:style>
    <style:style style:name="ce169" style:family="table-cell" style:parent-style-name="Default">
      <style:text-properties fo:color="#424242"/>
    </style:style>
    <style:style style:name="ce170" style:family="table-cell" style:parent-style-name="Default">
      <style:table-cell-properties fo:background-color="#fff9c4" style:text-align-source="fix" style:repeat-content="false" fo:border="0.74pt solid #000000"/>
      <style:paragraph-properties fo:text-align="center" fo:margin-left="0in"/>
      <style:text-properties fo:color="#424242" fo:font-size="16pt" style:font-size-asian="16pt" style:font-size-complex="16pt"/>
    </style:style>
    <style:style style:name="ce88" style:family="table-cell" style:parent-style-name="Default">
      <style:table-cell-properties fo:background-color="#bdbdbd"/>
      <style:text-properties fo:font-size="14pt" fo:font-weight="bold" style:font-size-asian="14pt" style:font-weight-asian="bold" style:font-size-complex="14pt" style:font-weight-complex="bold"/>
    </style:style>
    <style:style style:name="ce214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/>
    </style:style>
    <style:style style:name="ce8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87" style:family="table-cell" style:parent-style-name="Default">
      <style:table-cell-properties fo:background-color="#bdbdbd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188" style:family="table-cell" style:parent-style-name="Default">
      <style:table-cell-properties fo:background-color="#9575c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68" style:family="table-cell" style:parent-style-name="Default" style:data-style-name="N137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0" style:family="table-cell" style:parent-style-name="Default">
      <style:table-cell-properties fo:background-color="#bdbdbd"/>
      <style:text-properties fo:color="#333333"/>
    </style:style>
    <style:style style:name="ce190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6pt" style:font-size-asian="16pt" style:font-size-complex="16pt"/>
    </style:style>
    <style:style style:name="ce137" style:family="table-cell" style:parent-style-name="Default" style:data-style-name="N134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 style:data-style-name="N134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1" style:family="table-cell" style:parent-style-name="Default">
      <style:text-properties fo:color="#333333" fo:font-weight="bold" style:font-weight-asian="bold" style:font-weight-complex="bold"/>
    </style:style>
    <style:style style:name="ce192" style:family="table-cell" style:parent-style-name="Default">
      <style:table-cell-properties fo:background-color="#bdbdbd"/>
      <style:text-properties fo:color="#333333" fo:font-size="14pt" fo:font-weight="bold" style:font-size-asian="14pt" style:font-weight-asian="bold" style:font-size-complex="14pt" style:font-weight-complex="bold"/>
    </style:style>
    <style:style style:name="ce194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275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 fo:margin-left="0in"/>
      <style:text-properties fo:color="#333333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ackground-color="#bdbdbd"/>
    </style:style>
    <style:style style:name="ce198" style:family="table-cell" style:parent-style-name="Default">
      <style:table-cell-properties fo:background-color="#bdbdb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>
      <style:text-properties fo:color="#333333" fo:font-size="16pt" style:font-size-asian="16pt" style:font-size-complex="16pt"/>
    </style:style>
    <style:style style:name="ce199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20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0pt" style:font-size-asian="10pt" style:font-size-complex="10pt"/>
    </style:style>
    <style:style style:name="ce202" style:family="table-cell" style:parent-style-name="Default">
      <style:table-cell-properties fo:background-color="#9e9e9e" style:vertical-align="middle"/>
      <style:text-properties fo:color="#333333"/>
    </style:style>
    <style:style style:name="ce178" style:family="table-cell" style:parent-style-name="Default" style:data-style-name="N0">
      <style:table-cell-properties fo:background-color="#bdbdbd" style:text-align-source="fix" style:repeat-content="false" style:vertical-align="top"/>
      <style:paragraph-properties fo:text-align="start" fo:margin-left="0in"/>
      <style:text-properties fo:color="#333333" style:font-name="Liberation Mono" fo:font-size="8pt" style:font-size-asian="8pt" style:font-size-complex="8pt"/>
    </style:style>
    <style:style style:name="ce179" style:family="table-cell" style:parent-style-name="Default">
      <style:table-cell-properties fo:background-color="#bdbdbd" style:text-align-source="fix" style:repeat-content="false" style:vertical-align="top"/>
      <style:paragraph-properties fo:text-align="start" fo:margin-left="0in"/>
      <style:text-properties fo:color="#333333" style:font-name="Liberation Mono" fo:font-size="8pt" style:font-size-asian="8pt" style:font-size-complex="8pt"/>
    </style:style>
    <style:style style:name="ce205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284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85" style:family="table-cell" style:parent-style-name="Default">
      <style:table-cell-properties fo:background-color="#e1bee7" style:text-align-source="fix" style:repeat-content="false" fo:border="0.74pt solid #333333" style:vertical-align="middle"/>
      <style:paragraph-properties fo:text-align="center"/>
    </style:style>
    <style:style style:name="ce286" style:family="table-cell" style:parent-style-name="Default">
      <style:table-cell-properties fo:background-color="#e1bee7"/>
    </style:style>
    <style:style style:name="ce172" style:family="table-cell" style:parent-style-name="Default">
      <style:table-cell-properties fo:background-color="#bdbdbd"/>
      <style:text-properties fo:font-size="14pt" style:font-size-asian="14pt" style:font-size-complex="14pt"/>
    </style:style>
    <style:style style:name="ce207" style:family="table-cell" style:parent-style-name="Default">
      <style:table-cell-properties fo:background-color="#9e9e9e" style:text-align-source="fix" style:repeat-content="false" fo:border="non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93" style:family="table-cell" style:parent-style-name="Default">
      <style:table-cell-properties fo:background-color="#fff17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30" style:family="table-cell" style:parent-style-name="Default" style:data-style-name="N134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31" style:family="table-cell" style:parent-style-name="Default" style:data-style-name="N134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32" style:family="table-cell" style:parent-style-name="Default" style:data-style-name="N134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33" style:family="table-cell" style:parent-style-name="Default">
      <style:table-cell-properties fo:background-color="#ffb300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34" style:family="table-cell" style:parent-style-name="Default" style:data-style-name="N134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35" style:family="table-cell" style:parent-style-name="Default" style:data-style-name="N134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36" style:family="table-cell" style:parent-style-name="Default" style:data-style-name="N134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37" style:family="table-cell" style:parent-style-name="Default" style:data-style-name="N134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38" style:family="table-cell" style:parent-style-name="Default" style:data-style-name="N134">
      <style:table-cell-properties fo:background-color="#ffca28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13" style:family="table-cell" style:parent-style-name="Default" style:data-style-name="N131">
      <style:text-properties fo:color="#333333"/>
    </style:style>
    <style:style style:name="ce316" style:family="table-cell" style:parent-style-name="Default">
      <style:table-cell-properties fo:background-color="#bdbdbd" style:text-align-source="fix" style:repeat-content="false" style:vertical-align="top"/>
      <style:paragraph-properties fo:text-align="end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317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4pt" style:font-size-asian="14pt" style:font-size-complex="14pt"/>
    </style:style>
    <style:style style:name="ce318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0pt" style:font-size-asian="10pt" style:font-size-complex="10pt"/>
    </style:style>
    <style:style style:name="ce319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/>
    </style:style>
    <style:style style:name="ce308" style:family="table-cell" style:parent-style-name="Default">
      <style:table-cell-properties fo:background-color="#ffab91" style:text-align-source="fix" style:repeat-content="false" fo:border="0.74pt solid #000000"/>
      <style:paragraph-properties fo:text-align="center" fo:margin-left="0in"/>
      <style:text-properties fo:color="#333333"/>
    </style:style>
    <style:style style:name="ce322" style:family="table-cell" style:parent-style-name="Default">
      <style:table-cell-properties fo:background-color="#f44336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8" style:family="table-cell" style:parent-style-name="Default" style:data-style-name="N0">
      <style:table-cell-properties fo:background-color="#bdbdbd" style:text-align-source="fix" style:repeat-content="false" fo:wrap-option="wrap" style:vertical-align="middle"/>
      <style:paragraph-properties fo:text-align="start" fo:margin-left="0in"/>
      <style:text-properties style:font-name="Liberation Mono"/>
    </style:style>
    <style:style style:name="ce249" style:family="table-cell" style:parent-style-name="Default">
      <style:table-cell-properties fo:background-color="#bdbdbd" style:text-align-source="fix" style:repeat-content="false" style:vertical-align="middle"/>
      <style:paragraph-properties fo:text-align="center"/>
      <style:text-properties style:font-name="Liberation Mono"/>
    </style:style>
    <style:style style:name="ce250" style:family="table-cell" style:parent-style-name="Default" style:data-style-name="N0">
      <style:table-cell-properties fo:background-color="#bdbdbd" style:text-align-source="value-type" style:repeat-content="false" fo:wrap-option="wrap" style:vertical-align="middle"/>
      <style:paragraph-properties fo:margin-left="0in"/>
      <style:text-properties style:font-name="Liberation Mono"/>
    </style:style>
    <style:style style:name="ce243" style:family="table-cell" style:parent-style-name="Default">
      <style:table-cell-properties fo:background-color="#bdbdbd" style:vertical-align="top"/>
      <style:text-properties fo:color="#333333" style:font-name="Liberation Mono" fo:font-size="8pt" style:font-size-asian="8pt" style:font-size-complex="8pt"/>
    </style:style>
    <style:style style:name="ce310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/>
    </style:style>
    <style:style style:name="ce324" style:family="table-cell" style:parent-style-name="Default">
      <style:table-cell-properties fo:background-color="#03a9f4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7" style:family="table-cell" style:parent-style-name="Default">
      <style:table-cell-properties fo:background-color="#bdbdbd"/>
      <style:text-properties style:font-name="Liberation Mono"/>
    </style:style>
    <style:style style:name="ce251" style:family="table-cell" style:parent-style-name="Default">
      <style:table-cell-properties fo:background-color="#fff59d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56" style:family="table-cell" style:parent-style-name="Default" style:data-style-name="N0">
      <style:table-cell-properties fo:background-color="#bdbdbd" style:text-align-source="fix" style:repeat-content="false" fo:wrap-option="wrap" style:vertical-align="middle"/>
      <style:paragraph-properties fo:text-align="start" fo:margin-left="0in"/>
      <style:text-properties fo:color="#424242" style:text-outline="false" style:text-line-through-style="none" style:text-line-through-type="none" style:font-name="Liberation Mon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8pt" style:language-asian="zh" style:country-asian="CN" style:font-style-asian="normal" style:font-weight-asian="normal" style:font-name-complex="Liberation Mono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bdbdbd"/>
      <style:text-properties fo:color="#424242" style:font-name="Liberation Mono" fo:font-size="8pt" style:font-size-asian="8pt" style:font-size-complex="8pt"/>
    </style:style>
    <style:style style:name="ce28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Utility Abilities By Art'.$B$8:.$B$61])" table:allow-empty-cell="true" table:display-list="unsorted" table:base-cell-address="Build.A43"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)" table:allow-empty-cell="false" table:display-list="unsorted" table:base-cell-address="Build.B3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Build.B6">
          <table:error-message table:message-type="stop" table:display="true"/>
        </table:content-validation>
        <table:content-validation table:name="val4" table:base-cell-address="Build.B43">
          <table:error-message table:message-type="stop" table:display="true"/>
        </table:content-validation>
        <table:content-validation table:name="val5" table:condition="of:cell-content-is-in-list([$'Combat Abilities By Art'.$B$12:.$B$73])" table:allow-empty-cell="true" table:display-list="unsorted" table:base-cell-address="Build.E46">
          <table:error-message table:message-type="stop" table:display="true"/>
        </table:content-validation>
        <table:content-validation table:name="val6" table:condition="of:cell-content-is-in-list([$Utility.$B$66:.$B$77])" table:allow-empty-cell="true" table:display-list="unsorted" table:base-cell-address="Utility.I4">
          <table:error-message table:message-type="stop" table:display="true"/>
        </table:content-validation>
        <table:content-validation table:name="val7" table:condition="of:cell-content-is-in-list([$Combat.$B$54:.$B$67])" table:allow-empty-cell="true" table:display-list="unsorted" table:base-cell-address="Combat.J4">
          <table:error-message table:message-type="stop" table:display="true"/>
        </table:content-validation>
      </table:content-validations>
      <table:table table:name="Build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 table:style-name="ce15" office:value-type="string" calcext:value-type="string">
            <text:p>NAME</text:p>
          </table:table-cell>
          <table:table-cell table:style-name="ce127" office:value-type="string" calcext:value-type="string" table:number-columns-spanned="2" table:number-rows-spanned="1">
            <text:p>Cornelius Macguffin</text:p>
          </table:table-cell>
          <table:covered-table-cell table:style-name="ce142"/>
          <table:table-cell/>
          <table:table-cell table:style-name="ce73" office:value-type="string" calcext:value-type="string">
            <text:p>MAX EFFORT</text:p>
          </table:table-cell>
          <table:table-cell table:style-name="ce152" office:value-type="string" calcext:value-type="string">
            <text:p>SPEED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2" table:number-columns-repeated="2"/>
          <table:table-cell table:number-columns-repeated="2"/>
          <table:table-cell table:style-name="ce117" office:value-type="float" office:value="4" calcext:value-type="float">
            <text:p>4</text:p>
          </table:table-cell>
          <table:table-cell table:style-name="ce132" table:formula="of:=4+IF(ISNA(MATCH(&quot;Fleet Footed&quot;;[.E45:.E54];0)&gt;0);0;1+IF(ISBLANK(INDEX([.H45:.H54];MATCH(&quot;Fleet Footed&quot;; [.E45:.E54]; 0);1));0;1))" office:value-type="float" office:value="4" calcext:value-type="float">
            <text:p>4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5" office:value-type="string" calcext:value-type="string">
            <text:p>LEVEL</text:p>
          </table:table-cell>
          <table:table-cell table:style-name="ce127" table:content-validation-name="val2" office:value-type="float" office:value="1" calcext:value-type="float">
            <text:p>1</text:p>
          </table:table-cell>
          <table:table-cell/>
          <table:table-cell table:style-name="ce2"/>
          <table:table-cell table:number-columns-repeated="7"/>
        </table:table-row>
        <table:table-row table:style-name="ro3">
          <table:table-cell table:style-name="ce2" table:number-columns-repeated="2"/>
          <table:table-cell/>
          <table:table-cell table:style-name="ce2"/>
          <table:table-cell table:number-columns-repeated="7"/>
        </table:table-row>
        <table:table-row table:style-name="ro4">
          <table:table-cell table:style-name="ce107" office:value-type="string" calcext:value-type="string">
            <text:p>Attribute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MODIFIER</text:p>
          </table:table-cell>
          <table:table-cell/>
          <table:table-cell table:style-name="ce87" office:value-type="string" calcext:value-type="string" table:number-columns-spanned="3" table:number-rows-spanned="1">
            <text:p>Derived Attributes</text:p>
          </table:table-cell>
          <table:covered-table-cell table:style-name="ce133"/>
          <table:covered-table-cell table:style-name="Default"/>
          <table:table-cell table:number-columns-repeated="4"/>
        </table:table-row>
        <table:table-row table:style-name="ro4">
          <table:table-cell table:style-name="ce4" office:value-type="string" calcext:value-type="string">
            <text:p>Power (POW)</text:p>
          </table:table-cell>
          <table:table-cell table:style-name="ce32" table:content-validation-name="val3" office:value-type="float" office:value="1" calcext:value-type="float">
            <text:p>1</text:p>
          </table:table-cell>
          <table:table-cell table:style-name="ce65" table:formula="of:=[.$B6]+COUNTA([.B15:.C15])" office:value-type="float" office:value="2" calcext:value-type="float">
            <text:p>+2</text:p>
          </table:table-cell>
          <table:table-cell/>
          <table:table-cell table:style-name="ce107" office:value-type="string" calcext:value-type="string">
            <text:p>Resistance</text:p>
          </table:table-cell>
          <table:table-cell table:style-name="ce87" office:value-type="string" calcext:value-type="string">
            <text:p>Max Fatigue Tol</text:p>
          </table:table-cell>
          <table:table-cell table:style-name="ce107" office:value-type="string" calcext:value-type="string">
            <text:p>Incapacity Roll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Endurance (END)</text:p>
          </table:table-cell>
          <table:table-cell table:style-name="ce32" table:content-validation-name="val3"/>
          <table:table-cell table:style-name="ce65" table:formula="of:=[.$B7]+COUNTA([.F15:.G15])" office:value-type="float" office:value="0" calcext:value-type="float">
            <text:p/>
          </table:table-cell>
          <table:table-cell/>
          <table:table-cell table:style-name="ce75" table:formula="of:=[$Build.$C$7]" office:value-type="float" office:value="0" calcext:value-type="float">
            <text:p/>
          </table:table-cell>
          <table:table-cell table:style-name="ce101" table:formula="of:=3+[$Build.C7]+IF(ISNA(MATCH(&quot;Indefatigable&quot;;[.E45:.E54];0)&gt;0);0;1+IF(ISBLANK(INDEX([.H45:.H54];MATCH(&quot;Indefatigable&quot;; [.E45:.E54]; 0);1));0;FLOOR(0.5*[.$C$7])))" office:value-type="float" office:value="3" calcext:value-type="float">
            <text:p>3</text:p>
          </table:table-cell>
          <table:table-cell table:style-name="ce75" table:formula="of:=[$Build.$C$7]" office:value-type="float" office:value="0" calcext:value-type="float">
            <text:p/>
          </table:table-cell>
          <table:table-cell table:number-columns-repeated="4"/>
        </table:table-row>
        <table:table-row table:style-name="ro4">
          <table:table-cell table:style-name="ce5" office:value-type="string" calcext:value-type="string">
            <text:p>Finesse (FIN)</text:p>
          </table:table-cell>
          <table:table-cell table:style-name="ce33" table:content-validation-name="val3"/>
          <table:table-cell table:style-name="ce65" table:formula="of:=[.$B8]+COUNTA([.B16:.C16])" office:value-type="float" office:value="0" calcext:value-type="float">
            <text:p/>
          </table:table-cell>
          <table:table-cell/>
          <table:table-cell table:style-name="ce107" office:value-type="string" calcext:value-type="string">
            <text:p>Evasion</text:p>
          </table:table-cell>
          <table:table-cell table:style-name="ce87" office:value-type="string" calcext:value-type="string">
            <text:p>Initiative</text:p>
          </table:table-cell>
          <table:table-cell table:style-name="ce107"/>
          <table:table-cell table:number-columns-repeated="4"/>
        </table:table-row>
        <table:table-row table:style-name="ro5">
          <table:table-cell table:style-name="ce5" office:value-type="string" calcext:value-type="string">
            <text:p>Reflex (REF)</text:p>
          </table:table-cell>
          <table:table-cell table:style-name="ce33" table:content-validation-name="val3" office:value-type="float" office:value="1" calcext:value-type="float">
            <text:p>1</text:p>
          </table:table-cell>
          <table:table-cell table:style-name="ce65" table:formula="of:=[.$B9]+COUNTA([.F16:.G16])" office:value-type="float" office:value="2" calcext:value-type="float">
            <text:p>+2</text:p>
          </table:table-cell>
          <table:table-cell/>
          <table:table-cell table:style-name="ce76" table:formula="of:=[$Build.$C$9]" office:value-type="float" office:value="2" calcext:value-type="float">
            <text:p>+2</text:p>
          </table:table-cell>
          <table:table-cell table:style-name="ce76" table:formula="of:=[$Build.$C$9]" office:value-type="float" office:value="2" calcext:value-type="float">
            <text:p>+2</text:p>
          </table:table-cell>
          <table:table-cell table:style-name="ce155"/>
          <table:table-cell table:number-columns-repeated="4"/>
        </table:table-row>
        <table:table-row table:style-name="ro4">
          <table:table-cell table:style-name="ce6" office:value-type="string" calcext:value-type="string">
            <text:p>Reasoning (REA)</text:p>
          </table:table-cell>
          <table:table-cell table:style-name="ce34" table:content-validation-name="val3"/>
          <table:table-cell table:style-name="ce65" table:formula="of:=[.$B10]+COUNTA([.B17:.C17])" office:value-type="float" office:value="0" calcext:value-type="float">
            <text:p/>
          </table:table-cell>
          <table:table-cell/>
          <table:table-cell table:style-name="ce107" office:value-type="string" calcext:value-type="string">
            <text:p>Resolve</text:p>
          </table:table-cell>
          <table:table-cell table:style-name="ce87" office:value-type="string" calcext:value-type="string">
            <text:p>Max Stress Tol</text:p>
          </table:table-cell>
          <table:table-cell table:style-name="ce107" office:value-type="string" calcext:value-type="string">
            <text:p>Panic Rolls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Focus (FOC)</text:p>
          </table:table-cell>
          <table:table-cell table:style-name="ce35" table:content-validation-name="val3"/>
          <table:table-cell table:style-name="ce65" table:formula="of:=[.$B11]+COUNTA([.F17:.G17])" office:value-type="float" office:value="0" calcext:value-type="float">
            <text:p/>
          </table:table-cell>
          <table:table-cell/>
          <table:table-cell table:style-name="ce77" table:formula="of:=[$Build.$C$11]+IF(ISNA(MATCH(&quot;Composed&quot;;[.E46:.E55];0));0;IF(ISBLANK(INDEX([.I45:.I54];MATCH(&quot;Composed&quot;; [.E45:.E54]; 0);1));0;1))" office:value-type="float" office:value="0" calcext:value-type="float">
            <text:p/>
          </table:table-cell>
          <table:table-cell table:style-name="ce102" table:formula="of:=2+[$Build.C11]+IF(ISNA(MATCH(&quot;Composed&quot;;[.E45:.E54];0)&gt;0);0;1+IF(ISBLANK(INDEX([.H45:.H54];MATCH(&quot;Composed&quot;; [.E45:.E54]; 0);1));0;1))" office:value-type="float" office:value="2" calcext:value-type="float">
            <text:p>2</text:p>
          </table:table-cell>
          <table:table-cell table:style-name="ce77" table:formula="of:=[$Build.$C$11]+IF(ISNA(MATCH(&quot;Composed&quot;;[.E46:.E55];0));0;1+IF(ISBLANK(INDEX([.H45:.H54];MATCH(&quot;Composed&quot;; [.E45:.E54]; 0);1));0;1))" office:value-type="float" office:value="0" calcext:value-type="float">
            <text:p/>
          </table:table-cell>
          <table:table-cell table:number-columns-repeated="4"/>
        </table:table-row>
        <table:table-row table:style-name="ro4">
          <table:table-cell table:style-name="ce13" table:formula="of:=IF([.B12]&gt;0;&quot;Unallocated&quot;;IF([.B12]&lt;0;&quot;Overallocated&quot;;&quot;&quot;))">
            <text:p/>
          </table:table-cell>
          <table:table-cell table:style-name="ce44" table:formula="of:=2+IF([.$B$3]&gt;1;1;0)+IF([.$B$3]&gt;2;1;0)+IF([.$B$3]&gt;6;1;0)+IF([.$B$6]&gt;8;2;0)+IF([.$B$6]&gt;10;1;0)+IF([.$B$6]&gt;11;1;0)-SUM([.B6:.B11])" office:value-type="float" office:value="0" calcext:value-type="float">
            <text:p>0</text:p>
          </table:table-cell>
          <table:table-cell table:style-name="ce66"/>
          <table:table-cell/>
          <table:table-cell table:style-name="ce66" table:number-columns-repeated="3"/>
          <table:table-cell table:number-columns-repeated="4"/>
        </table:table-row>
        <table:table-row table:style-name="ro4">
          <table:table-cell table:style-name="ce115" table:number-columns-repeated="5"/>
          <table:table-cell table:number-columns-repeated="6"/>
        </table:table-row>
        <table:table-row table:style-name="ro4">
          <table:table-cell table:style-name="ce14" office:value-type="string" calcext:value-type="string">
            <text:p>Narrative Archetypes</text:p>
          </table:table-cell>
          <table:table-cell table:style-name="ce107" office:value-type="string" calcext:value-type="string">
            <text:p>Basic Trait</text:p>
          </table:table-cell>
          <table:table-cell table:style-name="ce107" office:value-type="string" calcext:value-type="string">
            <text:p>Upgraded Trait</text:p>
          </table:table-cell>
          <table:table-cell table:style-name="ce115"/>
          <table:table-cell table:style-name="ce14" office:value-type="string" calcext:value-type="string">
            <text:p>Combat Archetypes</text:p>
          </table:table-cell>
          <table:table-cell table:style-name="ce107" office:value-type="string" calcext:value-type="string">
            <text:p>Basic Trait</text:p>
          </table:table-cell>
          <table:table-cell table:style-name="ce107" office:value-type="string" calcext:value-type="string">
            <text:p>Upgraded Trait</text:p>
          </table:table-cell>
          <table:table-cell table:number-columns-repeated="4"/>
        </table:table-row>
        <table:table-row table:style-name="ro4">
          <table:table-cell table:style-name="ce107" table:formula="of:=[$'Archetype Traits'.$A2]" office:value-type="string" office:string-value="The Hero" calcext:value-type="string">
            <text:p>The Hero</text:p>
          </table:table-cell>
          <table:table-cell table:style-name="ce46" office:value-type="string" calcext:value-type="string">
            <text:p>x</text:p>
          </table:table-cell>
          <table:table-cell table:style-name="ce46"/>
          <table:table-cell table:style-name="ce115"/>
          <table:table-cell table:style-name="ce107" table:formula="of:=[$'Archetype Traits'.$A5]" office:value-type="string" office:string-value="The Loomer" calcext:value-type="string">
            <text:p>The Loomer</text:p>
          </table:table-cell>
          <table:table-cell table:style-name="ce46" table:number-columns-repeated="2"/>
          <table:table-cell table:number-columns-repeated="4"/>
        </table:table-row>
        <table:table-row table:style-name="ro4">
          <table:table-cell table:style-name="ce107" table:formula="of:=[$'Archetype Traits'.A3]" office:value-type="string" office:string-value="The Artist" calcext:value-type="string">
            <text:p>The Artist</text:p>
          </table:table-cell>
          <table:table-cell table:style-name="ce47" table:number-columns-repeated="2"/>
          <table:table-cell table:style-name="ce115"/>
          <table:table-cell table:style-name="ce107" table:formula="of:=[$'Archetype Traits'.A6]" office:value-type="string" office:string-value="The Weaver" calcext:value-type="string">
            <text:p>The Weaver</text:p>
          </table:table-cell>
          <table:table-cell table:style-name="ce47" office:value-type="string" calcext:value-type="string">
            <text:p>x</text:p>
          </table:table-cell>
          <table:table-cell table:style-name="ce47"/>
          <table:table-cell table:number-columns-repeated="4"/>
        </table:table-row>
        <table:table-row table:style-name="ro4">
          <table:table-cell table:style-name="ce107" table:formula="of:=[$'Archetype Traits'.A4]" office:value-type="string" office:string-value="The Sage" calcext:value-type="string">
            <text:p>The Sage</text:p>
          </table:table-cell>
          <table:table-cell table:style-name="ce48" table:number-columns-repeated="2"/>
          <table:table-cell table:style-name="ce115"/>
          <table:table-cell table:style-name="ce107" table:formula="of:=[$'Archetype Traits'.A7]" office:value-type="string" office:string-value="The Quill" calcext:value-type="string">
            <text:p>The Quill</text:p>
          </table:table-cell>
          <table:table-cell table:style-name="ce48" table:number-columns-repeated="2"/>
          <table:table-cell table:number-columns-repeated="4"/>
        </table:table-row>
        <table:table-row table:style-name="ro4">
          <table:table-cell table:style-name="ce19" table:formula="of:=IF([.B18]&gt;0;&quot;Unallocated&quot;;IF([.B18]&lt;0;&quot;Overallocated&quot;;&quot;&quot;))">
            <text:p/>
          </table:table-cell>
          <table:table-cell table:style-name="ce54" table:formula="of:=1+IF([.$B$3]&gt;=5;1;0)-COUNTA([.B15:.C17])" office:value-type="float" office:value="0" calcext:value-type="float">
            <text:p>0</text:p>
          </table:table-cell>
          <table:table-cell table:style-name="ce54"/>
          <table:table-cell table:style-name="ce115"/>
          <table:table-cell table:style-name="ce92" table:formula="of:=IF([.F18]&gt;0;&quot;Unallocated&quot;;IF([.F18]&lt;0;&quot;Overallocated&quot;;&quot;&quot;))">
            <text:p/>
          </table:table-cell>
          <table:table-cell table:style-name="ce54" table:formula="of:=1+IF([.$B$3]&gt;=5;1;0)-COUNTA([.F15:.G17])" office:value-type="float" office:value="0" calcext:value-type="float">
            <text:p>0</text:p>
          </table:table-cell>
          <table:table-cell table:style-name="ce54"/>
          <table:table-cell table:number-columns-repeated="4"/>
        </table:table-row>
        <table:table-row table:style-name="ro4">
          <table:table-cell table:style-name="ce115" table:number-columns-repeated="5"/>
          <table:table-cell table:number-columns-repeated="6"/>
        </table:table-row>
        <table:table-row table:style-name="ro6">
          <table:table-cell table:style-name="ce10" office:value-type="string" calcext:value-type="string" table:number-columns-spanned="3" table:number-rows-spanned="1">
            <text:p>UTILITY ARTS</text:p>
          </table:table-cell>
          <table:covered-table-cell table:number-columns-repeated="2" table:style-name="ce62"/>
          <table:table-cell table:style-name="ce2"/>
          <table:table-cell table:style-name="ce10" office:value-type="string" calcext:value-type="string" table:number-columns-spanned="3" table:number-rows-spanned="1">
            <text:p>COMBAT ARTS</text:p>
          </table:table-cell>
          <table:covered-table-cell table:number-columns-repeated="2" table:style-name="ce62"/>
          <table:table-cell table:number-columns-repeated="4"/>
        </table:table-row>
        <table:table-row table:style-name="ro7"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 Points</text:p>
          </table:table-cell>
          <table:table-cell table:style-name="ce107" office:value-type="string" calcext:value-type="string">
            <text:p>MODIFIER</text:p>
          </table:table-cell>
          <table:table-cell table:style-name="ce2"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 Points</text:p>
          </table:table-cell>
          <table:table-cell table:style-name="ce107" office:value-type="string" calcext:value-type="string">
            <text:p>MODIFIER</text:p>
          </table:table-cell>
          <table:table-cell table:number-columns-repeated="4"/>
        </table:table-row>
        <table:table-row table:style-name="ro8" table:visibility="collapse">
          <table:table-cell table:style-name="ce107" table:number-columns-repeated="3"/>
          <table:table-cell table:style-name="ce2"/>
          <table:table-cell table:style-name="ce107" table:number-columns-repeated="3"/>
          <table:table-cell table:number-columns-repeated="4"/>
        </table:table-row>
        <table:table-row table:style-name="ro7">
          <table:table-cell table:style-name="ce117" office:value-type="string" calcext:value-type="string">
            <text:p>Struction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FLOOR(([.$C$6]+[.$C$7]+[.B23]+COUNTA([.B15:.C15]))/2)" office:value-type="float" office:value="1" calcext:value-type="float">
            <text:p>+1</text:p>
          </table:table-cell>
          <table:table-cell table:style-name="ce2"/>
          <table:table-cell table:style-name="ce157" office:value-type="string" calcext:value-type="string">
            <text:p>Brawling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IF([.F23]&gt;0;FLOOR(([$Build.$C$6]+[$Build.F23])/2)+FLOOR(([.$B$3]+4)/4);0)" office:value-type="float" office:value="0" calcext:value-type="float">
            <text:p/>
          </table:table-cell>
          <table:table-cell table:number-columns-repeated="4"/>
        </table:table-row>
        <table:table-row table:style-name="ro7">
          <table:table-cell table:style-name="ce117" office:value-type="string" calcext:value-type="string">
            <text:p>Craft</text:p>
          </table:table-cell>
          <table:table-cell table:style-name="ce52" table:content-validation-name="val3"/>
          <table:table-cell table:style-name="ce81" table:formula="of:=FLOOR(([.$C$8]+[.$C$7]+[.B24]+COUNTA([.B16:.C16]))/2)" office:value-type="float" office:value="0" calcext:value-type="float">
            <text:p/>
          </table:table-cell>
          <table:table-cell table:style-name="ce2"/>
          <table:table-cell table:style-name="ce157" office:value-type="string" calcext:value-type="string">
            <text:p>Dueling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IF([.F24]&gt;0;FLOOR(([$Build.$C$8]+[$Build.F24])/2)+FLOOR(([.$B$3]+4)/4);0)" office:value-type="float" office:value="0" calcext:value-type="float">
            <text:p/>
          </table:table-cell>
          <table:table-cell table:number-columns-repeated="4"/>
        </table:table-row>
        <table:table-row table:style-name="ro7">
          <table:table-cell table:style-name="ce117" office:value-type="string" calcext:value-type="string">
            <text:p>Research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FLOOR(([.$C$10]+[.$C$7]+[.B25]+COUNTA([.B17:.C17]))/2)" office:value-type="float" office:value="0" calcext:value-type="float">
            <text:p/>
          </table:table-cell>
          <table:table-cell table:style-name="ce2"/>
          <table:table-cell table:style-name="ce157" office:value-type="string" calcext:value-type="string">
            <text:p>Infusion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IF([.F25]&gt;0;FLOOR(([$Build.$C$10]+[$Build.F25])/2)+FLOOR(([.$B$3]+4)/4);0)" office:value-type="float" office:value="0" calcext:value-type="float">
            <text:p/>
          </table:table-cell>
          <table:table-cell table:number-columns-repeated="4"/>
        </table:table-row>
        <table:table-row table:style-name="ro7">
          <table:table-cell table:style-name="ce117" office:value-type="string" calcext:value-type="string">
            <text:p>Athletics</text:p>
          </table:table-cell>
          <table:table-cell table:style-name="ce52" table:content-validation-name="val3" office:value-type="float" office:value="1" calcext:value-type="float">
            <text:p>1</text:p>
          </table:table-cell>
          <table:table-cell table:style-name="ce81" table:formula="of:=FLOOR(([.$C$6]+[.$C$9]+[.B26]+COUNTA([.B15:.C15]))/2)" office:value-type="float" office:value="3" calcext:value-type="float">
            <text:p>+3</text:p>
          </table:table-cell>
          <table:table-cell table:style-name="ce2"/>
          <table:table-cell table:style-name="ce157" office:value-type="string" calcext:value-type="string">
            <text:p>Archery</text:p>
          </table:table-cell>
          <table:table-cell table:style-name="ce183" table:content-validation-name="val3" office:value-type="float" office:value="2" calcext:value-type="float">
            <text:p>2</text:p>
          </table:table-cell>
          <table:table-cell table:style-name="ce244" table:formula="of:=IF([.F26]&gt;0;FLOOR(([$Build.$C$6]+[$Build.F26])/2)+FLOOR(([.$B$3]+4)/4);0)" office:value-type="float" office:value="3" calcext:value-type="float">
            <text:p>+3</text:p>
          </table:table-cell>
          <table:table-cell table:number-columns-repeated="4"/>
        </table:table-row>
        <table:table-row table:style-name="ro7">
          <table:table-cell table:style-name="ce117" office:value-type="string" calcext:value-type="string">
            <text:p>Stealth</text:p>
          </table:table-cell>
          <table:table-cell table:style-name="ce52" table:content-validation-name="val3" office:value-type="float" office:value="1" calcext:value-type="float">
            <text:p>1</text:p>
          </table:table-cell>
          <table:table-cell table:style-name="ce81" table:formula="of:=FLOOR(([.$C$8]+[.$C$9]+[.B27]+COUNTA([.B16:.C16]))/2)" office:value-type="float" office:value="1" calcext:value-type="float">
            <text:p>+1</text:p>
          </table:table-cell>
          <table:table-cell table:style-name="ce2"/>
          <table:table-cell table:style-name="ce157" office:value-type="string" calcext:value-type="string">
            <text:p>Ninjutsu</text:p>
          </table:table-cell>
          <table:table-cell table:style-name="ce183" table:content-validation-name="val3" office:value-type="float" office:value="1" calcext:value-type="float">
            <text:p>1</text:p>
          </table:table-cell>
          <table:table-cell table:style-name="ce244" table:formula="of:=IF([.F27]&gt;0;FLOOR(([$Build.$C$8]+[$Build.F27])/2)+FLOOR(([.$B$3]+4)/4);0)" office:value-type="float" office:value="1" calcext:value-type="float">
            <text:p>+1</text:p>
          </table:table-cell>
          <table:table-cell table:number-columns-repeated="4"/>
        </table:table-row>
        <table:table-row table:style-name="ro7">
          <table:table-cell table:style-name="ce117" office:value-type="string" calcext:value-type="string">
            <text:p>Problem Solving</text:p>
          </table:table-cell>
          <table:table-cell table:style-name="ce52" table:content-validation-name="val3"/>
          <table:table-cell table:style-name="ce81" table:formula="of:=FLOOR(([.$C$10]+[.$C$9]+[.B28]+COUNTA([.B17:.C17]))/2)" office:value-type="float" office:value="1" calcext:value-type="float">
            <text:p>+1</text:p>
          </table:table-cell>
          <table:table-cell table:style-name="ce2"/>
          <table:table-cell table:style-name="ce157" office:value-type="string" calcext:value-type="string">
            <text:p>Kineticism</text:p>
          </table:table-cell>
          <table:table-cell table:style-name="ce183" table:content-validation-name="val3"/>
          <table:table-cell table:style-name="ce244" table:formula="of:=IF([.F28]&gt;0;FLOOR(([$Build.$C$10]+[$Build.F28])/2)+FLOOR(([.$B$3]+4)/4);0)" office:value-type="float" office:value="0" calcext:value-type="float">
            <text:p/>
          </table:table-cell>
          <table:table-cell table:number-columns-repeated="4"/>
        </table:table-row>
        <table:table-row table:style-name="ro7">
          <table:table-cell table:style-name="ce117" office:value-type="string" calcext:value-type="string">
            <text:p>Leadership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FLOOR(([.$C$6]+[.$C$11]+[.B29]+COUNTA([.B15:.C15]))/2)" office:value-type="float" office:value="1" calcext:value-type="float">
            <text:p>+1</text:p>
          </table:table-cell>
          <table:table-cell table:style-name="ce2"/>
          <table:table-cell table:style-name="ce157" office:value-type="string" calcext:value-type="string">
            <text:p>Animism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IF([.F29]&gt;0;FLOOR(([$Build.$C$6]+[$Build.F29])/2)+FLOOR(([.$B$3]+4)/4);0)" office:value-type="float" office:value="0" calcext:value-type="float">
            <text:p/>
          </table:table-cell>
          <table:table-cell table:style-name="Unspent"/>
          <table:table-cell/>
          <table:table-cell table:style-name="Unspent"/>
          <table:table-cell/>
        </table:table-row>
        <table:table-row table:style-name="ro7">
          <table:table-cell table:style-name="ce117" office:value-type="string" calcext:value-type="string">
            <text:p>Influence</text:p>
          </table:table-cell>
          <table:table-cell table:style-name="ce52" table:content-validation-name="val3"/>
          <table:table-cell table:style-name="ce81" table:formula="of:=FLOOR(([.$C$8]+[.$C$11]+[.B30]+COUNTA([.B16:.C16]))/2)" office:value-type="float" office:value="0" calcext:value-type="float">
            <text:p/>
          </table:table-cell>
          <table:table-cell table:style-name="ce2"/>
          <table:table-cell table:style-name="ce157" office:value-type="string" calcext:value-type="string">
            <text:p>Mesmerism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IF([.F30]&gt;0;FLOOR(([$Build.$C$8]+[$Build.F30])/2)+FLOOR(([.$B$3]+4)/4);0)" office:value-type="float" office:value="0" calcext:value-type="float">
            <text:p/>
          </table:table-cell>
          <table:table-cell table:number-columns-repeated="4"/>
        </table:table-row>
        <table:table-row table:style-name="ro7">
          <table:table-cell table:style-name="ce117" office:value-type="string" calcext:value-type="string">
            <text:p>Reconnaissance</text:p>
          </table:table-cell>
          <table:table-cell table:style-name="ce52" table:content-validation-name="val3" office:value-type="float" office:value="1" calcext:value-type="float">
            <text:p>1</text:p>
          </table:table-cell>
          <table:table-cell table:style-name="ce81" table:formula="of:=FLOOR(([.$C$10]+[.$C$11]+[.B31]+COUNTA([.B17:.C17]))/2)" office:value-type="float" office:value="0" calcext:value-type="float">
            <text:p/>
          </table:table-cell>
          <table:table-cell table:style-name="ce2"/>
          <table:table-cell table:style-name="ce157" office:value-type="string" calcext:value-type="string">
            <text:p>Elementalism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IF([.F31]&gt;0;FLOOR(([$Build.$C$10]+[$Build.F31])/2)+FLOOR(([.$B$3]+4)/4);0)" office:value-type="float" office:value="0" calcext:value-type="float">
            <text:p/>
          </table:table-cell>
          <table:table-cell table:number-columns-repeated="4"/>
        </table:table-row>
        <table:table-row table:style-name="ro4">
          <table:table-cell table:style-name="ce26" table:formula="of:=IF([.B32]&gt;0;&quot;Unallocated&quot;;IF([.B32]&lt;0;&quot;Overallocated&quot;;&quot;&quot;))">
            <text:p/>
          </table:table-cell>
          <table:table-cell table:style-name="ce26" table:formula="of:=3+IF([.$B$3]&gt;2;1;0)+IF([.$B$3]&gt;4;1;0)+IF([.$B$3]&gt;6;1;0)+IF([.$B$3]&gt;8;1;0)+IF([.$B$3]&gt;10;1;0)+IF([.$B$3]&gt;11;1;0)-SUM([.B23:.B31])" office:value-type="float" office:value="0" calcext:value-type="float">
            <text:p>0</text:p>
          </table:table-cell>
          <table:table-cell table:style-name="ce78"/>
          <table:table-cell table:style-name="ce2"/>
          <table:table-cell table:style-name="ce94" table:formula="of:=IF([.F32]&gt;0;&quot;Unallocated&quot;;IF([.F32]&lt;0;&quot;Overallocated&quot;;&quot;&quot;))">
            <text:p/>
          </table:table-cell>
          <table:table-cell table:style-name="ce94" table:formula="of:=3+IF([.$B$3]&gt;1;1;0)+IF([.$B$3]&gt;3;1;0)+IF([.$B$3]&gt;5;1;0)+IF([.$B$3]&gt;7;1;0)+IF([.$B$3]&gt;9;1;0)+IF([.$B$3]&gt;11;1;0)-SUM([.F23:.F31])" office:value-type="float" office:value="0" calcext:value-type="float">
            <text:p>0</text:p>
          </table:table-cell>
          <table:table-cell table:style-name="ce120"/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 table:style-name="ce2" table:number-columns-repeated="2"/>
          <table:table-cell/>
          <table:table-cell table:style-name="ce2"/>
          <table:table-cell table:number-columns-repeated="7"/>
        </table:table-row>
        <table:table-row table:style-name="ro6">
          <table:table-cell table:style-name="ce10" office:value-type="string" calcext:value-type="string" table:number-columns-spanned="3" table:number-rows-spanned="1">
            <text:p>UTILITY ABILITIES</text:p>
          </table:table-cell>
          <table:covered-table-cell table:number-columns-repeated="2" table:style-name="ce62"/>
          <table:table-cell table:style-name="ce2"/>
          <table:table-cell table:style-name="ce10" office:value-type="string" calcext:value-type="string" table:number-columns-spanned="3" table:number-rows-spanned="1">
            <text:p>COMBAT ABILITIES</text:p>
          </table:table-cell>
          <table:covered-table-cell table:number-columns-repeated="2" table:style-name="ce62"/>
          <table:table-cell table:style-name="ce10" office:value-type="string" calcext:value-type="string" table:number-columns-spanned="3" table:number-rows-spanned="1">
            <text:p>Upgrades</text:p>
          </table:table-cell>
          <table:covered-table-cell table:number-columns-repeated="2" table:style-name="ce62"/>
          <table:table-cell/>
        </table:table-row>
        <table:table-row table:style-name="ro4"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 table:style-name="ce2"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b</text:p>
          </table:table-cell>
          <table:table-cell table:style-name="ce107" office:value-type="string" calcext:value-type="string">
            <text:p>c</text:p>
          </table:table-cell>
          <table:table-cell/>
        </table:table-row>
        <table:table-row table:style-name="ro4">
          <table:table-cell table:style-name="ce118" office:value-type="string" calcext:value-type="string">
            <text:p>Push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Proactive</text:p>
          </table:table-cell>
          <table:table-cell/>
          <table:table-cell table:style-name="ce159" office:value-type="string" calcext:value-type="string">
            <text:p>Basic Attack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118" office:value-type="string" calcext:value-type="string">
            <text:p>Help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Proactive</text:p>
          </table:table-cell>
          <table:table-cell/>
          <table:table-cell table:style-name="ce159" office:value-type="string" calcext:value-type="string">
            <text:p>Dash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118" office:value-type="string" calcext:value-type="string">
            <text:p>Interced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Reactive</text:p>
          </table:table-cell>
          <table:table-cell/>
          <table:table-cell table:style-name="ce159" office:value-type="string" calcext:value-type="string">
            <text:p>Recover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118" office:value-type="string" calcext:value-type="string">
            <text:p>Double or Nothing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Reactive</text:p>
          </table:table-cell>
          <table:table-cell/>
          <table:table-cell table:style-name="ce159" office:value-type="string" calcext:value-type="string">
            <text:p>Resuscitat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118" office:value-type="string" calcext:value-type="string">
            <text:p>Practic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Downtime</text:p>
          </table:table-cell>
          <table:table-cell/>
          <table:table-cell table:style-name="ce159" office:value-type="string" calcext:value-type="string">
            <text:p>Brac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118" office:value-type="string" calcext:value-type="string">
            <text:p>Meditat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Downtime</text:p>
          </table:table-cell>
          <table:table-cell/>
          <table:table-cell table:style-name="ce159" office:value-type="string" calcext:value-type="string">
            <text:p>Dodg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28" table:content-validation-name="val1" office:value-type="string" calcext:value-type="string">
            <text:p>Prodigious Leap</text:p>
          </table:table-cell>
          <table:table-cell table:style-name="ce53" table:content-validation-name="val4" table:formula="of:=IFERROR(INDEX(COM.MICROSOFT.FILTER(['Utility Abilities By Art'.$A$2:.$A$61]; ['Utility Abilities By Art'.$B$2:.$B$61]=[.A43]);1);&quot;&quot;)" office:value-type="string" office:string-value="Athletics" calcext:value-type="string">
            <text:p>Athletics</text:p>
          </table:table-cell>
          <table:table-cell table:style-name="ce53" table:content-validation-name="val4" table:formula="of:=IFERROR(COM.MICROSOFT.FILTER(['Utility Abilities By Art'.$C$2:.$C$61]; ['Utility Abilities By Art'.$B$2:.$B$61]=[.A43]);&quot;&quot;)" office:value-type="string" office:string-value="Gambit Modifier" calcext:value-type="string">
            <text:p>Gambit Modifier</text:p>
          </table:table-cell>
          <table:table-cell table:style-name="ce82" table:formula="of:=NOT(ISBLANK([.A43]))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Concentrat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28" table:content-validation-name="val1" office:value-type="string" calcext:value-type="string">
            <text:p>I Am No One</text:p>
          </table:table-cell>
          <table:table-cell table:style-name="ce53" table:content-validation-name="val4" table:formula="of:=IFERROR(INDEX(COM.MICROSOFT.FILTER(['Utility Abilities By Art'.$A$2:.$A$61]; ['Utility Abilities By Art'.$B$2:.$B$61]=[.A44]);1);&quot;&quot;)" office:value-type="string" office:string-value="Stealth" calcext:value-type="string">
            <text:p>Stealth</text:p>
          </table:table-cell>
          <table:table-cell table:style-name="ce53" table:content-validation-name="val4" table:formula="of:=IFERROR(COM.MICROSOFT.FILTER(['Utility Abilities By Art'.$C$2:.$C$61]; ['Utility Abilities By Art'.$B$2:.$B$61]=[.A44]);&quot;&quot;)" office:value-type="string" office:string-value="Passive" calcext:value-type="string">
            <text:p>Passive</text:p>
          </table:table-cell>
          <table:table-cell table:style-name="ce82" table:formula="of:=NOT(ISBLANK([.A44]))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Assist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28" table:content-validation-name="val1" office:value-type="string" calcext:value-type="string">
            <text:p>Eagle-Eye</text:p>
          </table:table-cell>
          <table:table-cell table:style-name="ce53" table:content-validation-name="val4" table:formula="of:=IFERROR(INDEX(COM.MICROSOFT.FILTER(['Utility Abilities By Art'.$A$2:.$A$61]; ['Utility Abilities By Art'.$B$2:.$B$61]=[.A45]);1);&quot;&quot;)" office:value-type="string" office:string-value="Reconnaissance" calcext:value-type="string">
            <text:p>Reconnaissance</text:p>
          </table:table-cell>
          <table:table-cell table:style-name="ce53" table:content-validation-name="val4" table:formula="of:=IFERROR(COM.MICROSOFT.FILTER(['Utility Abilities By Art'.$C$2:.$C$61]; ['Utility Abilities By Art'.$B$2:.$B$61]=[.A45]);&quot;&quot;)" office:value-type="string" office:string-value="Passive" calcext:value-type="string">
            <text:p>Passive</text:p>
          </table:table-cell>
          <table:table-cell table:style-name="ce82" table:formula="of:=NOT(ISBLANK([.A45]))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rotect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59" table:number-columns-repeated="3"/>
          <table:table-cell/>
        </table:table-row>
        <table:table-row table:style-name="ro6">
          <table:table-cell table:style-name="ce28" table:content-validation-name="val1"/>
          <table:table-cell table:style-name="ce53" table:content-validation-name="val4" table:formula="of:=IFERROR(INDEX(COM.MICROSOFT.FILTER(['Utility Abilities By Art'.$A$2:.$A$61]; ['Utility Abilities By Art'.$B$2:.$B$61]=[.A46]);1);&quot;&quot;)">
            <text:p/>
          </table:table-cell>
          <table:table-cell table:style-name="ce53" table:content-validation-name="val4" table:formula="of:=IFERROR(COM.MICROSOFT.FILTER(['Utility Abilities By Art'.$C$2:.$C$61]; ['Utility Abilities By Art'.$B$2:.$B$61]=[.A46]);&quot;&quot;)">
            <text:p/>
          </table:table-cell>
          <table:table-cell table:style-name="ce82" table:formula="of:=NOT(ISBLANK([.A46]))" office:value-type="boolean" office:boolean-value="false" calcext:value-type="boolean">
            <text:p>FALSE</text:p>
          </table:table-cell>
          <table:table-cell table:style-name="ce96" table:content-validation-name="val5" office:value-type="string" calcext:value-type="string">
            <text:p>Piercing Shot</text:p>
          </table:table-cell>
          <table:table-cell table:style-name="ce113" table:content-validation-name="val4" table:formula="of:=IFERROR(IFNA(INDEX(COM.MICROSOFT.FILTER(['Combat Abilities By Art'.$A$2:.$A$73]; ['Combat Abilities By Art'.$B$2:.$B$73]=[.E46]);1);&quot;&quot;);&quot;&quot;)" office:value-type="string" office:string-value="Archery" calcext:value-type="string">
            <text:p>Archery</text:p>
          </table:table-cell>
          <table:table-cell table:style-name="ce113" table:content-validation-name="val4" table:formula="of:=IFERROR(IFNA(INDEX(COM.MICROSOFT.FILTER(['Combat Abilities By Art'.$C$2:.$C$73]; ['Combat Abilities By Art'.$B$2:.$B$73]=[.E46]);1);&quot;&quot;);&quot;&quot;)" office:value-type="string" office:string-value="Action" calcext:value-type="string">
            <text:p>Action</text:p>
          </table:table-cell>
          <table:table-cell table:style-name="ce166"/>
          <table:table-cell table:style-name="ce170" table:number-columns-repeated="2"/>
          <table:table-cell table:style-name="ce82" table:formula="of:=NOT(ISBLANK([.E46]))" office:value-type="boolean" office:boolean-value="true" calcext:value-type="boolean">
            <text:p>TRUE</text:p>
          </table:table-cell>
        </table:table-row>
        <table:table-row table:style-name="ro6">
          <table:table-cell table:style-name="ce28" table:content-validation-name="val1"/>
          <table:table-cell table:style-name="ce53" table:content-validation-name="val4" table:formula="of:=IFERROR(INDEX(COM.MICROSOFT.FILTER(['Utility Abilities By Art'.$A$2:.$A$61]; ['Utility Abilities By Art'.$B$2:.$B$61]=[.A47]);1);&quot;&quot;)">
            <text:p/>
          </table:table-cell>
          <table:table-cell table:style-name="ce53" table:content-validation-name="val4" table:formula="of:=IFERROR(COM.MICROSOFT.FILTER(['Utility Abilities By Art'.$C$2:.$C$61]; ['Utility Abilities By Art'.$B$2:.$B$61]=[.A47]);&quot;&quot;)">
            <text:p/>
          </table:table-cell>
          <table:table-cell table:style-name="ce82" table:formula="of:=NOT(ISBLANK([.A47]))" office:value-type="boolean" office:boolean-value="false" calcext:value-type="boolean">
            <text:p>FALSE</text:p>
          </table:table-cell>
          <table:table-cell table:style-name="ce96" table:content-validation-name="val5" office:value-type="string" calcext:value-type="string">
            <text:p>Prepared Shot</text:p>
          </table:table-cell>
          <table:table-cell table:style-name="ce113" table:content-validation-name="val4" table:formula="of:=IFERROR(IFNA(INDEX(COM.MICROSOFT.FILTER(['Combat Abilities By Art'.$A$2:.$A$73]; ['Combat Abilities By Art'.$B$2:.$B$73]=[.E47]);1);&quot;&quot;);&quot;&quot;)" office:value-type="string" office:string-value="Archery" calcext:value-type="string">
            <text:p>Archery</text:p>
          </table:table-cell>
          <table:table-cell table:style-name="ce113" table:content-validation-name="val4" table:formula="of:=IFERROR(IFNA(INDEX(COM.MICROSOFT.FILTER(['Combat Abilities By Art'.$C$2:.$C$73]; ['Combat Abilities By Art'.$B$2:.$B$73]=[.E47]);1);&quot;&quot;);&quot;&quot;)" office:value-type="string" office:string-value="Stance" calcext:value-type="string">
            <text:p>Stance</text:p>
          </table:table-cell>
          <table:table-cell table:style-name="ce166"/>
          <table:table-cell table:style-name="ce170" table:number-columns-repeated="2"/>
          <table:table-cell table:style-name="ce82" table:formula="of:=NOT(ISBLANK([.E47]))" office:value-type="boolean" office:boolean-value="true" calcext:value-type="boolean">
            <text:p>TRUE</text:p>
          </table:table-cell>
        </table:table-row>
        <table:table-row table:style-name="ro6">
          <table:table-cell table:style-name="ce28" table:content-validation-name="val1"/>
          <table:table-cell table:style-name="ce53" table:content-validation-name="val4" table:formula="of:=IFERROR(INDEX(COM.MICROSOFT.FILTER(['Utility Abilities By Art'.$A$2:.$A$61]; ['Utility Abilities By Art'.$B$2:.$B$61]=[.A48]);1);&quot;&quot;)">
            <text:p/>
          </table:table-cell>
          <table:table-cell table:style-name="ce53" table:content-validation-name="val4" table:formula="of:=IFERROR(COM.MICROSOFT.FILTER(['Utility Abilities By Art'.$C$2:.$C$61]; ['Utility Abilities By Art'.$B$2:.$B$61]=[.A48]);&quot;&quot;)">
            <text:p/>
          </table:table-cell>
          <table:table-cell table:style-name="ce82" table:formula="of:=NOT(ISBLANK([.A48]))" office:value-type="boolean" office:boolean-value="false" calcext:value-type="boolean">
            <text:p>FALSE</text:p>
          </table:table-cell>
          <table:table-cell table:style-name="ce96" table:content-validation-name="val5" office:value-type="string" calcext:value-type="string">
            <text:p>Study</text:p>
          </table:table-cell>
          <table:table-cell table:style-name="ce113" table:content-validation-name="val4" table:formula="of:=IFERROR(IFNA(INDEX(COM.MICROSOFT.FILTER(['Combat Abilities By Art'.$A$2:.$A$73]; ['Combat Abilities By Art'.$B$2:.$B$73]=[.E48]);1);&quot;&quot;);&quot;&quot;)" office:value-type="string" office:string-value="Ninjutsu" calcext:value-type="string">
            <text:p>Ninjutsu</text:p>
          </table:table-cell>
          <table:table-cell table:style-name="ce113" table:content-validation-name="val4" table:formula="of:=IFERROR(IFNA(INDEX(COM.MICROSOFT.FILTER(['Combat Abilities By Art'.$C$2:.$C$73]; ['Combat Abilities By Art'.$B$2:.$B$73]=[.E48]);1);&quot;&quot;);&quot;&quot;)" office:value-type="string" office:string-value="Stance" calcext:value-type="string">
            <text:p>Stance</text:p>
          </table:table-cell>
          <table:table-cell table:style-name="ce166"/>
          <table:table-cell table:style-name="ce170" table:number-columns-repeated="2"/>
          <table:table-cell table:style-name="ce82" table:formula="of:=NOT(ISBLANK([.E48]))" office:value-type="boolean" office:boolean-value="true" calcext:value-type="boolean">
            <text:p>TRUE</text:p>
          </table:table-cell>
        </table:table-row>
        <table:table-row table:style-name="ro6">
          <table:table-cell table:style-name="ce28" table:content-validation-name="val1"/>
          <table:table-cell table:style-name="ce53" table:content-validation-name="val4" table:formula="of:=IFERROR(INDEX(COM.MICROSOFT.FILTER(['Utility Abilities By Art'.$A$2:.$A$61]; ['Utility Abilities By Art'.$B$2:.$B$61]=[.A49]);1);&quot;&quot;)">
            <text:p/>
          </table:table-cell>
          <table:table-cell table:style-name="ce53" table:content-validation-name="val4" table:formula="of:=IFERROR(COM.MICROSOFT.FILTER(['Utility Abilities By Art'.$C$2:.$C$61]; ['Utility Abilities By Art'.$B$2:.$B$61]=[.A49]);&quot;&quot;)">
            <text:p/>
          </table:table-cell>
          <table:table-cell table:style-name="ce82" table:formula="of:=NOT(ISBLANK([.A49]))" office:value-type="boolean" office:boolean-value="false" calcext:value-type="boolean">
            <text:p>FALSE</text:p>
          </table:table-cell>
          <table:table-cell table:style-name="ce96" table:content-validation-name="val5" office:value-type="string" calcext:value-type="string">
            <text:p>Quiet Mind</text:p>
          </table:table-cell>
          <table:table-cell table:style-name="ce113" table:content-validation-name="val4" table:formula="of:=IFERROR(IFNA(INDEX(COM.MICROSOFT.FILTER(['Combat Abilities By Art'.$A$2:.$A$73]; ['Combat Abilities By Art'.$B$2:.$B$73]=[.E49]);1);&quot;&quot;);&quot;&quot;)" office:value-type="string" office:string-value="Ninjutsu" calcext:value-type="string">
            <text:p>Ninjutsu</text:p>
          </table:table-cell>
          <table:table-cell table:style-name="ce113" table:content-validation-name="val4" table:formula="of:=IFERROR(IFNA(INDEX(COM.MICROSOFT.FILTER(['Combat Abilities By Art'.$C$2:.$C$73]; ['Combat Abilities By Art'.$B$2:.$B$73]=[.E49]);1);&quot;&quot;);&quot;&quot;)" office:value-type="string" office:string-value="Stance" calcext:value-type="string">
            <text:p>Stance</text:p>
          </table:table-cell>
          <table:table-cell table:style-name="ce166"/>
          <table:table-cell table:style-name="ce170" table:number-columns-repeated="2"/>
          <table:table-cell table:style-name="ce82" table:formula="of:=NOT(ISBLANK([.E49]))" office:value-type="boolean" office:boolean-value="true" calcext:value-type="boolean">
            <text:p>TRUE</text:p>
          </table:table-cell>
        </table:table-row>
        <table:table-row table:style-name="ro6">
          <table:table-cell table:style-name="ce28" table:content-validation-name="val1"/>
          <table:table-cell table:style-name="ce53" table:content-validation-name="val4" table:formula="of:=IFERROR(INDEX(COM.MICROSOFT.FILTER(['Utility Abilities By Art'.$A$2:.$A$61]; ['Utility Abilities By Art'.$B$2:.$B$61]=[.A50]);1);&quot;&quot;)">
            <text:p/>
          </table:table-cell>
          <table:table-cell table:style-name="ce53" table:content-validation-name="val4" table:formula="of:=IFERROR(COM.MICROSOFT.FILTER(['Utility Abilities By Art'.$C$2:.$C$61]; ['Utility Abilities By Art'.$B$2:.$B$61]=[.A50]);&quot;&quot;)">
            <text:p/>
          </table:table-cell>
          <table:table-cell table:style-name="ce82" table:formula="of:=NOT(ISBLANK([.A50]))" office:value-type="boolean" office:boolean-value="false" calcext:value-type="boolean">
            <text:p>FALSE</text:p>
          </table:table-cell>
          <table:table-cell table:style-name="ce96" table:content-validation-name="val5"/>
          <table:table-cell table:style-name="ce113" table:content-validation-name="val4" table:formula="of:=IFERROR(IFNA(INDEX(COM.MICROSOFT.FILTER(['Combat Abilities By Art'.$A$2:.$A$73]; ['Combat Abilities By Art'.$B$2:.$B$73]=[.E50]);1);&quot;&quot;);&quot;&quot;)">
            <text:p/>
          </table:table-cell>
          <table:table-cell table:style-name="ce113" table:content-validation-name="val4" table:formula="of:=IFERROR(IFNA(INDEX(COM.MICROSOFT.FILTER(['Combat Abilities By Art'.$C$2:.$C$73]; ['Combat Abilities By Art'.$B$2:.$B$73]=[.E50]);1);&quot;&quot;);&quot;&quot;)">
            <text:p/>
          </table:table-cell>
          <table:table-cell table:style-name="ce166"/>
          <table:table-cell table:style-name="ce170" table:number-columns-repeated="2"/>
          <table:table-cell table:style-name="ce82" table:formula="of:=NOT(ISBLANK([.E50]))" office:value-type="boolean" office:boolean-value="false" calcext:value-type="boolean">
            <text:p>FALSE</text:p>
          </table:table-cell>
        </table:table-row>
        <table:table-row table:style-name="ro6">
          <table:table-cell table:style-name="ce28" table:content-validation-name="val1"/>
          <table:table-cell table:style-name="ce53" table:content-validation-name="val4" table:formula="of:=IFERROR(INDEX(COM.MICROSOFT.FILTER(['Utility Abilities By Art'.$A$2:.$A$61]; ['Utility Abilities By Art'.$B$2:.$B$61]=[.A51]);1);&quot;&quot;)">
            <text:p/>
          </table:table-cell>
          <table:table-cell table:style-name="ce53" table:content-validation-name="val4" table:formula="of:=IFERROR(COM.MICROSOFT.FILTER(['Utility Abilities By Art'.$C$2:.$C$61]; ['Utility Abilities By Art'.$B$2:.$B$61]=[.A51]);&quot;&quot;)">
            <text:p/>
          </table:table-cell>
          <table:table-cell table:style-name="ce82" table:formula="of:=NOT(ISBLANK([.A51]))" office:value-type="boolean" office:boolean-value="false" calcext:value-type="boolean">
            <text:p>FALSE</text:p>
          </table:table-cell>
          <table:table-cell table:style-name="ce96" table:content-validation-name="val5"/>
          <table:table-cell table:style-name="ce113" table:content-validation-name="val4" table:formula="of:=IFERROR(IFNA(INDEX(COM.MICROSOFT.FILTER(['Combat Abilities By Art'.$A$2:.$A$73]; ['Combat Abilities By Art'.$B$2:.$B$73]=[.E51]);1);&quot;&quot;);&quot;&quot;)">
            <text:p/>
          </table:table-cell>
          <table:table-cell table:style-name="ce113" table:content-validation-name="val4" table:formula="of:=IFERROR(IFNA(INDEX(COM.MICROSOFT.FILTER(['Combat Abilities By Art'.$C$2:.$C$73]; ['Combat Abilities By Art'.$B$2:.$B$73]=[.E51]);1);&quot;&quot;);&quot;&quot;)">
            <text:p/>
          </table:table-cell>
          <table:table-cell table:style-name="ce166"/>
          <table:table-cell table:style-name="ce170" table:number-columns-repeated="2"/>
          <table:table-cell table:style-name="ce82" table:formula="of:=NOT(ISBLANK([.E51]))" office:value-type="boolean" office:boolean-value="false" calcext:value-type="boolean">
            <text:p>FALSE</text:p>
          </table:table-cell>
        </table:table-row>
        <table:table-row table:style-name="ro6">
          <table:table-cell table:style-name="ce29" table:formula="of:=IF([.B52]&gt;0;&quot;Unallocated&quot;;IF([.B52]&lt;0;&quot;Overallocated&quot;;&quot;&quot;))" office:value-type="string" office:string-value="Unallocated" calcext:value-type="string">
            <text:p>Unallocated</text:p>
          </table:table-cell>
          <table:table-cell table:style-name="ce29" table:formula="of:=[.B53]-SUM([.D43:.D51])" office:value-type="float" office:value="1" calcext:value-type="float">
            <text:p>1</text:p>
          </table:table-cell>
          <table:table-cell table:style-name="ce79"/>
          <table:table-cell table:style-name="ce56" table:formula="of:=IFERROR(IF(IFNA(INDEX(COM.MICROSOFT.FILTER([.$B$23:.$B$31]; [.$A$23:.$A$31]=[.B52]);1);0)&lt;1;&quot;Illegal!&quot;;&quot;&quot;);&quot;&quot;)">
            <text:p/>
          </table:table-cell>
          <table:table-cell table:style-name="ce96" table:content-validation-name="val5"/>
          <table:table-cell table:style-name="ce113" table:content-validation-name="val4" table:formula="of:=IFERROR(IFNA(INDEX(COM.MICROSOFT.FILTER(['Combat Abilities By Art'.$A$2:.$A$73]; ['Combat Abilities By Art'.$B$2:.$B$73]=[.E52]);1);&quot;&quot;);&quot;&quot;)">
            <text:p/>
          </table:table-cell>
          <table:table-cell table:style-name="ce113" table:content-validation-name="val4" table:formula="of:=IFERROR(IFNA(INDEX(COM.MICROSOFT.FILTER(['Combat Abilities By Art'.$C$2:.$C$73]; ['Combat Abilities By Art'.$B$2:.$B$73]=[.E52]);1);&quot;&quot;);&quot;&quot;)">
            <text:p/>
          </table:table-cell>
          <table:table-cell table:style-name="ce166"/>
          <table:table-cell table:style-name="ce170" table:number-columns-repeated="2"/>
          <table:table-cell table:style-name="ce82" table:formula="of:=NOT(ISBLANK([.E52]))" office:value-type="boolean" office:boolean-value="false" calcext:value-type="boolean">
            <text:p>FALSE</text:p>
          </table:table-cell>
        </table:table-row>
        <table:table-row table:style-name="ro6">
          <table:table-cell table:style-name="ce117" office:value-type="string" calcext:value-type="string">
            <text:p>ABILITY POINTS</text:p>
          </table:table-cell>
          <table:table-cell table:style-name="ce117" table:formula="of:=3+CEILING([.$B$3]/2)" office:value-type="float" office:value="4" calcext:value-type="float">
            <text:p>4</text:p>
          </table:table-cell>
          <table:table-cell table:style-name="ce117"/>
          <table:table-cell/>
          <table:table-cell table:style-name="ce96" table:content-validation-name="val5"/>
          <table:table-cell table:style-name="ce113" table:content-validation-name="val4" table:formula="of:=IFERROR(IFNA(INDEX(COM.MICROSOFT.FILTER(['Combat Abilities By Art'.$A$2:.$A$73]; ['Combat Abilities By Art'.$B$2:.$B$73]=[.E53]);1);&quot;&quot;);&quot;&quot;)">
            <text:p/>
          </table:table-cell>
          <table:table-cell table:style-name="ce113" table:content-validation-name="val4" table:formula="of:=IFERROR(IFNA(INDEX(COM.MICROSOFT.FILTER(['Combat Abilities By Art'.$C$2:.$C$73]; ['Combat Abilities By Art'.$B$2:.$B$73]=[.E53]);1);&quot;&quot;);&quot;&quot;)">
            <text:p/>
          </table:table-cell>
          <table:table-cell table:style-name="ce166"/>
          <table:table-cell table:style-name="ce170" table:number-columns-repeated="2"/>
          <table:table-cell table:style-name="ce82" table:formula="of:=NOT(ISBLANK([.E53]))" office:value-type="boolean" office:boolean-value="false" calcext:value-type="boolean">
            <text:p>FALSE</text:p>
          </table:table-cell>
        </table:table-row>
        <table:table-row table:style-name="ro6">
          <table:table-cell table:style-name="ce24"/>
          <table:table-cell table:content-validation-name="val4"/>
          <table:table-cell table:style-name="Default" table:content-validation-name="val4"/>
          <table:table-cell/>
          <table:table-cell table:style-name="ce96" table:content-validation-name="val5"/>
          <table:table-cell table:style-name="ce113" table:content-validation-name="val4" table:formula="of:=IFERROR(IFNA(INDEX(COM.MICROSOFT.FILTER(['Combat Abilities By Art'.$A$2:.$A$73]; ['Combat Abilities By Art'.$B$2:.$B$73]=[.E54]);1);&quot;&quot;);&quot;&quot;)">
            <text:p/>
          </table:table-cell>
          <table:table-cell table:style-name="ce113" table:content-validation-name="val4" table:formula="of:=IFERROR(IFNA(INDEX(COM.MICROSOFT.FILTER(['Combat Abilities By Art'.$C$2:.$C$73]; ['Combat Abilities By Art'.$B$2:.$B$73]=[.E54]);1);&quot;&quot;);&quot;&quot;)">
            <text:p/>
          </table:table-cell>
          <table:table-cell table:style-name="ce166"/>
          <table:table-cell table:style-name="ce170" table:number-columns-repeated="2"/>
          <table:table-cell table:style-name="ce82" table:formula="of:=NOT(ISBLANK([.E54]))" office:value-type="boolean" office:boolean-value="false" calcext:value-type="boolean">
            <text:p>FALSE</text:p>
          </table:table-cell>
        </table:table-row>
        <table:table-row table:style-name="ro4">
          <table:table-cell table:number-columns-repeated="3"/>
          <table:table-cell table:style-name="ce2"/>
          <table:table-cell table:style-name="ce29" table:formula="of:=IF([.F55]&gt;0;&quot;Unallocated&quot;;IF([.F55]&lt;0;&quot;Overallocated&quot;;&quot;&quot;))">
            <text:p/>
          </table:table-cell>
          <table:table-cell table:style-name="ce29" table:formula="of:=4-IF([.$B$3]=0;1;0)+FLOOR([.$B$3]/2)-SUM([.K46:.K53])-COUNTA([.H46:.H54])" office:value-type="float" office:value="0" calcext:value-type="float">
            <text:p>0</text:p>
          </table:table-cell>
          <table:table-cell table:style-name="ce79"/>
          <table:table-cell table:style-name="ce120" table:number-columns-repeated="3"/>
          <table:table-cell/>
        </table:table-row>
        <table:table-row table:style-name="ro6">
          <table:table-cell table:number-columns-repeated="2"/>
          <table:table-cell table:style-name="Default"/>
          <table:table-cell/>
          <table:table-cell table:style-name="ce158" office:value-type="string" calcext:value-type="string">
            <text:p>ABILITY POINTS</text:p>
          </table:table-cell>
          <table:table-cell table:style-name="ce158" table:formula="of:=3+FLOOR([.$B$3]/2)+IF([.$B$3]&gt;0;1;0)" office:value-type="float" office:value="4" calcext:value-type="float">
            <text:p>4</text:p>
          </table:table-cell>
          <table:table-cell table:style-name="ce158"/>
          <table:table-cell table:style-name="ce123" table:number-columns-repeated="3"/>
          <table:table-cell/>
        </table:table-row>
        <table:table-row table:style-name="ro6">
          <table:table-cell table:number-columns-repeated="2"/>
          <table:table-cell table:style-name="ce24" table:number-columns-repeated="2"/>
          <table:table-cell table:style-name="ce72" table:number-columns-repeated="2"/>
          <table:table-cell table:style-name="Default"/>
          <table:table-cell table:style-name="ce168" table:number-columns-repeated="3"/>
          <table:table-cell/>
        </table:table-row>
        <table:table-row table:style-name="ro6">
          <table:table-cell table:style-name="ce24" table:number-columns-repeated="3"/>
          <table:table-cell table:style-name="ce72" table:number-columns-repeated="3"/>
          <table:table-cell/>
          <table:table-cell table:style-name="ce168" table:number-columns-repeated="3"/>
          <table:table-cell/>
        </table:table-row>
        <table:table-row table:style-name="ro6">
          <table:table-cell table:style-name="ce24" table:number-columns-repeated="3"/>
          <table:table-cell table:style-name="ce2"/>
          <table:table-cell table:number-columns-repeated="3"/>
          <table:table-cell table:style-name="ce168" table:number-columns-repeated="3"/>
          <table:table-cell/>
        </table:table-row>
        <table:table-row table:style-name="ro6" table:number-rows-repeated="10">
          <table:table-cell table:style-name="ce2" table:number-columns-repeated="2"/>
          <table:table-cell/>
          <table:table-cell table:style-name="ce2"/>
          <table:table-cell table:number-columns-repeated="3"/>
          <table:table-cell table:style-name="ce168" table:number-columns-repeated="3"/>
          <table:table-cell/>
        </table:table-row>
        <table:table-row table:style-name="ro6" table:number-rows-repeated="9">
          <table:table-cell table:number-columns-repeated="2"/>
          <table:table-cell table:style-name="Default"/>
          <table:table-cell/>
          <table:table-cell table:style-name="Default" table:number-columns-repeated="3"/>
          <table:table-cell table:style-name="ce168" table:number-columns-repeated="3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style-name="ce169" table:number-columns-repeated="3"/>
          <table:table-cell/>
        </table:table-row>
        <calcext:conditional-formats>
          <calcext:conditional-format calcext:target-range-address="Build.E46:Build.G54">
            <calcext:condition calcext:apply-style-name="Accent" calcext:value="formula-is([.$F$55]-#REF!&lt;1)" calcext:base-cell-address="Build.E46"/>
          </calcext:conditional-format>
          <calcext:conditional-format calcext:target-range-address="Build.A12:Build.B12">
            <calcext:condition calcext:apply-style-name="Illegal" calcext:value="formula-is([.$B$12]&lt;0)" calcext:base-cell-address="Build.A12"/>
            <calcext:condition calcext:apply-style-name="Unspent" calcext:value="formula-is([.$B$12]&gt;0)" calcext:base-cell-address="Build.A12"/>
            <calcext:condition calcext:apply-style-name="Chameleon" calcext:value="formula-is([.$B$12]=0)" calcext:base-cell-address="Build.A12"/>
          </calcext:conditional-format>
          <calcext:conditional-format calcext:target-range-address="Build.A18:Build.A18">
            <calcext:condition calcext:apply-style-name="Illegal" calcext:value="formula-is(OR([.$B$18]&lt;0;[.$C$18]&lt;0))" calcext:base-cell-address="Build.A18"/>
            <calcext:condition calcext:apply-style-name="Unspent" calcext:value="formula-is(OR([.$B$18]&gt;0;[.$C$18]&lt;0))" calcext:base-cell-address="Build.A18"/>
            <calcext:condition calcext:apply-style-name="Chameleon" calcext:value="formula-is(AND([.$B$18]=0;[.$C$18]=0))" calcext:base-cell-address="Build.A18"/>
          </calcext:conditional-format>
          <calcext:conditional-format calcext:target-range-address="Build.B18:Build.C18 Build.F18:Build.G18">
            <calcext:condition calcext:apply-style-name="Chameleon" calcext:value="=0" calcext:base-cell-address="Build.B18"/>
            <calcext:condition calcext:apply-style-name="Unspent" calcext:value="&gt;0" calcext:base-cell-address="Build.B18"/>
            <calcext:condition calcext:apply-style-name="Illegal" calcext:value="&lt;0" calcext:base-cell-address="Build.B18"/>
          </calcext:conditional-format>
          <calcext:conditional-format calcext:target-range-address="Build.E18:Build.E18">
            <calcext:condition calcext:apply-style-name="Illegal" calcext:value="formula-is(OR([.$F$18]&lt;0;[.$G$18]&lt;0))" calcext:base-cell-address="Build.E18"/>
            <calcext:condition calcext:apply-style-name="Unspent" calcext:value="formula-is(OR([.$F$18]&gt;0;[.$G$18]&gt;0))" calcext:base-cell-address="Build.E18"/>
            <calcext:condition calcext:apply-style-name="Chameleon" calcext:value="formula-is(AND([.$F$18]=0;[.$G$18]=0))" calcext:base-cell-address="Build.E18"/>
          </calcext:conditional-format>
          <calcext:conditional-format calcext:target-range-address="Build.E32:Build.G32 Build.H55:Build.J55">
            <calcext:condition calcext:apply-style-name="Illegal" calcext:value="formula-is([.$F$32]&lt;0)" calcext:base-cell-address="Build.E32"/>
            <calcext:condition calcext:apply-style-name="Chameleon" calcext:value="formula-is([.$F$32]=0)" calcext:base-cell-address="Build.E32"/>
            <calcext:condition calcext:apply-style-name="Unspent" calcext:value="formula-is([.$F$32]&gt;0)" calcext:base-cell-address="Build.E32"/>
          </calcext:conditional-format>
          <calcext:conditional-format calcext:target-range-address="Build.A52:Build.C52 Build.E55:Build.G55">
            <calcext:condition calcext:apply-style-name="Illegal" calcext:value="formula-is([.$B$52]&lt;0)" calcext:base-cell-address="Build.A52"/>
            <calcext:condition calcext:apply-style-name="Chameleon" calcext:value="formula-is([.$B$52]=0)" calcext:base-cell-address="Build.A52"/>
            <calcext:condition calcext:apply-style-name="Unspent" calcext:value="formula-is([.$B$52]&gt;0)" calcext:base-cell-address="Build.A52"/>
          </calcext:conditional-format>
          <calcext:conditional-format calcext:target-range-address="Build.A32:Build.C32">
            <calcext:condition calcext:apply-style-name="Unspent" calcext:value="formula-is([.$B$32]&gt;0)" calcext:base-cell-address="Build.A32"/>
            <calcext:condition calcext:apply-style-name="Illegal" calcext:value="formula-is([.$B$32]&lt;0)" calcext:base-cell-address="Build.A32"/>
            <calcext:condition calcext:apply-style-name="Ghost Text" calcext:value="formula-is([.$B$32]=0)" calcext:base-cell-address="Build.A32"/>
          </calcext:conditional-format>
        </calcext:conditional-formats>
      </table:table>
      <table:table table:name="Utility" table:style-name="ta1">
        <office:forms form:automatic-focus="false" form:apply-design-mode="false"/>
        <table:table-column table:style-name="co10" table:visibility="collapse" table:default-cell-style-name="ce88"/>
        <table:table-column table:style-name="co11" table:default-cell-style-name="ce188"/>
        <table:table-column table:style-name="co12" table:default-cell-style-name="ce188"/>
        <table:table-column table:style-name="co13" table:default-cell-style-name="Default"/>
        <table:table-column table:style-name="co14" table:default-cell-style-name="ce198"/>
        <table:table-column table:style-name="co15" table:default-cell-style-name="ce200"/>
        <table:table-column table:style-name="co16" table:default-cell-style-name="ce179"/>
        <table:table-column table:style-name="co17" table:default-cell-style-name="ce179"/>
        <table:table-column table:style-name="co18" table:default-cell-style-name="ce179"/>
        <table:table-column table:style-name="co19" table:default-cell-style-name="ce179"/>
        <table:table-column table:style-name="co2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Default"/>
          <table:table-cell table:style-name="ce15" office:value-type="string" calcext:value-type="string">
            <text:p>NAME</text:p>
          </table:table-cell>
          <table:table-cell table:style-name="ce268" table:formula="of:=[$Build.B1]" office:value-type="string" office:string-value="Cornelius Macguffin" calcext:value-type="string" table:number-columns-spanned="5" table:number-rows-spanned="1">
            <text:p>Cornelius Macguffin</text:p>
          </table:table-cell>
          <table:covered-table-cell table:number-columns-repeated="2" table:style-name="ce194"/>
          <table:covered-table-cell table:number-columns-repeated="2" table:style-name="Default"/>
          <table:table-cell table:style-name="Default" table:number-columns-repeated="3"/>
          <table:table-cell table:number-columns-repeated="6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1" calcext:value-type="float">
            <text:p>1</text:p>
          </table:table-cell>
          <table:table-cell/>
          <table:table-cell table:style-name="ce10" office:value-type="string" calcext:value-type="string" table:number-columns-spanned="3" table:number-rows-spanned="1">
            <text:p>EFFORT</text:p>
          </table:table-cell>
          <table:covered-table-cell table:style-name="ce147"/>
          <table:covered-table-cell table:style-name="Default"/>
          <table:table-cell table:style-name="Default"/>
          <table:table-cell table:style-name="ce205" office:value-type="string" calcext:value-type="string" table:number-columns-spanned="2" table:number-rows-spanned="1">
            <text:p>Active Downtime Buff</text:p>
          </table:table-cell>
          <table:covered-table-cell table:style-name="Default"/>
          <table:table-cell table:number-columns-repeated="6"/>
        </table:table-row>
        <table:table-row table:style-name="ro4">
          <table:table-cell table:style-name="Default" table:number-columns-repeated="3"/>
          <table:table-cell/>
          <table:table-cell table:style-name="ce87" office:value-type="string" calcext:value-type="string" table:number-columns-spanned="2" table:number-rows-spanned="1">
            <text:p>CURRENT</text:p>
          </table:table-cell>
          <table:covered-table-cell table:style-name="Default"/>
          <table:table-cell table:style-name="ce107" office:value-type="string" calcext:value-type="string">
            <text:p>MAX</text:p>
          </table:table-cell>
          <table:table-cell table:style-name="Default"/>
          <table:table-cell table:style-name="ce284" table:content-validation-name="val6" office:value-type="string" calcext:value-type="string" table:number-columns-spanned="1" table:number-rows-spanned="2">
            <text:p>Meditate</text:p>
          </table:table-cell>
          <table:table-cell table:style-name="ce285" table:number-columns-spanned="1" table:number-rows-spanned="2"/>
          <table:table-cell table:number-columns-repeated="6"/>
        </table:table-row>
        <table:table-row table:style-name="ro4">
          <table:table-cell table:style-name="Default"/>
          <table:table-cell table:style-name="ce214" office:value-type="string" calcext:value-type="string" table:number-columns-spanned="2" table:number-rows-spanned="1">
            <text:p>Note: All blank modifiers are 0</text:p>
          </table:table-cell>
          <table:covered-table-cell table:style-name="ce180"/>
          <table:table-cell/>
          <table:table-cell table:style-name="ce275" table:content-validation-name="val3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117" office:value-type="float" office:value="4" calcext:value-type="float">
            <text:p>4</text:p>
          </table:table-cell>
          <table:table-cell table:style-name="Default"/>
          <table:covered-table-cell table:style-name="Default"/>
          <table:covered-table-cell table:style-name="ce286"/>
          <table:table-cell table:number-columns-repeated="6"/>
        </table:table-row>
        <table:table-row table:style-name="ro6">
          <table:table-cell table:style-name="Default"/>
          <table:table-cell table:style-name="ce80" office:value-type="string" calcext:value-type="string" table:number-columns-spanned="2" table:number-rows-spanned="1">
            <text:p>ATTRIBUTES</text:p>
          </table:table-cell>
          <table:covered-table-cell table:style-name="ce190"/>
          <table:table-cell/>
          <table:table-cell table:style-name="Default" table:number-columns-repeated="6"/>
          <table:table-cell table:number-columns-repeated="6"/>
        </table:table-row>
        <table:table-row table:style-name="ro6">
          <table:table-cell table:style-name="Default"/>
          <table:table-cell table:style-name="ce4" table:formula="of:=[$Build.A6]" office:value-type="string" office:string-value="Power (POW)" calcext:value-type="string">
            <text:p>Power (POW)</text:p>
          </table:table-cell>
          <table:table-cell table:style-name="ce65" table:formula="of:=[$Build.C6]" office:value-type="float" office:value="2" calcext:value-type="float">
            <text:p>+2</text:p>
          </table:table-cell>
          <table:table-cell/>
          <table:table-cell table:style-name="ce197"/>
          <table:table-cell table:style-name="ce10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4">
          <table:table-cell table:style-name="Default"/>
          <table:table-cell table:style-name="ce4" table:formula="of:=[$Build.A7]" office:value-type="string" office:string-value="Endurance (END)" calcext:value-type="string">
            <text:p>Endurance (END)</text:p>
          </table:table-cell>
          <table:table-cell table:style-name="ce65" table:formula="of:=[$Build.C7]" office:value-type="float" office:value="0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199" table:formula="of:=IFNA(INDEX(COM.MICROSOFT.SORT([$Build.$A$37:.$C$51];3;-1);[.E8];1); &quot;&quot;)" office:value-type="string" office:string-value="Intercede" calcext:value-type="string">
            <text:p>Intercede</text:p>
          </table:table-cell>
          <table:table-cell table:style-name="ce178" table:formula="of:=IFERROR(IFNA(INDEX(COM.MICROSOFT.FILTER([$'Utility Abilities By Art'.$E$2:.$E$61];['Utility Abilities By Art'.$B$2:.$B$61]=[.F8]);1);&quot;&quot;);&quot;&quot;)" office:value-type="string" office:string-value="Circumstance: An ally fumbles a Gambit, succeeds on a Costly Gambit, &#10;or Critically Fumbles a Risky Gambit&#10;Effort Cost: 2&#10;Effect: The negative consequence is avoided, or in the case of a Critical Fumble&#10;it is treated as a normal Fumble instead" calcext:value-type="string" table:number-columns-spanned="4" table:number-rows-spanned="5">
            <text:p>Circumstance: An ally fumbles a Gambit, succeeds on a Costly Gambit, </text:p>
            <text:p>or Critically Fumbles a Risky Gambit</text:p>
            <text:p>Effort Cost: 2</text:p>
            <text:p>Effect: The negative consequence is avoided, or in the case of a Critical Fumble</text:p>
            <text:p>it is treated as a normal Fumble instead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table:style-name="Default"/>
          <table:table-cell table:style-name="ce5" table:formula="of:=[$Build.A8]" office:value-type="string" office:string-value="Finesse (FIN)" calcext:value-type="string">
            <text:p>Finesse (FIN)</text:p>
          </table:table-cell>
          <table:table-cell table:style-name="ce137" table:formula="of:=[$Build.C8]" office:value-type="float" office:value="0" calcext:value-type="float">
            <text:p/>
          </table:table-cell>
          <table:table-cell table:number-columns-repeated="2"/>
          <table:table-cell table:formula="of:=IFERROR(IFNA(COM.MICROSOFT.FILTER(['Utility Abilities By Art'.$A$2:.$A$61];['Utility Abilities By Art'.$B$2:.$B$61]=[.F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5" table:formula="of:=[$Build.A9]" office:value-type="string" office:string-value="Reflex (REF)" calcext:value-type="string">
            <text:p>Reflex (REF)</text:p>
          </table:table-cell>
          <table:table-cell table:style-name="ce137" table:formula="of:=[$Build.C9]" office:value-type="float" office:value="2" calcext:value-type="float">
            <text:p>+2</text:p>
          </table:table-cell>
          <table:table-cell table:number-columns-repeated="2"/>
          <table:table-cell table:formula="of:=IFERROR(IFNA(COM.MICROSOFT.FILTER(['Utility Abilities By Art'.$C$2:.$C$61];['Utility Abilities By Art'.$B$2:.$B$61]=[.F8]);&quot;&quot;);&quot;&quot;)" office:value-type="string" office:string-value="Gambit Modifier" calcext:value-type="string">
            <text:p>Gambit Modifier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6" table:formula="of:=[$Build.A10]" office:value-type="string" office:string-value="Reasoning (REA)" calcext:value-type="string">
            <text:p>Reasoning (REA)</text:p>
          </table:table-cell>
          <table:table-cell table:style-name="ce138" table:formula="of:=[$Build.C10]" office:value-type="float" office:value="0" calcext:value-type="float">
            <text:p/>
          </table:table-cell>
          <table:table-cell table:number-columns-repeated="2"/>
          <table:table-cell table:formula="of:=IFERROR(IFNA(COM.MICROSOFT.FILTER(['Utility Abilities By Art'.$D$2:.$D$61];['Utility Abilities By Art'.$B$2:.$B$61]=[.F8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9">
          <table:table-cell table:style-name="Default"/>
          <table:table-cell table:style-name="ce6" table:formula="of:=[$Build.A11]" office:value-type="string" office:string-value="Focus (FOC)" calcext:value-type="string">
            <text:p>Focus (FOC)</text:p>
          </table:table-cell>
          <table:table-cell table:style-name="ce138" table:formula="of:=[$Build.C11]" office:value-type="float" office:value="0" calcext:value-type="float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table:style-name="Default" table:number-columns-repeated="3"/>
          <table:table-cell/>
          <table:table-cell office:value-type="float" office:value="2" calcext:value-type="float">
            <text:p>2</text:p>
          </table:table-cell>
          <table:table-cell table:style-name="ce199" table:formula="of:=IFNA(INDEX(COM.MICROSOFT.SORT([$Build.$A$37:.$C$51];3;-1);[.E13];1); &quot;&quot;)" office:value-type="string" office:string-value="Double or Nothing" calcext:value-type="string">
            <text:p>Double or Nothing</text:p>
          </table:table-cell>
          <table:table-cell table:style-name="ce178" table:formula="of:=IFERROR(IFNA(INDEX(COM.MICROSOFT.FILTER([$'Utility Abilities By Art'.$E$2:.$E$61];['Utility Abilities By Art'.$B$2:.$B$61]=[.F13]);1);&quot;&quot;);&quot;&quot;)" office:value-type="string" office:string-value="Circumstance: You fumble (but don't Critical Fumble) a Gambit that is not Costly&#10;Uses/Cooldown: 1/Episode&#10;Effect: Both your roll and the opposition roll are repeated,&#10;and the outcome is determined by the new rolls, however the Gambit&#10;is now both Costly and Risky and if it was Controlled it no longer is.&#10;If the Gambit was Powerful it still is." calcext:value-type="string" table:number-columns-spanned="4" table:number-rows-spanned="5">
            <text:p>Circumstance: You fumble (but don't Critical Fumble) a Gambit that is not Costly</text:p>
            <text:p>Uses/Cooldown: 1/Episode</text:p>
            <text:p>Effect: Both your roll and the opposition roll are repeated,</text:p>
            <text:p>and the outcome is determined by the new rolls, however the Gambit</text:p>
            <text:p>is now both Costly and Risky and if it was Controlled it no longer is.</text:p>
            <text:p>If the Gambit was Powerful it still is.</text:p>
          </table:table-cell>
          <table:covered-table-cell table:number-columns-repeated="3"/>
          <table:table-cell table:number-columns-repeated="6"/>
        </table:table-row>
        <table:table-row table:style-name="ro6">
          <table:table-cell table:style-name="Default"/>
          <table:table-cell table:style-name="ce10" office:value-type="string" calcext:value-type="string" table:number-columns-spanned="2" table:number-rows-spanned="1">
            <text:p>UTILITY ARTS</text:p>
          </table:table-cell>
          <table:covered-table-cell table:style-name="ce2"/>
          <table:table-cell table:number-columns-repeated="2"/>
          <table:table-cell table:formula="of:=IFERROR(IFNA(COM.MICROSOFT.FILTER(['Utility Abilities By Art'.$A$2:.$A$61];['Utility Abilities By Art'.$B$2:.$B$61]=[.F1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MODIFIER</text:p>
          </table:table-cell>
          <table:table-cell table:number-columns-repeated="2"/>
          <table:table-cell table:formula="of:=IFERROR(IFNA(COM.MICROSOFT.FILTER(['Utility Abilities By Art'.$C$2:.$C$61];['Utility Abilities By Art'.$B$2:.$B$61]=[.F13]);&quot;&quot;);&quot;&quot;)" office:value-type="string" office:string-value="Gambit Modifier" calcext:value-type="string">
            <text:p>Gambit Modifier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23]" office:value-type="string" office:string-value="Struction" calcext:value-type="string">
            <text:p>Struction</text:p>
          </table:table-cell>
          <table:table-cell table:style-name="ce81" table:formula="of:=[$Build.C23]" office:value-type="float" office:value="1" calcext:value-type="float">
            <text:p>+1</text:p>
          </table:table-cell>
          <table:table-cell table:number-columns-repeated="2"/>
          <table:table-cell table:formula="of:=IFERROR(IFNA(COM.MICROSOFT.FILTER(['Utility Abilities By Art'.$D$2:.$D$61];['Utility Abilities By Art'.$B$2:.$B$61]=[.F13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24]" office:value-type="string" office:string-value="Craft" calcext:value-type="string">
            <text:p>Craft</text:p>
          </table:table-cell>
          <table:table-cell table:style-name="ce81" table:formula="of:=[$Build.C24]" office:value-type="float" office:value="0" calcext:value-type="float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25]" office:value-type="string" office:string-value="Research" calcext:value-type="string">
            <text:p>Research</text:p>
          </table:table-cell>
          <table:table-cell table:style-name="ce81" table:formula="of:=[$Build.C25]" office:value-type="float" office:value="0" calcext:value-type="float">
            <text:p/>
          </table:table-cell>
          <table:table-cell/>
          <table:table-cell office:value-type="float" office:value="3" calcext:value-type="float">
            <text:p>3</text:p>
          </table:table-cell>
          <table:table-cell table:style-name="ce199" table:formula="of:=IFNA(INDEX(COM.MICROSOFT.SORT([$Build.$A$37:.$C$51];3;-1);[.E18];1); &quot;&quot;)" office:value-type="string" office:string-value="Push" calcext:value-type="string">
            <text:p>Push</text:p>
          </table:table-cell>
          <table:table-cell table:style-name="ce178" table:formula="of:=IFERROR(IFNA(INDEX(COM.MICROSOFT.FILTER([$'Utility Abilities By Art'.$E$2:.$E$61];['Utility Abilities By Art'.$B$2:.$B$61]=[.F18]);1);&quot;&quot;);&quot;&quot;)" office:value-type="string" office:string-value="Circumstance: You make any Gambit Roll&#10;Effort Cost: 1&#10;Effect: Gain +1 Boon on the roll" calcext:value-type="string" table:number-columns-spanned="4" table:number-rows-spanned="5">
            <text:p>Circumstance: You make any Gambit Roll</text:p>
            <text:p>Effort Cost: 1</text:p>
            <text:p>Effect: Gain +1 Boon on the roll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26]" office:value-type="string" office:string-value="Athletics" calcext:value-type="string">
            <text:p>Athletics</text:p>
          </table:table-cell>
          <table:table-cell table:style-name="ce81" table:formula="of:=[$Build.C26]" office:value-type="float" office:value="3" calcext:value-type="float">
            <text:p>+3</text:p>
          </table:table-cell>
          <table:table-cell table:number-columns-repeated="2"/>
          <table:table-cell table:formula="of:=IFERROR(IFNA(COM.MICROSOFT.FILTER(['Utility Abilities By Art'.$A$2:.$A$61];['Utility Abilities By Art'.$B$2:.$B$61]=[.F1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27]" office:value-type="string" office:string-value="Stealth" calcext:value-type="string">
            <text:p>Stealth</text:p>
          </table:table-cell>
          <table:table-cell table:style-name="ce81" table:formula="of:=[$Build.C27]" office:value-type="float" office:value="1" calcext:value-type="float">
            <text:p>+1</text:p>
          </table:table-cell>
          <table:table-cell table:number-columns-repeated="2"/>
          <table:table-cell table:formula="of:=IFERROR(IFNA(COM.MICROSOFT.FILTER(['Utility Abilities By Art'.$C$2:.$C$61];['Utility Abilities By Art'.$B$2:.$B$61]=[.F18]);&quot;&quot;);&quot;&quot;)" office:value-type="string" office:string-value="Gambit Modifier" calcext:value-type="string">
            <text:p>Gambit Modifier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28]" office:value-type="string" office:string-value="Problem Solving" calcext:value-type="string">
            <text:p>Problem Solving</text:p>
          </table:table-cell>
          <table:table-cell table:style-name="ce81" table:formula="of:=[$Build.C28]" office:value-type="float" office:value="1" calcext:value-type="float">
            <text:p>+1</text:p>
          </table:table-cell>
          <table:table-cell table:number-columns-repeated="2"/>
          <table:table-cell table:formula="of:=IFERROR(IFNA(COM.MICROSOFT.FILTER(['Utility Abilities By Art'.$D$2:.$D$61];['Utility Abilities By Art'.$B$2:.$B$61]=[.F18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29]" office:value-type="string" office:string-value="Leadership" calcext:value-type="string">
            <text:p>Leadership</text:p>
          </table:table-cell>
          <table:table-cell table:style-name="ce81" table:formula="of:=[$Build.C29]" office:value-type="float" office:value="1" calcext:value-type="float">
            <text:p>+1</text:p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30]" office:value-type="string" office:string-value="Influence" calcext:value-type="string">
            <text:p>Influence</text:p>
          </table:table-cell>
          <table:table-cell table:style-name="ce81" table:formula="of:=[$Build.C30]" office:value-type="float" office:value="0" calcext:value-type="float">
            <text:p/>
          </table:table-cell>
          <table:table-cell/>
          <table:table-cell office:value-type="float" office:value="4" calcext:value-type="float">
            <text:p>4</text:p>
          </table:table-cell>
          <table:table-cell table:style-name="ce199" table:formula="of:=IFNA(INDEX(COM.MICROSOFT.SORT([$Build.$A$37:.$C$51];3;-1);[.E23];1); &quot;&quot;)" office:value-type="string" office:string-value="Help" calcext:value-type="string">
            <text:p>Help</text:p>
          </table:table-cell>
          <table:table-cell table:style-name="ce178" table:formula="of:=IFERROR(IFNA(INDEX(COM.MICROSOFT.FILTER([$'Utility Abilities By Art'.$E$2:.$E$61];['Utility Abilities By Art'.$B$2:.$B$61]=[.F23]);1);&quot;&quot;);&quot;&quot;)" office:value-type="string" office:string-value="Circumstance: An ally makes any Gambit Roll&#10;Effort Cost: 1&#10;Effect: Grant +1 Boon on the roll" calcext:value-type="string" table:number-columns-spanned="4" table:number-rows-spanned="5">
            <text:p>Circumstance: An ally makes any Gambit Roll</text:p>
            <text:p>Effort Cost: 1</text:p>
            <text:p>Effect: Grant +1 Boon on the roll</text:p>
          </table:table-cell>
          <table:covered-table-cell table:number-columns-repeated="3"/>
          <table:table-cell table:number-columns-repeated="6"/>
        </table:table-row>
        <table:table-row table:style-name="ro10">
          <table:table-cell table:style-name="Default"/>
          <table:table-cell table:style-name="ce117" table:formula="of:=[$Build.A31]" office:value-type="string" office:string-value="Reconnaissance" calcext:value-type="string">
            <text:p>Reconnaissance</text:p>
          </table:table-cell>
          <table:table-cell table:style-name="ce81" table:formula="of:=[$Build.C31]" office:value-type="float" office:value="0" calcext:value-type="float">
            <text:p/>
          </table:table-cell>
          <table:table-cell table:number-columns-repeated="2"/>
          <table:table-cell table:formula="of:=IFERROR(IFNA(COM.MICROSOFT.FILTER(['Utility Abilities By Art'.$A$2:.$A$61];['Utility Abilities By Art'.$B$2:.$B$61]=[.F2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 table:number-columns-repeated="3"/>
          <table:table-cell table:number-columns-repeated="2"/>
          <table:table-cell table:formula="of:=IFERROR(IFNA(COM.MICROSOFT.FILTER(['Utility Abilities By Art'.$C$2:.$C$61];['Utility Abilities By Art'.$B$2:.$B$61]=[.F23]);&quot;&quot;);&quot;&quot;)" office:value-type="string" office:string-value="Gambit Modifier" calcext:value-type="string">
            <text:p>Gambit Modifier</text:p>
          </table:table-cell>
          <table:covered-table-cell table:number-columns-repeated="4"/>
          <table:table-cell table:number-columns-repeated="6"/>
        </table:table-row>
        <table:table-row table:style-name="ro6">
          <table:table-cell table:style-name="Default"/>
          <table:table-cell table:style-name="ce10" office:value-type="string" calcext:value-type="string" table:number-columns-spanned="2" table:number-rows-spanned="1">
            <text:p>GAMBIT MODIFIER ABILITIES</text:p>
          </table:table-cell>
          <table:covered-table-cell table:style-name="ce191"/>
          <table:table-cell table:number-columns-repeated="2"/>
          <table:table-cell table:formula="of:=IFERROR(IFNA(COM.MICROSOFT.FILTER(['Utility Abilities By Art'.$D$2:.$D$61];['Utility Abilities By Art'.$B$2:.$B$61]=[.F23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87" office:value-type="string" calcext:value-type="string" table:number-columns-spanned="2" table:number-rows-spanned="1">
            <text:p>REACTIVE</text:p>
          </table:table-cell>
          <table:covered-table-cell table:style-name="ce192"/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9" table:formula="of:=IFNA(INDEX(COM.MICROSOFT.SORT([$Build.$A$37:.$C$51];3;-1);[.E28];1); &quot;&quot;)" office:value-type="string" office:string-value="I Am No One" calcext:value-type="string">
            <text:p>I Am No One</text:p>
          </table:table-cell>
          <table:table-cell table:style-name="ce178" table:formula="of:=IFERROR(IFNA(INDEX(COM.MICROSOFT.FILTER([$'Utility Abilities By Art'.$E$2:.$E$61];['Utility Abilities By Art'.$B$2:.$B$61]=[.F28]);1);&quot;&quot;);&quot;&quot;)" office:value-type="string" office:string-value="Effect: You have +1 Boon on Stealth Gambits you make in any scene&#10;where the party is outnumbered by nonhostile NPCs" calcext:value-type="string" table:number-columns-spanned="4" table:number-rows-spanned="5">
            <text:p>Effect: You have +1 Boon on Stealth Gambits you make in any scene</text:p>
            <text:p>where the party is outnumbered by nonhostile NPCs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IFERROR(IFNA(INDEX(COM.MICROSOFT.FILTER([Build.$A$37:.$A$51]; [Build.$C$37:.$C$51]=&quot;Reactive&quot;);[.A28]);&quot;&quot;);&quot;&quot;)" office:value-type="string" office:string-value="Intercede" calcext:value-type="string">
            <text:p>Intercede</text:p>
          </table:table-cell>
          <table:table-cell table:formula="of:=IFERROR(IFNA(INDEX(COM.MICROSOFT.FILTER([Build.$B$37:.$B$51];[Build.$C$37:.$C$51]=&quot;Reactive&quot;); [.A28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Utility Abilities By Art'.$A$2:.$A$61];['Utility Abilities By Art'.$B$2:.$B$61]=[.F28]);&quot;&quot;);&quot;&quot;)" office:value-type="string" office:string-value="Stealth" calcext:value-type="string">
            <text:p>Stealth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IFERROR(IFNA(INDEX(COM.MICROSOFT.FILTER([Build.$A$37:.$A$51]; [Build.$C$37:.$C$51]=&quot;Reactive&quot;);[.A29]);&quot;&quot;);&quot;&quot;)" office:value-type="string" office:string-value="Double or Nothing" calcext:value-type="string">
            <text:p>Double or Nothing</text:p>
          </table:table-cell>
          <table:table-cell table:formula="of:=IFERROR(IFNA(INDEX(COM.MICROSOFT.FILTER([Build.$B$37:.$B$51];[Build.$C$37:.$C$51]=&quot;Reactive&quot;); [.A29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Utility Abilities By Art'.$C$2:.$C$61];['Utility Abilities By Art'.$B$2:.$B$61]=[.F28]);&quot;&quot;);&quot;&quot;)" office:value-type="string" office:string-value="Passive" calcext:value-type="string">
            <text:p>Passiv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IFERROR(IFNA(INDEX(COM.MICROSOFT.FILTER([Build.$A$37:.$A$51]; [Build.$C$37:.$C$51]=&quot;Reactive&quot;);[.A30]);&quot;&quot;);&quot;&quot;)">
            <text:p/>
          </table:table-cell>
          <table:table-cell table:formula="of:=IFERROR(IFNA(INDEX(COM.MICROSOFT.FILTER([Build.$B$37:.$B$51];[Build.$C$37:.$C$51]=&quot;Reactive&quot;); [.A30]);&quot;&quot;);&quot;&quot;)">
            <text:p/>
          </table:table-cell>
          <table:table-cell table:number-columns-repeated="2"/>
          <table:table-cell table:formula="of:=IFERROR(IFNA(COM.MICROSOFT.FILTER(['Utility Abilities By Art'.$D$2:.$D$61];['Utility Abilities By Art'.$B$2:.$B$61]=[.F28]);&quot;&quot;);&quot;&quot;)" office:value-type="float" office:value="0" calcext:value-type="float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IFERROR(IFNA(INDEX(COM.MICROSOFT.FILTER([Build.$A$37:.$A$51]; [Build.$C$37:.$C$51]=&quot;Reactive&quot;);[.A31]);&quot;&quot;);&quot;&quot;)">
            <text:p/>
          </table:table-cell>
          <table:table-cell table:formula="of:=IFERROR(IFNA(INDEX(COM.MICROSOFT.FILTER([Build.$B$37:.$B$51];[Build.$C$37:.$C$51]=&quot;Reactive&quot;); [.A31]);&quot;&quot;);&quot;&quot;)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IFERROR(IFNA(INDEX(COM.MICROSOFT.FILTER([Build.$A$37:.$A$51]; [Build.$C$37:.$C$51]=&quot;Reactive&quot;);[.A32]);&quot;&quot;);&quot;&quot;)">
            <text:p/>
          </table:table-cell>
          <table:table-cell table:formula="of:=IFERROR(IFNA(INDEX(COM.MICROSOFT.FILTER([Build.$B$37:.$B$51];[Build.$C$37:.$C$51]=&quot;Reactive&quot;); [.A32]);&quot;&quot;);&quot;&quot;)">
            <text:p/>
          </table:table-cell>
          <table:table-cell/>
          <table:table-cell office:value-type="float" office:value="6" calcext:value-type="float">
            <text:p>6</text:p>
          </table:table-cell>
          <table:table-cell table:style-name="ce199" table:formula="of:=IFNA(INDEX(COM.MICROSOFT.SORT([$Build.$A$37:.$C$51];3;-1);[.E33];1); &quot;&quot;)" office:value-type="string" office:string-value="Eagle-Eye" calcext:value-type="string">
            <text:p>Eagle-Eye</text:p>
          </table:table-cell>
          <table:table-cell table:style-name="ce178" table:formula="of:=IFERROR(IFNA(INDEX(COM.MICROSOFT.FILTER([$'Utility Abilities By Art'.$E$2:.$E$61];['Utility Abilities By Art'.$B$2:.$B$61]=[.F33]);1);&quot;&quot;);&quot;&quot;)" office:value-type="string" office:string-value="Effect: Whenever you are outdoors and you make a Reconnassaince Gambit&#10;to observe something in the distance, choose one of the following:\n&#10;* The Opposition is treated as if you were half the distance away&#10;* It becomes Powerful" calcext:value-type="string" table:number-columns-spanned="4" table:number-rows-spanned="5">
            <text:p>Effect: Whenever you are outdoors and you make a Reconnassaince Gambit</text:p>
            <text:p>to observe something in the distance, choose one of the following:\n</text:p>
            <text:p>* The Opposition is treated as if you were half the distance away</text:p>
            <text:p>* It becomes Powerful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IFERROR(IFNA(INDEX(COM.MICROSOFT.FILTER([Build.$A$37:.$A$51]; [Build.$C$37:.$C$51]=&quot;Reactive&quot;);[.A33]);&quot;&quot;);&quot;&quot;)">
            <text:p/>
          </table:table-cell>
          <table:table-cell table:formula="of:=IFERROR(IFNA(INDEX(COM.MICROSOFT.FILTER([Build.$B$37:.$B$51];[Build.$C$37:.$C$51]=&quot;Reactive&quot;); [.A33]);&quot;&quot;);&quot;&quot;)">
            <text:p/>
          </table:table-cell>
          <table:table-cell table:number-columns-repeated="2"/>
          <table:table-cell table:formula="of:=IFERROR(IFNA(COM.MICROSOFT.FILTER(['Utility Abilities By Art'.$A$2:.$A$61];['Utility Abilities By Art'.$B$2:.$B$61]=[.F33]);&quot;&quot;);&quot;&quot;)" office:value-type="string" office:string-value="Reconnaissance" calcext:value-type="string">
            <text:p>Reconnaissanc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IFERROR(IFNA(INDEX(COM.MICROSOFT.FILTER([Build.$A$37:.$A$51]; [Build.$C$37:.$C$51]=&quot;Reactive&quot;);[.A34]);&quot;&quot;);&quot;&quot;)">
            <text:p/>
          </table:table-cell>
          <table:table-cell table:formula="of:=IFERROR(IFNA(INDEX(COM.MICROSOFT.FILTER([Build.$B$37:.$B$51];[Build.$C$37:.$C$51]=&quot;Reactive&quot;); [.A34]);&quot;&quot;);&quot;&quot;)">
            <text:p/>
          </table:table-cell>
          <table:table-cell table:number-columns-repeated="2"/>
          <table:table-cell table:formula="of:=IFERROR(IFNA(COM.MICROSOFT.FILTER(['Utility Abilities By Art'.$C$2:.$C$61];['Utility Abilities By Art'.$B$2:.$B$61]=[.F33]);&quot;&quot;);&quot;&quot;)" office:value-type="string" office:string-value="Passive" calcext:value-type="string">
            <text:p>Passiv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IFERROR(IFNA(INDEX(COM.MICROSOFT.FILTER([Build.$A$37:.$A$51]; [Build.$C$37:.$C$51]=&quot;Reactive&quot;);[.A35]);&quot;&quot;);&quot;&quot;)">
            <text:p/>
          </table:table-cell>
          <table:table-cell table:formula="of:=IFERROR(IFNA(INDEX(COM.MICROSOFT.FILTER([Build.$B$37:.$B$51];[Build.$C$37:.$C$51]=&quot;Reactive&quot;); [.A35]);&quot;&quot;);&quot;&quot;)">
            <text:p/>
          </table:table-cell>
          <table:table-cell table:number-columns-repeated="2"/>
          <table:table-cell table:formula="of:=IFERROR(IFNA(COM.MICROSOFT.FILTER(['Utility Abilities By Art'.$D$2:.$D$61];['Utility Abilities By Art'.$B$2:.$B$61]=[.F33]);&quot;&quot;);&quot;&quot;)" office:value-type="float" office:value="0" calcext:value-type="float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IFERROR(IFNA(INDEX(COM.MICROSOFT.FILTER([Build.$A$37:.$A$51]; [Build.$C$37:.$C$51]=&quot;Reactive&quot;);[.A36]);&quot;&quot;);&quot;&quot;)">
            <text:p/>
          </table:table-cell>
          <table:table-cell table:formula="of:=IFERROR(IFNA(INDEX(COM.MICROSOFT.FILTER([Build.$B$37:.$B$51];[Build.$C$37:.$C$51]=&quot;Reactive&quot;); [.A36]);&quot;&quot;);&quot;&quot;)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IFERROR(IFNA(INDEX(COM.MICROSOFT.FILTER([Build.$A$37:.$A$51]; [Build.$C$37:.$C$51]=&quot;Reactive&quot;);[.A37]);&quot;&quot;);&quot;&quot;)">
            <text:p/>
          </table:table-cell>
          <table:table-cell table:formula="of:=IFERROR(IFNA(INDEX(COM.MICROSOFT.FILTER([Build.$B$37:.$B$51];[Build.$C$37:.$C$51]=&quot;Reactive&quot;); [.A37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199" table:formula="of:=IFNA(INDEX(COM.MICROSOFT.SORT([$Build.$A$37:.$C$51];3;-1);[.E38];1); &quot;&quot;)" office:value-type="string" office:string-value="Prodigious Leap" calcext:value-type="string">
            <text:p>Prodigious Leap</text:p>
          </table:table-cell>
          <table:table-cell table:style-name="ce178" table:formula="of:=IFERROR(IFNA(INDEX(COM.MICROSOFT.FILTER([$'Utility Abilities By Art'.$E$2:.$E$61];['Utility Abilities By Art'.$B$2:.$B$61]=[.F38]);1);&quot;&quot;);&quot;&quot;)" office:value-type="string" office:string-value="Circumstance: You make an Athletics Gambit to achieve a difficult jump, &#10;up to twice as far as a typical person could reliably achieve&#10;Effort Cost: 1&#10;Effect: You automatically succeed" calcext:value-type="string" table:number-columns-spanned="4" table:number-rows-spanned="5">
            <text:p>Circumstance: You make an Athletics Gambit to achieve a difficult jump, </text:p>
            <text:p>up to twice as far as a typical person could reliably achieve</text:p>
            <text:p>Effort Cost: 1</text:p>
            <text:p>Effect: You automatically succeed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table:style-name="Default"/>
          <table:table-cell table:formula="of:=IFERROR(IFNA(INDEX(COM.MICROSOFT.FILTER([Build.$A$37:.$A$51]; [Build.$C$37:.$C$51]=&quot;Reactive&quot;);[.A38]);&quot;&quot;);&quot;&quot;)">
            <text:p/>
          </table:table-cell>
          <table:table-cell table:formula="of:=IFERROR(IFNA(INDEX(COM.MICROSOFT.FILTER([Build.$B$37:.$B$51];[Build.$C$37:.$C$51]=&quot;Reactive&quot;); [.A38]);&quot;&quot;);&quot;&quot;)">
            <text:p/>
          </table:table-cell>
          <table:table-cell table:number-columns-repeated="2"/>
          <table:table-cell table:formula="of:=IFERROR(IFNA(COM.MICROSOFT.FILTER(['Utility Abilities By Art'.$A$2:.$A$61];['Utility Abilities By Art'.$B$2:.$B$61]=[.F38]);&quot;&quot;);&quot;&quot;)" office:value-type="string" office:string-value="Athletics" calcext:value-type="string">
            <text:p>Athletics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87" office:value-type="string" calcext:value-type="string" table:number-columns-spanned="2" table:number-rows-spanned="1">
            <text:p>PROACTIVE</text:p>
          </table:table-cell>
          <table:covered-table-cell table:style-name="ce192"/>
          <table:table-cell table:number-columns-repeated="2"/>
          <table:table-cell table:formula="of:=IFERROR(IFNA(COM.MICROSOFT.FILTER(['Utility Abilities By Art'.$C$2:.$C$61];['Utility Abilities By Art'.$B$2:.$B$61]=[.F38]);&quot;&quot;);&quot;&quot;)" office:value-type="string" office:string-value="Gambit Modifier" calcext:value-type="string">
            <text:p>Gambit Modifier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87" office:value-type="string" calcext:value-type="string">
            <text:p>Art</text:p>
          </table:table-cell>
          <table:table-cell table:number-columns-repeated="2"/>
          <table:table-cell table:formula="of:=IFERROR(IFNA(COM.MICROSOFT.FILTER(['Utility Abilities By Art'.$D$2:.$D$61];['Utility Abilities By Art'.$B$2:.$B$61]=[.F38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IFERROR(IFNA(INDEX(COM.MICROSOFT.FILTER([Build.$A$37:.$A$51]; [Build.$C$37:.$C$51]=&quot;Proactive&quot;);[.A41]);&quot;&quot;);&quot;&quot;)" office:value-type="string" office:string-value="Push" calcext:value-type="string">
            <text:p>Push</text:p>
          </table:table-cell>
          <table:table-cell table:formula="of:=IFERROR(IFNA(INDEX(COM.MICROSOFT.FILTER([Build.$B$37:.$B$51];[Build.$C$37:.$C$51]=&quot;Proactive&quot;); [.A41]);&quot;&quot;);&quot;&quot;)" office:value-type="string" office:string-value="Basic" calcext:value-type="string">
            <text:p>Basic</text:p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IFERROR(IFNA(INDEX(COM.MICROSOFT.FILTER([Build.$A$37:.$A$51]; [Build.$C$37:.$C$51]=&quot;Proactive&quot;);[.A42]);&quot;&quot;);&quot;&quot;)" office:value-type="string" office:string-value="Help" calcext:value-type="string">
            <text:p>Help</text:p>
          </table:table-cell>
          <table:table-cell table:formula="of:=IFERROR(IFNA(INDEX(COM.MICROSOFT.FILTER([Build.$B$37:.$B$51];[Build.$C$37:.$C$51]=&quot;Proactive&quot;); [.A42]);&quot;&quot;);&quot;&quot;)" office:value-type="string" office:string-value="Basic" calcext:value-type="string">
            <text:p>Basic</text:p>
          </table:table-cell>
          <table:table-cell/>
          <table:table-cell office:value-type="float" office:value="8" calcext:value-type="float">
            <text:p>8</text:p>
          </table:table-cell>
          <table:table-cell table:style-name="ce199" table:formula="of:=IFNA(INDEX(COM.MICROSOFT.SORT([$Build.$A$37:.$C$51];3;-1);[.E43];1); &quot;&quot;)" office:value-type="string" office:string-value="Practice" calcext:value-type="string">
            <text:p>Practice</text:p>
          </table:table-cell>
          <table:table-cell table:style-name="ce178" table:formula="of:=IFERROR(IFNA(INDEX(COM.MICROSOFT.FILTER([$'Utility Abilities By Art'.$E$2:.$E$61];['Utility Abilities By Art'.$B$2:.$B$61]=[.F43]);1);&quot;&quot;);&quot;&quot;)" office:value-type="string" office:string-value="Succeed: Choose one Utility Art. You have +1 Boon&#10;on all Gambit rolls using that art while this buff is active." calcext:value-type="string" table:number-columns-spanned="4" table:number-rows-spanned="5">
            <text:p>Succeed: Choose one Utility Art. You have +1 Boon</text:p>
            <text:p>on all Gambit rolls using that art while this buff is active.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IFERROR(IFNA(INDEX(COM.MICROSOFT.FILTER([Build.$A$37:.$A$51]; [Build.$C$37:.$C$51]=&quot;Proactive&quot;);[.A43]);&quot;&quot;);&quot;&quot;)">
            <text:p/>
          </table:table-cell>
          <table:table-cell table:formula="of:=IFERROR(IFNA(INDEX(COM.MICROSOFT.FILTER([Build.$B$37:.$B$51];[Build.$C$37:.$C$51]=&quot;Proactive&quot;); [.A43]);&quot;&quot;);&quot;&quot;)">
            <text:p/>
          </table:table-cell>
          <table:table-cell table:number-columns-repeated="2"/>
          <table:table-cell table:formula="of:=IFERROR(IFNA(COM.MICROSOFT.FILTER(['Utility Abilities By Art'.$A$2:.$A$61];['Utility Abilities By Art'.$B$2:.$B$61]=[.F4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IFERROR(IFNA(INDEX(COM.MICROSOFT.FILTER([Build.$A$37:.$A$51]; [Build.$C$37:.$C$51]=&quot;Proactive&quot;);[.A44]);&quot;&quot;);&quot;&quot;)">
            <text:p/>
          </table:table-cell>
          <table:table-cell table:formula="of:=IFERROR(IFNA(INDEX(COM.MICROSOFT.FILTER([Build.$B$37:.$B$51];[Build.$C$37:.$C$51]=&quot;Proactive&quot;); [.A44]);&quot;&quot;);&quot;&quot;)">
            <text:p/>
          </table:table-cell>
          <table:table-cell table:number-columns-repeated="2"/>
          <table:table-cell table:formula="of:=IFERROR(IFNA(COM.MICROSOFT.FILTER(['Utility Abilities By Art'.$C$2:.$C$61];['Utility Abilities By Art'.$B$2:.$B$61]=[.F43]);&quot;&quot;);&quot;&quot;)" office:value-type="string" office:string-value="Downtime Activity" calcext:value-type="string">
            <text:p>Downtime Activity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IFERROR(IFNA(INDEX(COM.MICROSOFT.FILTER([Build.$A$37:.$A$51]; [Build.$C$37:.$C$51]=&quot;Proactive&quot;);[.A45]);&quot;&quot;);&quot;&quot;)">
            <text:p/>
          </table:table-cell>
          <table:table-cell table:formula="of:=IFERROR(IFNA(INDEX(COM.MICROSOFT.FILTER([Build.$B$37:.$B$51];[Build.$C$37:.$C$51]=&quot;Proactive&quot;); [.A45]);&quot;&quot;);&quot;&quot;)">
            <text:p/>
          </table:table-cell>
          <table:table-cell table:number-columns-repeated="2"/>
          <table:table-cell table:formula="of:=IFERROR(IFNA(COM.MICROSOFT.FILTER(['Utility Abilities By Art'.$D$2:.$D$61];['Utility Abilities By Art'.$B$2:.$B$61]=[.F43]);&quot;&quot;);&quot;&quot;)" office:value-type="string" office:string-value="Buff" calcext:value-type="string">
            <text:p>Buff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IFERROR(IFNA(INDEX(COM.MICROSOFT.FILTER([Build.$A$37:.$A$51]; [Build.$C$37:.$C$51]=&quot;Proactive&quot;);[.A46]);&quot;&quot;);&quot;&quot;)">
            <text:p/>
          </table:table-cell>
          <table:table-cell table:formula="of:=IFERROR(IFNA(INDEX(COM.MICROSOFT.FILTER([Build.$B$37:.$B$51];[Build.$C$37:.$C$51]=&quot;Proactive&quot;); [.A46]);&quot;&quot;);&quot;&quot;)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IFERROR(IFNA(INDEX(COM.MICROSOFT.FILTER([Build.$A$37:.$A$51]; [Build.$C$37:.$C$51]=&quot;Proactive&quot;);[.A47]);&quot;&quot;);&quot;&quot;)">
            <text:p/>
          </table:table-cell>
          <table:table-cell table:formula="of:=IFERROR(IFNA(INDEX(COM.MICROSOFT.FILTER([Build.$B$37:.$B$51];[Build.$C$37:.$C$51]=&quot;Proactive&quot;); [.A47]);&quot;&quot;);&quot;&quot;)">
            <text:p/>
          </table:table-cell>
          <table:table-cell/>
          <table:table-cell office:value-type="float" office:value="9" calcext:value-type="float">
            <text:p>9</text:p>
          </table:table-cell>
          <table:table-cell table:style-name="ce199" table:formula="of:=IFNA(INDEX(COM.MICROSOFT.SORT([$Build.$A$37:.$C$51];3;-1);[.E48];1); &quot;&quot;)" office:value-type="string" office:string-value="Meditate" calcext:value-type="string">
            <text:p>Meditate</text:p>
          </table:table-cell>
          <table:table-cell table:style-name="ce178" table:formula="of:=IFERROR(IFNA(INDEX(COM.MICROSOFT.FILTER([$'Utility Abilities By Art'.$E$2:.$E$61];['Utility Abilities By Art'.$B$2:.$B$61]=[.F48]);1);&quot;&quot;);&quot;&quot;)" office:value-type="string" office:string-value="Succeed: While this Buff is active, you may use the Push or Help modifier&#10;without expending effort. If you do, end this buff." calcext:value-type="string" table:number-columns-spanned="4" table:number-rows-spanned="5">
            <text:p>Succeed: While this Buff is active, you may use the Push or Help modifier</text:p>
            <text:p>without expending effort. If you do, end this buff.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IFERROR(IFNA(INDEX(COM.MICROSOFT.FILTER([Build.$A$37:.$A$51]; [Build.$C$37:.$C$51]=&quot;Proactive&quot;);[.A48]);&quot;&quot;);&quot;&quot;)">
            <text:p/>
          </table:table-cell>
          <table:table-cell table:formula="of:=IFERROR(IFNA(INDEX(COM.MICROSOFT.FILTER([Build.$B$37:.$B$51];[Build.$C$37:.$C$51]=&quot;Proactive&quot;); [.A48]);&quot;&quot;);&quot;&quot;)">
            <text:p/>
          </table:table-cell>
          <table:table-cell table:number-columns-repeated="2"/>
          <table:table-cell table:formula="of:=IFERROR(IFNA(COM.MICROSOFT.FILTER(['Utility Abilities By Art'.$A$2:.$A$61];['Utility Abilities By Art'.$B$2:.$B$61]=[.F4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IFERROR(IFNA(INDEX(COM.MICROSOFT.FILTER([Build.$A$37:.$A$51]; [Build.$C$37:.$C$51]=&quot;Proactive&quot;);[.A49]);&quot;&quot;);&quot;&quot;)">
            <text:p/>
          </table:table-cell>
          <table:table-cell table:formula="of:=IFERROR(IFNA(INDEX(COM.MICROSOFT.FILTER([Build.$B$37:.$B$51];[Build.$C$37:.$C$51]=&quot;Proactive&quot;); [.A49]);&quot;&quot;);&quot;&quot;)">
            <text:p/>
          </table:table-cell>
          <table:table-cell table:number-columns-repeated="2"/>
          <table:table-cell table:formula="of:=IFERROR(IFNA(COM.MICROSOFT.FILTER(['Utility Abilities By Art'.$C$2:.$C$61];['Utility Abilities By Art'.$B$2:.$B$61]=[.F48]);&quot;&quot;);&quot;&quot;)" office:value-type="string" office:string-value="Downtime Activity" calcext:value-type="string">
            <text:p>Downtime Activity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IFERROR(IFNA(INDEX(COM.MICROSOFT.FILTER([Build.$A$37:.$A$51]; [Build.$C$37:.$C$51]=&quot;Proactive&quot;);[.A50]);&quot;&quot;);&quot;&quot;)">
            <text:p/>
          </table:table-cell>
          <table:table-cell table:formula="of:=IFERROR(IFNA(INDEX(COM.MICROSOFT.FILTER([Build.$B$37:.$B$51];[Build.$C$37:.$C$51]=&quot;Proactive&quot;); [.A50]);&quot;&quot;);&quot;&quot;)">
            <text:p/>
          </table:table-cell>
          <table:table-cell table:number-columns-repeated="2"/>
          <table:table-cell table:formula="of:=IFERROR(IFNA(COM.MICROSOFT.FILTER(['Utility Abilities By Art'.$D$2:.$D$61];['Utility Abilities By Art'.$B$2:.$B$61]=[.F48]);&quot;&quot;);&quot;&quot;)" office:value-type="string" office:string-value="Buff" calcext:value-type="string">
            <text:p>Buff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formula="of:=IFERROR(IFNA(INDEX(COM.MICROSOFT.FILTER([Build.$A$37:.$A$51]; [Build.$C$37:.$C$51]=&quot;Proactive&quot;);[.A51]);&quot;&quot;);&quot;&quot;)">
            <text:p/>
          </table:table-cell>
          <table:table-cell table:formula="of:=IFERROR(IFNA(INDEX(COM.MICROSOFT.FILTER([Build.$B$37:.$B$51];[Build.$C$37:.$C$51]=&quot;Proactive&quot;); [.A51]);&quot;&quot;);&quot;&quot;)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6">
          <table:table-cell table:style-name="Default"/>
          <table:table-cell table:style-name="ce10" office:value-type="string" calcext:value-type="string" table:number-columns-spanned="2" table:number-rows-spanned="1">
            <text:p>PASSIVE ABILITIES</text:p>
          </table:table-cell>
          <table:covered-table-cell table:style-name="ce2"/>
          <table:table-cell/>
          <table:table-cell office:value-type="float" office:value="10" calcext:value-type="float">
            <text:p>10</text:p>
          </table:table-cell>
          <table:table-cell table:style-name="ce199" table:formula="of:=IFNA(INDEX(COM.MICROSOFT.SORT([$Build.$A$37:.$C$51];3;-1);[.E53];1); &quot;&quot;)">
            <text:p/>
          </table:table-cell>
          <table:table-cell table:style-name="ce178" table:formula="of:=IFERROR(IFNA(INDEX(COM.MICROSOFT.FILTER([$'Utility Abilities By Art'.$E$2:.$E$61];['Utility Abilities By Art'.$B$2:.$B$61]=[.F5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formula="of:=IFERROR(IFNA(COM.MICROSOFT.FILTER(['Utility Abilities By Art'.$A$2:.$A$61];['Utility Abilities By Art'.$B$2:.$B$61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IFERROR(IFNA(INDEX(COM.MICROSOFT.FILTER([Build.$A$37:.$A$51]; [Build.$C$37:.$C$51]=&quot;Passive&quot;);[.A54]);&quot;&quot;);&quot;&quot;)" office:value-type="string" office:string-value="I Am No One" calcext:value-type="string">
            <text:p>I Am No One</text:p>
          </table:table-cell>
          <table:table-cell table:formula="of:=IFERROR(IFNA(INDEX(COM.MICROSOFT.FILTER([Build.$B$37:.$B$51];[Build.$C$37:.$C$51]=&quot;Passive&quot;); [.A54]);&quot;&quot;);&quot;&quot;)" office:value-type="string" office:string-value="Stealth" calcext:value-type="string">
            <text:p>Stealth</text:p>
          </table:table-cell>
          <table:table-cell table:number-columns-repeated="2"/>
          <table:table-cell table:formula="of:=IFERROR(IFNA(COM.MICROSOFT.FILTER(['Utility Abilities By Art'.$C$2:.$C$61];['Utility Abilities By Art'.$B$2:.$B$61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IFERROR(IFNA(INDEX(COM.MICROSOFT.FILTER([Build.$A$37:.$A$51]; [Build.$C$37:.$C$51]=&quot;Passive&quot;);[.A55]);&quot;&quot;);&quot;&quot;)" office:value-type="string" office:string-value="Eagle-Eye" calcext:value-type="string">
            <text:p>Eagle-Eye</text:p>
          </table:table-cell>
          <table:table-cell table:formula="of:=IFERROR(IFNA(INDEX(COM.MICROSOFT.FILTER([Build.$B$37:.$B$51];[Build.$C$37:.$C$51]=&quot;Passive&quot;); [.A55]);&quot;&quot;);&quot;&quot;)" office:value-type="string" office:string-value="Reconnaissance" calcext:value-type="string">
            <text:p>Reconnaissance</text:p>
          </table:table-cell>
          <table:table-cell table:number-columns-repeated="2"/>
          <table:table-cell table:formula="of:=IFERROR(IFNA(COM.MICROSOFT.FILTER(['Utility Abilities By Art'.$D$2:.$D$61];['Utility Abilities By Art'.$B$2:.$B$61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IFERROR(IFNA(INDEX(COM.MICROSOFT.FILTER([Build.$A$37:.$A$51]; [Build.$C$37:.$C$51]=&quot;Passive&quot;);[.A56]);&quot;&quot;);&quot;&quot;)">
            <text:p/>
          </table:table-cell>
          <table:table-cell table:formula="of:=IFERROR(IFNA(INDEX(COM.MICROSOFT.FILTER([Build.$B$37:.$B$51];[Build.$C$37:.$C$51]=&quot;Passive&quot;); [.A56]);&quot;&quot;);&quot;&quot;)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IFERROR(IFNA(INDEX(COM.MICROSOFT.FILTER([Build.$A$37:.$A$51]; [Build.$C$37:.$C$51]=&quot;Passive&quot;);[.A57]);&quot;&quot;);&quot;&quot;)">
            <text:p/>
          </table:table-cell>
          <table:table-cell table:formula="of:=IFERROR(IFNA(INDEX(COM.MICROSOFT.FILTER([Build.$B$37:.$B$51];[Build.$C$37:.$C$51]=&quot;Passive&quot;); [.A57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199" table:formula="of:=IFNA(INDEX(COM.MICROSOFT.SORT([$Build.$A$37:.$C$51];3;-1);[.E58];1); &quot;&quot;)">
            <text:p/>
          </table:table-cell>
          <table:table-cell table:style-name="ce178" table:formula="of:=IFERROR(IFNA(INDEX(COM.MICROSOFT.FILTER([$'Utility Abilities By Art'.$E$2:.$E$61];['Utility Abilities By Art'.$B$2:.$B$61]=[.F5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IFERROR(IFNA(INDEX(COM.MICROSOFT.FILTER([Build.$A$37:.$A$51]; [Build.$C$37:.$C$51]=&quot;Passive&quot;);[.A58]);&quot;&quot;);&quot;&quot;)">
            <text:p/>
          </table:table-cell>
          <table:table-cell table:formula="of:=IFERROR(IFNA(INDEX(COM.MICROSOFT.FILTER([Build.$B$37:.$B$51];[Build.$C$37:.$C$51]=&quot;Passive&quot;); [.A58]);&quot;&quot;);&quot;&quot;)">
            <text:p/>
          </table:table-cell>
          <table:table-cell table:number-columns-repeated="2"/>
          <table:table-cell table:formula="of:=IFERROR(IFNA(COM.MICROSOFT.FILTER(['Utility Abilities By Art'.$A$2:.$A$61];['Utility Abilities By Art'.$B$2:.$B$61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IFERROR(IFNA(INDEX(COM.MICROSOFT.FILTER([Build.$A$37:.$A$51]; [Build.$C$37:.$C$51]=&quot;Passive&quot;);[.A59]);&quot;&quot;);&quot;&quot;)">
            <text:p/>
          </table:table-cell>
          <table:table-cell table:formula="of:=IFERROR(IFNA(INDEX(COM.MICROSOFT.FILTER([Build.$B$37:.$B$51];[Build.$C$37:.$C$51]=&quot;Passive&quot;); [.A59]);&quot;&quot;);&quot;&quot;)">
            <text:p/>
          </table:table-cell>
          <table:table-cell table:number-columns-repeated="2"/>
          <table:table-cell table:formula="of:=IFERROR(IFNA(COM.MICROSOFT.FILTER(['Utility Abilities By Art'.$C$2:.$C$61];['Utility Abilities By Art'.$B$2:.$B$61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IFERROR(IFNA(INDEX(COM.MICROSOFT.FILTER([Build.$A$37:.$A$51]; [Build.$C$37:.$C$51]=&quot;Passive&quot;);[.A60]);&quot;&quot;);&quot;&quot;)">
            <text:p/>
          </table:table-cell>
          <table:table-cell table:formula="of:=IFERROR(IFNA(INDEX(COM.MICROSOFT.FILTER([Build.$B$37:.$B$51];[Build.$C$37:.$C$51]=&quot;Passive&quot;); [.A60]);&quot;&quot;);&quot;&quot;)">
            <text:p/>
          </table:table-cell>
          <table:table-cell table:number-columns-repeated="2"/>
          <table:table-cell table:formula="of:=IFERROR(IFNA(COM.MICROSOFT.FILTER(['Utility Abilities By Art'.$D$2:.$D$61];['Utility Abilities By Art'.$B$2:.$B$61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IFERROR(IFNA(INDEX(COM.MICROSOFT.FILTER([Build.$A$37:.$A$51]; [Build.$C$37:.$C$51]=&quot;Passive&quot;);[.A61]);&quot;&quot;);&quot;&quot;)">
            <text:p/>
          </table:table-cell>
          <table:table-cell table:formula="of:=IFERROR(IFNA(INDEX(COM.MICROSOFT.FILTER([Build.$B$37:.$B$51];[Build.$C$37:.$C$51]=&quot;Passive&quot;); [.A61]);&quot;&quot;);&quot;&quot;)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formula="of:=IFERROR(IFNA(INDEX(COM.MICROSOFT.FILTER([Build.$A$37:.$A$51]; [Build.$C$37:.$C$51]=&quot;Passive&quot;);[.A62]);&quot;&quot;);&quot;&quot;)">
            <text:p/>
          </table:table-cell>
          <table:table-cell table:formula="of:=IFERROR(IFNA(INDEX(COM.MICROSOFT.FILTER([Build.$B$37:.$B$51];[Build.$C$37:.$C$51]=&quot;Passive&quot;); [.A62]);&quot;&quot;);&quot;&quot;)"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style-name="ce199" table:formula="of:=IFNA(INDEX(COM.MICROSOFT.SORT([$Build.$A$37:.$C$51];3;-1);[.E63];1); &quot;&quot;)">
            <text:p/>
          </table:table-cell>
          <table:table-cell table:style-name="ce178" table:formula="of:=IFERROR(IFNA(INDEX(COM.MICROSOFT.FILTER([$'Utility Abilities By Art'.$E$2:.$E$61];['Utility Abilities By Art'.$B$2:.$B$61]=[.F6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6">
          <table:table-cell table:style-name="Default"/>
          <table:table-cell table:style-name="ce10" office:value-type="string" calcext:value-type="string" table:number-columns-spanned="2" table:number-rows-spanned="1">
            <text:p>DOWNTIME ACTIVITIES</text:p>
          </table:table-cell>
          <table:covered-table-cell table:style-name="ce2"/>
          <table:table-cell table:number-columns-repeated="2"/>
          <table:table-cell table:formula="of:=IFERROR(IFNA(COM.MICROSOFT.FILTER(['Utility Abilities By Art'.$A$2:.$A$61];['Utility Abilities By Art'.$B$2:.$B$61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formula="of:=IFERROR(IFNA(COM.MICROSOFT.FILTER(['Utility Abilities By Art'.$C$2:.$C$61];['Utility Abilities By Art'.$B$2:.$B$61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IFERROR(IFNA(INDEX(COM.MICROSOFT.FILTER([Build.$A$37:.$A$51]; [Build.$C$37:.$C$51]=&quot;Downtime&quot;);[.A65]);&quot;&quot;);&quot;&quot;)" office:value-type="string" office:string-value="Practice" calcext:value-type="string">
            <text:p>Practice</text:p>
          </table:table-cell>
          <table:table-cell table:formula="of:=IFERROR(IFNA(INDEX(COM.MICROSOFT.FILTER([Build.$B$37:.$B$51];[Build.$C$37:.$C$51]=&quot;Downtime&quot;); [.A65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Utility Abilities By Art'.$D$2:.$D$61];['Utility Abilities By Art'.$B$2:.$B$61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IFERROR(IFNA(INDEX(COM.MICROSOFT.FILTER([Build.$A$37:.$A$51]; [Build.$C$37:.$C$51]=&quot;Downtime&quot;);[.A66]);&quot;&quot;);&quot;&quot;)" office:value-type="string" office:string-value="Meditate" calcext:value-type="string">
            <text:p>Meditate</text:p>
          </table:table-cell>
          <table:table-cell table:formula="of:=IFERROR(IFNA(INDEX(COM.MICROSOFT.FILTER([Build.$B$37:.$B$51];[Build.$C$37:.$C$51]=&quot;Downtime&quot;); [.A66]);&quot;&quot;);&quot;&quot;)" office:value-type="string" office:string-value="Basic" calcext:value-type="string">
            <text:p>Basic</text:p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IFERROR(IFNA(INDEX(COM.MICROSOFT.FILTER([Build.$A$37:.$A$51]; [Build.$C$37:.$C$51]=&quot;Downtime&quot;);[.A67]);&quot;&quot;);&quot;&quot;)">
            <text:p/>
          </table:table-cell>
          <table:table-cell table:formula="of:=IFERROR(IFNA(INDEX(COM.MICROSOFT.FILTER([Build.$B$37:.$B$51];[Build.$C$37:.$C$51]=&quot;Downtime&quot;); [.A67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199" table:formula="of:=IFNA(INDEX(COM.MICROSOFT.SORT([$Build.$A$37:.$C$51];3;-1);[.E68];1); &quot;&quot;)">
            <text:p/>
          </table:table-cell>
          <table:table-cell table:style-name="ce178" table:formula="of:=IFERROR(IFNA(INDEX(COM.MICROSOFT.FILTER([$'Utility Abilities By Art'.$E$2:.$E$61];['Utility Abilities By Art'.$B$2:.$B$61]=[.F6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IFERROR(IFNA(INDEX(COM.MICROSOFT.FILTER([Build.$A$37:.$A$51]; [Build.$C$37:.$C$51]=&quot;Downtime&quot;);[.A68]);&quot;&quot;);&quot;&quot;)">
            <text:p/>
          </table:table-cell>
          <table:table-cell table:formula="of:=IFERROR(IFNA(INDEX(COM.MICROSOFT.FILTER([Build.$B$37:.$B$51];[Build.$C$37:.$C$51]=&quot;Downtime&quot;); [.A68]);&quot;&quot;);&quot;&quot;)">
            <text:p/>
          </table:table-cell>
          <table:table-cell table:number-columns-repeated="2"/>
          <table:table-cell table:formula="of:=IFERROR(IFNA(COM.MICROSOFT.FILTER(['Utility Abilities By Art'.$A$2:.$A$61];['Utility Abilities By Art'.$B$2:.$B$61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IFERROR(IFNA(INDEX(COM.MICROSOFT.FILTER([Build.$A$37:.$A$51]; [Build.$C$37:.$C$51]=&quot;Downtime&quot;);[.A69]);&quot;&quot;);&quot;&quot;)">
            <text:p/>
          </table:table-cell>
          <table:table-cell table:formula="of:=IFERROR(IFNA(INDEX(COM.MICROSOFT.FILTER([Build.$B$37:.$B$51];[Build.$C$37:.$C$51]=&quot;Downtime&quot;); [.A69]);&quot;&quot;);&quot;&quot;)">
            <text:p/>
          </table:table-cell>
          <table:table-cell table:number-columns-repeated="2"/>
          <table:table-cell table:formula="of:=IFERROR(IFNA(COM.MICROSOFT.FILTER(['Utility Abilities By Art'.$C$2:.$C$61];['Utility Abilities By Art'.$B$2:.$B$61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IFERROR(IFNA(INDEX(COM.MICROSOFT.FILTER([Build.$A$37:.$A$51]; [Build.$C$37:.$C$51]=&quot;Downtime&quot;);[.A70]);&quot;&quot;);&quot;&quot;)">
            <text:p/>
          </table:table-cell>
          <table:table-cell table:formula="of:=IFERROR(IFNA(INDEX(COM.MICROSOFT.FILTER([Build.$B$37:.$B$51];[Build.$C$37:.$C$51]=&quot;Downtime&quot;); [.A70]);&quot;&quot;);&quot;&quot;)">
            <text:p/>
          </table:table-cell>
          <table:table-cell table:number-columns-repeated="2"/>
          <table:table-cell table:formula="of:=IFERROR(IFNA(COM.MICROSOFT.FILTER(['Utility Abilities By Art'.$D$2:.$D$61];['Utility Abilities By Art'.$B$2:.$B$61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IFERROR(IFNA(INDEX(COM.MICROSOFT.FILTER([Build.$A$37:.$A$51]; [Build.$C$37:.$C$51]=&quot;Downtime&quot;);[.A71]);&quot;&quot;);&quot;&quot;)">
            <text:p/>
          </table:table-cell>
          <table:table-cell table:formula="of:=IFERROR(IFNA(INDEX(COM.MICROSOFT.FILTER([Build.$B$37:.$B$51];[Build.$C$37:.$C$51]=&quot;Downtime&quot;); [.A71]);&quot;&quot;);&quot;&quot;)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IFERROR(IFNA(INDEX(COM.MICROSOFT.FILTER([Build.$A$37:.$A$51]; [Build.$C$37:.$C$51]=&quot;Downtime&quot;);[.A72]);&quot;&quot;);&quot;&quot;)">
            <text:p/>
          </table:table-cell>
          <table:table-cell table:formula="of:=IFERROR(IFNA(INDEX(COM.MICROSOFT.FILTER([Build.$B$37:.$B$51];[Build.$C$37:.$C$51]=&quot;Downtime&quot;); [.A72]);&quot;&quot;)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style-name="ce199" table:formula="of:=IFNA(INDEX(COM.MICROSOFT.SORT([$Build.$A$37:.$C$51];3;-1);[.E73];1); &quot;&quot;)">
            <text:p/>
          </table:table-cell>
          <table:table-cell table:style-name="ce178" table:formula="of:=IFERROR(IFNA(INDEX(COM.MICROSOFT.FILTER([$'Utility Abilities By Art'.$E$2:.$E$61];['Utility Abilities By Art'.$B$2:.$B$61]=[.F7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IFERROR(IFNA(INDEX(COM.MICROSOFT.FILTER([Build.$A$37:.$A$51]; [Build.$C$37:.$C$51]=&quot;Downtime&quot;);[.A73]);&quot;&quot;);&quot;&quot;)">
            <text:p/>
          </table:table-cell>
          <table:table-cell table:formula="of:=IFERROR(IFNA(INDEX(COM.MICROSOFT.FILTER([Build.$B$37:.$B$51];[Build.$C$37:.$C$51]=&quot;Downtime&quot;); [.A73]);&quot;&quot;);&quot;&quot;)">
            <text:p/>
          </table:table-cell>
          <table:table-cell table:number-columns-repeated="2"/>
          <table:table-cell table:formula="of:=IFERROR(IFNA(COM.MICROSOFT.FILTER(['Utility Abilities By Art'.$A$2:.$A$61];['Utility Abilities By Art'.$B$2:.$B$61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IFERROR(IFNA(INDEX(COM.MICROSOFT.FILTER([Build.$A$37:.$A$51]; [Build.$C$37:.$C$51]=&quot;Downtime&quot;);[.A74]);&quot;&quot;);&quot;&quot;)">
            <text:p/>
          </table:table-cell>
          <table:table-cell table:formula="of:=IFERROR(IFNA(INDEX(COM.MICROSOFT.FILTER([Build.$B$37:.$B$51];[Build.$C$37:.$C$51]=&quot;Downtime&quot;); [.A74]);&quot;&quot;);&quot;&quot;)">
            <text:p/>
          </table:table-cell>
          <table:table-cell table:number-columns-repeated="2"/>
          <table:table-cell table:formula="of:=IFERROR(IFNA(COM.MICROSOFT.FILTER(['Utility Abilities By Art'.$C$2:.$C$61];['Utility Abilities By Art'.$B$2:.$B$61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formula="of:=IFERROR(IFNA(INDEX(COM.MICROSOFT.FILTER([Build.$A$37:.$A$51]; [Build.$C$37:.$C$51]=&quot;Downtime&quot;);[.A75]);&quot;&quot;);&quot;&quot;)">
            <text:p/>
          </table:table-cell>
          <table:table-cell table:formula="of:=IFERROR(IFNA(INDEX(COM.MICROSOFT.FILTER([Build.$B$37:.$B$51];[Build.$C$37:.$C$51]=&quot;Downtime&quot;); [.A75]);&quot;&quot;);&quot;&quot;)">
            <text:p/>
          </table:table-cell>
          <table:table-cell table:number-columns-repeated="2"/>
          <table:table-cell table:formula="of:=IFERROR(IFNA(COM.MICROSOFT.FILTER(['Utility Abilities By Art'.$D$2:.$D$61];['Utility Abilities By Art'.$B$2:.$B$61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 table:number-columns-repeated="3"/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table:style-name="Default" table:number-columns-repeated="3"/>
          <table:table-cell/>
          <table:table-cell office:value-type="float" office:value="15" calcext:value-type="float">
            <text:p>15</text:p>
          </table:table-cell>
          <table:table-cell table:style-name="ce199" table:formula="of:=IFNA(INDEX(COM.MICROSOFT.SORT([$Build.$A$37:.$C$51];3;-1);[.E78];1); &quot;&quot;)">
            <text:p/>
          </table:table-cell>
          <table:table-cell table:style-name="ce178" table:formula="of:=IFERROR(IFNA(INDEX(COM.MICROSOFT.FILTER([$'Utility Abilities By Art'.$E$2:.$E$61];['Utility Abilities By Art'.$B$2:.$B$61]=[.F7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4">
          <table:table-cell table:style-name="Default" table:number-columns-repeated="3"/>
          <table:table-cell table:number-columns-repeated="2"/>
          <table:table-cell table:formula="of:=IFERROR(IFNA(COM.MICROSOFT.FILTER(['Utility Abilities By Art'.$A$2:.$A$61];['Utility Abilities By Art'.$B$2:.$B$61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 table:number-columns-repeated="3"/>
          <table:table-cell table:number-columns-repeated="2"/>
          <table:table-cell table:formula="of:=IFERROR(IFNA(COM.MICROSOFT.FILTER(['Utility Abilities By Art'.$C$2:.$C$61];['Utility Abilities By Art'.$B$2:.$B$61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 table:number-columns-repeated="3"/>
          <table:table-cell table:number-columns-repeated="2"/>
          <table:table-cell table:formula="of:=IFERROR(IFNA(COM.MICROSOFT.FILTER(['Utility Abilities By Art'.$D$2:.$D$61];['Utility Abilities By Art'.$B$2:.$B$61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 table:number-columns-repeated="3"/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</table:table>
      <table:table table:name="Combat" table:style-name="ta1">
        <office:forms form:automatic-focus="false" form:apply-design-mode="false"/>
        <table:table-column table:style-name="co24" table:visibility="collapse" table:default-cell-style-name="Default"/>
        <table:table-column table:style-name="co25" table:default-cell-style-name="ce193"/>
        <table:table-column table:style-name="co26" table:default-cell-style-name="ce193"/>
        <table:table-column table:style-name="co27" table:default-cell-style-name="ce2"/>
        <table:table-column table:style-name="co27" table:default-cell-style-name="ce316"/>
        <table:table-column table:style-name="co28" table:default-cell-style-name="ce319"/>
        <table:table-column table:style-name="co29" table:default-cell-style-name="ce243"/>
        <table:table-column table:style-name="co30" table:default-cell-style-name="ce243"/>
        <table:table-column table:style-name="co31" table:default-cell-style-name="ce243"/>
        <table:table-column table:style-name="co32" table:default-cell-style-name="ce243"/>
        <table:table-column table:style-name="co33" table:default-cell-style-name="ce257"/>
        <table:table-column table:style-name="co24" table:default-cell-style-name="ce2"/>
        <table:table-column table:style-name="co9" table:default-cell-style-name="ce2"/>
        <table:table-column table:style-name="co34" table:default-cell-style-name="ce2"/>
        <table:table-column table:style-name="co35" table:default-cell-style-name="ce2"/>
        <table:table-column table:style-name="co9" table:default-cell-style-name="ce2"/>
        <table:table-row table:style-name="ro1">
          <table:table-cell/>
          <table:table-cell table:style-name="ce15" office:value-type="string" calcext:value-type="string">
            <text:p>NAME</text:p>
          </table:table-cell>
          <table:table-cell table:style-name="ce268" table:formula="of:=[$Build.B1]" office:value-type="string" office:string-value="Cornelius Macguffin" calcext:value-type="string" table:number-columns-spanned="5" table:number-rows-spanned="1">
            <text:p>Cornelius Macguffin</text:p>
          </table:table-cell>
          <table:covered-table-cell/>
          <table:covered-table-cell table:style-name="ce147"/>
          <table:covered-table-cell table:number-columns-repeated="2" table:style-name="ce2"/>
          <table:table-cell table:style-name="ce2" table:number-columns-repeated="2"/>
          <table:table-cell table:style-name="Default"/>
          <table:table-cell table:style-name="ce205" office:value-type="string" calcext:value-type="string">
            <text:p>Wounds</text:p>
          </table:table-cell>
          <table:table-cell table:number-columns-repeated="5"/>
        </table:table-row>
        <table:table-row table:style-name="ro4">
          <table:table-cell/>
          <table:table-cell table:style-name="ce2" table:number-columns-repeated="2"/>
          <table:table-cell/>
          <table:table-cell table:style-name="ce115"/>
          <table:table-cell table:style-name="ce2" table:number-columns-repeated="4"/>
          <table:table-cell table:style-name="Default"/>
          <table:table-cell table:style-name="ce251" table:content-validation-name="val4"/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1" calcext:value-type="float">
            <text:p>1</text:p>
          </table:table-cell>
          <table:table-cell/>
          <table:table-cell table:style-name="ce80" office:value-type="string" calcext:value-type="string" table:number-columns-spanned="4" table:number-rows-spanned="1">
            <text:p>FATIGUE AND STRESS</text:p>
          </table:table-cell>
          <table:covered-table-cell table:number-columns-repeated="2" table:style-name="ce215"/>
          <table:covered-table-cell table:style-name="ce2"/>
          <table:table-cell table:style-name="ce2"/>
          <table:table-cell table:style-name="Default"/>
          <table:table-cell table:style-name="ce205" office:value-type="string" calcext:value-type="string">
            <text:p>Active Stance</text:p>
          </table:table-cell>
          <table:table-cell table:number-columns-repeated="5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14" table:number-columns-spanned="2" table:number-rows-spanned="1"/>
          <table:covered-table-cell table:style-name="ce2"/>
          <table:table-cell table:style-name="ce107" office:value-type="string" calcext:value-type="string">
            <text:p>FATIGUE</text:p>
          </table:table-cell>
          <table:table-cell table:style-name="ce107" office:value-type="string" calcext:value-type="string">
            <text:p>STRESS</text:p>
          </table:table-cell>
          <table:table-cell table:style-name="ce2"/>
          <table:table-cell table:style-name="Default"/>
          <table:table-cell table:style-name="ce251" table:content-validation-name="val7"/>
          <table:table-cell table:number-columns-repeated="5"/>
        </table:table-row>
        <table:table-row table:style-name="ro4">
          <table:table-cell/>
          <table:table-cell table:style-name="ce214" office:value-type="string" calcext:value-type="string" table:number-columns-spanned="2" table:number-rows-spanned="1">
            <text:p>Note: All blank modifiers are 0</text:p>
          </table:table-cell>
          <table:covered-table-cell table:style-name="ce180"/>
          <table:table-cell/>
          <table:table-cell table:style-name="ce87" office:value-type="string" calcext:value-type="string" table:number-columns-spanned="2" table:number-rows-spanned="1">
            <text:p>Load</text:p>
          </table:table-cell>
          <table:covered-table-cell table:style-name="ce2"/>
          <table:table-cell table:style-name="ce308" table:content-validation-name="val3"/>
          <table:table-cell table:style-name="ce310" table:content-validation-name="val3"/>
          <table:table-cell table:style-name="ce2"/>
          <table:table-cell table:style-name="Default"/>
          <table:table-cell table:style-name="ce205" office:value-type="string" calcext:value-type="string">
            <text:p>Active Buff</text:p>
          </table:table-cell>
          <table:table-cell table:number-columns-repeated="5"/>
        </table:table-row>
        <table:table-row table:style-name="ro6">
          <table:table-cell/>
          <table:table-cell table:style-name="ce80" office:value-type="string" calcext:value-type="string" table:number-columns-spanned="2" table:number-rows-spanned="1">
            <text:p>ATTRIBUTES</text:p>
          </table:table-cell>
          <table:covered-table-cell table:style-name="ce190"/>
          <table:table-cell/>
          <table:table-cell table:style-name="ce87" office:value-type="string" calcext:value-type="string" table:number-columns-spanned="2" table:number-rows-spanned="1">
            <text:p>Lost Tolerance</text:p>
          </table:table-cell>
          <table:covered-table-cell table:style-name="ce2"/>
          <table:table-cell table:style-name="ce308" table:content-validation-name="val3"/>
          <table:table-cell table:style-name="ce310" table:content-validation-name="val3"/>
          <table:table-cell table:style-name="ce2"/>
          <table:table-cell table:style-name="Default"/>
          <table:table-cell table:style-name="ce251" table:content-validation-name="val4"/>
          <table:table-cell table:number-columns-repeated="5"/>
        </table:table-row>
        <table:table-row table:style-name="ro4">
          <table:table-cell/>
          <table:table-cell table:style-name="ce4" table:formula="of:=[$Build.A6]" office:value-type="string" office:string-value="Power (POW)" calcext:value-type="string">
            <text:p>Power (POW)</text:p>
          </table:table-cell>
          <table:table-cell table:style-name="ce230" table:formula="of:=[$Build.C6]" office:value-type="float" office:value="2" calcext:value-type="float">
            <text:p>+2</text:p>
          </table:table-cell>
          <table:table-cell/>
          <table:table-cell table:style-name="ce87" office:value-type="string" calcext:value-type="string" table:number-columns-spanned="2" table:number-rows-spanned="1">
            <text:p>Current Tolerance</text:p>
          </table:table-cell>
          <table:covered-table-cell table:style-name="ce2"/>
          <table:table-cell table:style-name="ce322" table:formula="of:=[.G8]-[.G6]" office:value-type="float" office:value="3" calcext:value-type="float">
            <text:p>3</text:p>
          </table:table-cell>
          <table:table-cell table:style-name="ce324" table:formula="of:=[.H8]-[.H6]" office:value-type="float" office:value="2" calcext:value-type="float">
            <text:p>2</text:p>
          </table:table-cell>
          <table:table-cell table:style-name="ce2"/>
          <table:table-cell table:style-name="Default"/>
          <table:table-cell table:style-name="ce205" office:value-type="string" calcext:value-type="string">
            <text:p>Active Terrain Effect</text:p>
          </table:table-cell>
          <table:table-cell table:number-columns-repeated="5"/>
        </table:table-row>
        <table:table-row table:style-name="ro4">
          <table:table-cell/>
          <table:table-cell table:style-name="ce4" table:formula="of:=[$Build.A7]" office:value-type="string" office:string-value="Endurance (END)" calcext:value-type="string">
            <text:p>Endurance (END)</text:p>
          </table:table-cell>
          <table:table-cell table:style-name="ce230" table:formula="of:=[$Build.C7]" office:value-type="float" office:value="0" calcext:value-type="float">
            <text:p/>
          </table:table-cell>
          <table:table-cell/>
          <table:table-cell table:style-name="ce87" office:value-type="string" calcext:value-type="string" table:number-columns-spanned="2" table:number-rows-spanned="1">
            <text:p>Max Tolerance</text:p>
          </table:table-cell>
          <table:covered-table-cell table:style-name="ce2"/>
          <table:table-cell table:style-name="ce4" table:formula="of:=[$Build.F7]" office:value-type="float" office:value="3" calcext:value-type="float">
            <text:p>3</text:p>
          </table:table-cell>
          <table:table-cell table:style-name="ce6" table:formula="of:=[$Build.F11]" office:value-type="float" office:value="2" calcext:value-type="float">
            <text:p>2</text:p>
          </table:table-cell>
          <table:table-cell table:style-name="ce2"/>
          <table:table-cell table:style-name="Default"/>
          <table:table-cell table:style-name="ce251" table:content-validation-name="val4"/>
          <table:table-cell table:number-columns-repeated="5"/>
        </table:table-row>
        <table:table-row table:style-name="ro4">
          <table:table-cell/>
          <table:table-cell table:style-name="ce5" table:formula="of:=[$Build.A8]" office:value-type="string" office:string-value="Finesse (FIN)" calcext:value-type="string">
            <text:p>Finesse (FIN)</text:p>
          </table:table-cell>
          <table:table-cell table:style-name="ce231" table:formula="of:=[$Build.C8]" office:value-type="float" office:value="0" calcext:value-type="float">
            <text:p/>
          </table:table-cell>
          <table:table-cell/>
          <table:table-cell table:style-name="Default" table:number-columns-repeated="6"/>
          <table:table-cell table:style-name="ce2"/>
          <table:table-cell table:number-columns-repeated="5"/>
        </table:table-row>
        <table:table-row table:style-name="ro11">
          <table:table-cell/>
          <table:table-cell table:style-name="ce5" table:formula="of:=[$Build.A9]" office:value-type="string" office:string-value="Reflex (REF)" calcext:value-type="string">
            <text:p>Reflex (REF)</text:p>
          </table:table-cell>
          <table:table-cell table:style-name="ce231" table:formula="of:=[$Build.C9]" office:value-type="float" office:value="2" calcext:value-type="float">
            <text:p>+2</text:p>
          </table:table-cell>
          <table:table-cell/>
          <table:table-cell table:style-name="Default"/>
          <table:table-cell table:style-name="ce80" office:value-type="string" calcext:value-type="string" table:number-columns-spanned="5" table:number-rows-spanned="1">
            <text:p>ARCHETYPE TRAITS</text:p>
          </table:table-cell>
          <table:covered-table-cell table:style-name="ce215"/>
          <table:covered-table-cell table:style-name="ce2"/>
          <table:covered-table-cell table:number-columns-repeated="2" table:style-name="Default"/>
          <table:table-cell table:style-name="ce2"/>
          <table:table-cell table:number-columns-repeated="5"/>
        </table:table-row>
        <table:table-row table:style-name="ro11">
          <table:table-cell/>
          <table:table-cell table:style-name="ce6" table:formula="of:=[$Build.A10]" office:value-type="string" office:string-value="Reasoning (REA)" calcext:value-type="string">
            <text:p>Reasoning (REA)</text:p>
          </table:table-cell>
          <table:table-cell table:style-name="ce232" table:formula="of:=[$Build.C10]" office:value-type="float" office:value="0" calcext:value-type="float">
            <text:p/>
          </table:table-cell>
          <table:table-cell/>
          <table:table-cell table:style-name="Default"/>
          <table:table-cell table:style-name="ce80" table:formula="of:=IFERROR(IFNA(INDEX(COM.MICROSOFT.FILTER([$Build.$E15:.$E17];NOT(ISBLANK([$Build.$F15:.$F17])));1);&quot;&quot;);&quot;&quot;)" office:value-type="string" office:string-value="The Weaver" calcext:value-type="string" table:number-columns-spanned="1" table:number-rows-spanned="2">
            <text:p>The Weaver</text:p>
          </table:table-cell>
          <table:table-cell table:style-name="ce248" table:formula="of:=IFERROR(IFNA(INDEX(COM.MICROSOFT.FILTER([$'Archetype Traits'.$D$5:.$D$7];[$'Archetype Traits'.$A$5:.$A$7]=[.F11]);1);&quot;&quot;);&quot;&quot;)" office:value-type="string" office:string-value="Ignore the first effect from terrain or an ability that would reduce your Movement on each of your turns" calcext:value-type="string" table:number-columns-spanned="4" table:number-rows-spanned="2">
            <text:p>Ignore the first effect from terrain or an ability that would reduce your Movement on each of your turns</text:p>
          </table:table-cell>
          <table:covered-table-cell table:number-columns-repeated="3" table:style-name="ce247"/>
          <table:table-cell table:style-name="ce2"/>
          <table:table-cell table:number-columns-repeated="5"/>
        </table:table-row>
        <table:table-row table:style-name="ro11">
          <table:table-cell/>
          <table:table-cell table:style-name="ce6" table:formula="of:=[$Build.A11]" office:value-type="string" office:string-value="Focus (FOC)" calcext:value-type="string">
            <text:p>Focus (FOC)</text:p>
          </table:table-cell>
          <table:table-cell table:style-name="ce232" table:formula="of:=[$Build.C11]" office:value-type="float" office:value="0" calcext:value-type="float">
            <text:p/>
          </table:table-cell>
          <table:table-cell/>
          <table:table-cell table:style-name="Default"/>
          <table:covered-table-cell table:style-name="ce80"/>
          <table:covered-table-cell table:style-name="ce249"/>
          <table:covered-table-cell table:number-columns-repeated="3" table:style-name="ce247"/>
          <table:table-cell table:style-name="ce2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table:style-name="Default"/>
          <table:table-cell table:style-name="ce80" table:formula="of:=IFERROR(IFNA(INDEX(COM.MICROSOFT.FILTER([$Build.$E17:.$E19];[$Build.$F17:.$F19]&gt;0);1);&quot;&quot;);&quot;&quot;)" table:number-columns-spanned="1" table:number-rows-spanned="2">
            <text:p/>
          </table:table-cell>
          <table:table-cell table:style-name="ce250" table:formula="of:=IFERROR(IFNA(INDEX(COM.MICROSOFT.FILTER([$'Archetype Traits'.D5:.D7];[$'Archetype Traits'.A5:.A7]=[.F13]);1);&quot;&quot;);&quot;&quot;)" table:number-columns-spanned="4" table:number-rows-spanned="2">
            <text:p/>
          </table:table-cell>
          <table:covered-table-cell table:number-columns-repeated="3" table:style-name="ce247"/>
          <table:table-cell table:style-name="ce2"/>
          <table:table-cell table:number-columns-repeated="5"/>
        </table:table-row>
        <table:table-row table:style-name="ro11">
          <table:table-cell/>
          <table:table-cell table:style-name="ce207" office:value-type="string" calcext:value-type="string">
            <text:p>SPEED</text:p>
          </table:table-cell>
          <table:table-cell table:style-name="ce233" table:formula="of:=[Build.$F$2]" office:value-type="float" office:value="4" calcext:value-type="float">
            <text:p>4</text:p>
          </table:table-cell>
          <table:table-cell/>
          <table:table-cell table:style-name="Default"/>
          <table:covered-table-cell table:style-name="ce80"/>
          <table:covered-table-cell table:style-name="ce249"/>
          <table:covered-table-cell table:number-columns-repeated="3" table:style-name="ce247"/>
          <table:table-cell table:style-name="ce2"/>
          <table:table-cell table:number-columns-repeated="5"/>
        </table:table-row>
        <table:table-row table:style-name="ro11">
          <table:table-cell/>
          <table:table-cell table:style-name="ce207" office:value-type="string" calcext:value-type="string">
            <text:p>INITIATIVE</text:p>
          </table:table-cell>
          <table:table-cell table:style-name="ce234" table:formula="of:=[$Build.$C$9]" office:value-type="float" office:value="2" calcext:value-type="float">
            <text:p>+2</text:p>
          </table:table-cell>
          <table:table-cell/>
          <table:table-cell table:style-name="ce2" table:number-columns-repeated="7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table:style-name="ce180"/>
          <table:table-cell table:style-name="ce10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style-name="ce10" office:value-type="string" calcext:value-type="string">
            <text:p>Upgrades</text:p>
          </table:table-cell>
          <table:table-cell table:number-columns-repeated="5"/>
        </table:table-row>
        <table:table-row table:style-name="ro11">
          <table:table-cell/>
          <table:table-cell table:style-name="ce80" office:value-type="string" calcext:value-type="string" table:number-columns-spanned="2" table:number-rows-spanned="1">
            <text:p>DEFENSES</text:p>
          </table:table-cell>
          <table:covered-table-cell table:style-name="ce2"/>
          <table:table-cell table:style-name="ce213"/>
          <table:table-cell office:value-type="float" office:value="1" calcext:value-type="float">
            <text:p>1</text:p>
          </table:table-cell>
          <table:table-cell table:style-name="ce317" table:formula="of:=IFNA(INDEX(COM.MICROSOFT.SORT([$Build.$E$37:.$G$55];3;-1);[.E17];1); &quot;&quot;)" office:value-type="string" office:string-value="Brace" calcext:value-type="string">
            <text:p>Brace</text:p>
          </table:table-cell>
          <table:table-cell table:style-name="ce178" table:formula="of:=IFERROR(IFNA(INDEX(COM.MICROSOFT.FILTER([$'Combat Abilities By Art'.$E$2:.$E$73];['Combat Abilities By Art'.$B$2:.$B$73]=[.F17]);1);&quot;&quot;);&quot;&quot;)" office:value-type="string" office:string-value="Effect: Gain +1 Boon on Resilience rolls  " calcext:value-type="string" table:number-columns-spanned="4" table:number-rows-spanned="5">
            <text:p>Effect: Gain +1 Boon on Resilience rolls <text:s/>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70] = [.$F17]) &lt;&gt; &quot;&quot;; COM.MICROSOFT.FILTER([$'Nova Abilities'.G:.I]; [$'Nova Abilities'.C:.C] = [.F17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/>
          <table:table-cell table:style-name="ce107" office:value-type="string" calcext:value-type="string">
            <text:p>Resistance</text:p>
          </table:table-cell>
          <table:table-cell table:style-name="ce235" table:formula="of:=[$Build.$C$7]" office:value-type="float" office:value="0" calcext:value-type="float">
            <text:p/>
          </table:table-cell>
          <table:table-cell table:style-name="ce213"/>
          <table:table-cell/>
          <table:table-cell table:style-name="ce318" table:formula="of:=IFERROR(IFNA(COM.MICROSOFT.FILTER(['Combat Abilities By Art'.$A$2:.$A$68];['Combat Abilities By Art'.$B$2:.$B$68]=[.F17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07" office:value-type="string" calcext:value-type="string">
            <text:p>Evasion</text:p>
          </table:table-cell>
          <table:table-cell table:style-name="ce236" table:formula="of:=[$Build.$C$9]" office:value-type="float" office:value="2" calcext:value-type="float">
            <text:p>+2</text:p>
          </table:table-cell>
          <table:table-cell table:style-name="ce213"/>
          <table:table-cell/>
          <table:table-cell table:formula="of:=IFERROR(IFNA(COM.MICROSOFT.FILTER(['Combat Abilities By Art'.$C$2:.$C$68]; ['Combat Abilities By Art'.$B$2:.$B$68]=[.F17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07" office:value-type="string" calcext:value-type="string">
            <text:p>Resolve</text:p>
          </table:table-cell>
          <table:table-cell table:style-name="ce237" table:formula="of:=[$Build.$C$11]" office:value-type="float" office:value="0" calcext:value-type="float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F17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07" office:value-type="string" calcext:value-type="string">
            <text:p>Incapacity Rolls</text:p>
          </table:table-cell>
          <table:table-cell table:style-name="ce235" table:formula="of:=[$Build.G7]" office:value-type="float" office:value="0" calcext:value-type="float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07" office:value-type="string" calcext:value-type="string">
            <text:p>Panic Rolls</text:p>
          </table:table-cell>
          <table:table-cell table:style-name="ce237" table:formula="of:=[$Build.G11]" office:value-type="float" office:value="0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  <table:table-cell table:style-name="ce317" table:formula="of:=IFNA(INDEX(COM.MICROSOFT.SORT([$Build.$E$37:.$G$55];3;-1);[.E22];1); &quot;&quot;)" office:value-type="string" office:string-value="Dodge" calcext:value-type="string">
            <text:p>Dodge</text:p>
          </table:table-cell>
          <table:table-cell table:style-name="ce178" table:formula="of:=IFERROR(IFNA(INDEX(COM.MICROSOFT.FILTER([$'Combat Abilities By Art'.$E$2:.$E$73];['Combat Abilities By Art'.$B$2:.$B$73]=[.F22]);1);&quot;&quot;);&quot;&quot;)" office:value-type="string" office:string-value="Effect: Gain +1 Boon on Evasion rolls  " calcext:value-type="string" table:number-columns-spanned="4" table:number-rows-spanned="5">
            <text:p>Effect: Gain +1 Boon on Evasion rolls <text:s/>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70] = [.$F22]) &lt;&gt; &quot;&quot;; COM.MICROSOFT.FILTER([$'Nova Abilities'.G:.I]; [$'Nova Abilities'.C:.C] = [.F22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style-name="ce318" table:formula="of:=IFERROR(IFNA(COM.MICROSOFT.FILTER(['Combat Abilities By Art'.$A$2:.$A$68];['Combat Abilities By Art'.$B$2:.$B$68]=[.F22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0" office:value-type="string" calcext:value-type="string" table:number-columns-spanned="2" table:number-rows-spanned="1">
            <text:p>COMBAT ARTS</text:p>
          </table:table-cell>
          <table:covered-table-cell table:style-name="ce2"/>
          <table:table-cell table:number-columns-repeated="2"/>
          <table:table-cell table:formula="of:=IFERROR(IFNA(COM.MICROSOFT.FILTER(['Combat Abilities By Art'.$C$2:.$C$68]; ['Combat Abilities By Art'.$B$2:.$B$68]=[.F22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07" office:value-type="string" calcext:value-type="string">
            <text:p>ART</text:p>
          </table:table-cell>
          <table:table-cell table:style-name="ce87" office:value-type="string" calcext:value-type="string">
            <text:p>MODIFIER</text:p>
          </table:table-cell>
          <table:table-cell table:number-columns-repeated="2"/>
          <table:table-cell table:formula="of:=IFERROR(IFNA(COM.MICROSOFT.FILTER(['Combat Abilities By Art'.$D$2:.$D$68]; ['Combat Abilities By Art'.$B$2:.$B$68]=[.F22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23]" office:value-type="string" office:string-value="Brawling" calcext:value-type="string">
            <text:p>Brawling</text:p>
          </table:table-cell>
          <table:table-cell table:style-name="ce238" table:formula="of:=[$Build.G23]" office:value-type="float" office:value="0" calcext:value-type="float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24]" office:value-type="string" office:string-value="Dueling" calcext:value-type="string">
            <text:p>Dueling</text:p>
          </table:table-cell>
          <table:table-cell table:style-name="ce238" table:formula="of:=[$Build.G24]" office:value-type="float" office:value="0" calcext:value-type="float">
            <text:p/>
          </table:table-cell>
          <table:table-cell/>
          <table:table-cell office:value-type="float" office:value="3" calcext:value-type="float">
            <text:p>3</text:p>
          </table:table-cell>
          <table:table-cell table:style-name="ce317" table:formula="of:=IFNA(INDEX(COM.MICROSOFT.SORT([$Build.$E$37:.$G$55];3;-1);[.E27];1); &quot;&quot;)" office:value-type="string" office:string-value="Concentrate" calcext:value-type="string">
            <text:p>Concentrate</text:p>
          </table:table-cell>
          <table:table-cell table:style-name="ce178" table:formula="of:=IFERROR(IFNA(INDEX(COM.MICROSOFT.FILTER([$'Combat Abilities By Art'.$E$2:.$E$73];['Combat Abilities By Art'.$B$2:.$B$73]=[.F27]);1);&quot;&quot;);&quot;&quot;)" office:value-type="string" office:string-value="Effect: Gain +1 Boon on Resolve rolls  " calcext:value-type="string" table:number-columns-spanned="4" table:number-rows-spanned="5">
            <text:p>Effect: Gain +1 Boon on Resolve rolls <text:s/>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70] = [.$F27]) &lt;&gt; &quot;&quot;; COM.MICROSOFT.FILTER([$'Nova Abilities'.G:.I]; [$'Nova Abilities'.C:.C] = [.F27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/>
          <table:table-cell table:style-name="ce157" table:formula="of:=[$Build.E25]" office:value-type="string" office:string-value="Infusion" calcext:value-type="string">
            <text:p>Infusion</text:p>
          </table:table-cell>
          <table:table-cell table:style-name="ce238" table:formula="of:=[$Build.G25]" office:value-type="float" office:value="0" calcext:value-type="float">
            <text:p/>
          </table:table-cell>
          <table:table-cell table:number-columns-repeated="2"/>
          <table:table-cell table:style-name="ce318" table:formula="of:=IFERROR(IFNA(COM.MICROSOFT.FILTER(['Combat Abilities By Art'.$A$2:.$A$68];['Combat Abilities By Art'.$B$2:.$B$68]=[.F27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26]" office:value-type="string" office:string-value="Archery" calcext:value-type="string">
            <text:p>Archery</text:p>
          </table:table-cell>
          <table:table-cell table:style-name="ce238" table:formula="of:=[$Build.G26]" office:value-type="float" office:value="3" calcext:value-type="float">
            <text:p>+3</text:p>
          </table:table-cell>
          <table:table-cell table:number-columns-repeated="2"/>
          <table:table-cell table:formula="of:=IFERROR(IFNA(COM.MICROSOFT.FILTER(['Combat Abilities By Art'.$C$2:.$C$68]; ['Combat Abilities By Art'.$B$2:.$B$68]=[.F27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27]" office:value-type="string" office:string-value="Ninjutsu" calcext:value-type="string">
            <text:p>Ninjutsu</text:p>
          </table:table-cell>
          <table:table-cell table:style-name="ce238" table:formula="of:=[$Build.G27]" office:value-type="float" office:value="1" calcext:value-type="float">
            <text:p>+1</text:p>
          </table:table-cell>
          <table:table-cell table:number-columns-repeated="2"/>
          <table:table-cell table:formula="of:=IFERROR(IFNA(COM.MICROSOFT.FILTER(['Combat Abilities By Art'.$D$2:.$D$68]; ['Combat Abilities By Art'.$B$2:.$B$68]=[.F27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28]" office:value-type="string" office:string-value="Kineticism" calcext:value-type="string">
            <text:p>Kineticism</text:p>
          </table:table-cell>
          <table:table-cell table:style-name="ce238" table:formula="of:=[$Build.G28]" office:value-type="float" office:value="0" calcext:value-type="float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29]" office:value-type="string" office:string-value="Animism" calcext:value-type="string">
            <text:p>Animism</text:p>
          </table:table-cell>
          <table:table-cell table:style-name="ce238" table:formula="of:=[$Build.G29]" office:value-type="float" office:value="0" calcext:value-type="float">
            <text:p/>
          </table:table-cell>
          <table:table-cell/>
          <table:table-cell office:value-type="float" office:value="4" calcext:value-type="float">
            <text:p>4</text:p>
          </table:table-cell>
          <table:table-cell table:style-name="ce317" table:formula="of:=IFNA(INDEX(COM.MICROSOFT.SORT([$Build.$E$37:.$G$55];3;-1);[.E32];1); &quot;&quot;)" office:value-type="string" office:string-value="Assist" calcext:value-type="string">
            <text:p>Assist</text:p>
          </table:table-cell>
          <table:table-cell table:style-name="ce178" table:formula="of:=IFERROR(IFNA(INDEX(COM.MICROSOFT.FILTER([$'Combat Abilities By Art'.$E$2:.$E$73];['Combat Abilities By Art'.$B$2:.$B$73]=[.F32]);1);&quot;&quot;);&quot;&quot;)" office:value-type="string" office:string-value="Range: 1&#10;Trigger: An Ally targets an Enemy within range&#10;Effect: You may impose +1 Bane on the Enemy's defensive roll.&#10;If you do, end this stance.  " calcext:value-type="string" table:number-columns-spanned="4" table:number-rows-spanned="5">
            <text:p>Range: 1</text:p>
            <text:p>Trigger: An Ally targets an Enemy within range</text:p>
            <text:p>Effect: You may impose +1 Bane on the Enemy's defensive roll.</text:p>
            <text:p>If you do, end this stance.  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70] = [.$F32]) &lt;&gt; &quot;&quot;; COM.MICROSOFT.FILTER([$'Nova Abilities'.G:.I]; [$'Nova Abilities'.C:.C] = [.F32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/>
          <table:table-cell table:style-name="ce157" table:formula="of:=[$Build.E30]" office:value-type="string" office:string-value="Mesmerism" calcext:value-type="string">
            <text:p>Mesmerism</text:p>
          </table:table-cell>
          <table:table-cell table:style-name="ce238" table:formula="of:=[$Build.G30]" office:value-type="float" office:value="0" calcext:value-type="float">
            <text:p/>
          </table:table-cell>
          <table:table-cell table:number-columns-repeated="2"/>
          <table:table-cell table:style-name="ce318" table:formula="of:=IFERROR(IFNA(COM.MICROSOFT.FILTER(['Combat Abilities By Art'.$A$2:.$A$68];['Combat Abilities By Art'.$B$2:.$B$68]=[.F32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31]" office:value-type="string" office:string-value="Elementalism" calcext:value-type="string">
            <text:p>Elementalism</text:p>
          </table:table-cell>
          <table:table-cell table:style-name="ce238" table:formula="of:=[$Build.G31]" office:value-type="float" office:value="0" calcext:value-type="float">
            <text:p/>
          </table:table-cell>
          <table:table-cell table:number-columns-repeated="2"/>
          <table:table-cell table:formula="of:=IFERROR(IFNA(COM.MICROSOFT.FILTER(['Combat Abilities By Art'.$C$2:.$C$68]; ['Combat Abilities By Art'.$B$2:.$B$68]=[.F32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D$2:.$D$68]; ['Combat Abilities By Art'.$B$2:.$B$68]=[.F32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172"/>
          <table:table-cell table:style-name="ce10" office:value-type="string" calcext:value-type="string" table:number-columns-spanned="2" table:number-rows-spanned="1">
            <text:p>ACTIONS</text:p>
          </table:table-cell>
          <table:covered-table-cell table:style-name="ce191"/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ce317" table:formula="of:=IFNA(INDEX(COM.MICROSOFT.SORT([$Build.$E$37:.$G$55];3;-1);[.E37];1); &quot;&quot;)" office:value-type="string" office:string-value="Protect" calcext:value-type="string">
            <text:p>Protect</text:p>
          </table:table-cell>
          <table:table-cell table:style-name="ce178" table:formula="of:=IFERROR(IFNA(INDEX(COM.MICROSOFT.FILTER([$'Combat Abilities By Art'.$E$2:.$E$73];['Combat Abilities By Art'.$B$2:.$B$73]=[.F37]);1);&quot;&quot;);&quot;&quot;)" office:value-type="string" office:string-value="Range: 1&#10;Trigger: An Ally within range is targeted by an enemy&#10;Effect: You may grant the Ally +1 Boon on their Defensive roll.&#10;If you do, end this stance.  " calcext:value-type="string" table:number-columns-spanned="4" table:number-rows-spanned="5">
            <text:p>Range: 1</text:p>
            <text:p>Trigger: An Ally within range is targeted by an enemy</text:p>
            <text:p>Effect: You may grant the Ally +1 Boon on their Defensive roll.</text:p>
            <text:p>If you do, end this stance.  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70] = [.$F37]) &lt;&gt; &quot;&quot;; COM.MICROSOFT.FILTER([$'Nova Abilities'.G:.I]; [$'Nova Abilities'.C:.C] = [.F37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7:.$E$55]; [Build.$G$37:.$G$55]=&quot;Action&quot;);[.A37]);&quot;&quot;);&quot;&quot;)" office:value-type="string" office:string-value="Basic Attack" calcext:value-type="string">
            <text:p>Basic Attack</text:p>
          </table:table-cell>
          <table:table-cell table:formula="of:=IFERROR(IFNA(INDEX(COM.MICROSOFT.FILTER([Build.$F$37:.$F$55];[Build.$G$37:.$G$55]=&quot;Action&quot;); [.A37]);&quot;&quot;);&quot;&quot;)" office:value-type="string" office:string-value="Basic" calcext:value-type="string">
            <text:p>Basic</text:p>
          </table:table-cell>
          <table:table-cell table:number-columns-repeated="2"/>
          <table:table-cell table:style-name="ce318" table:formula="of:=IFERROR(IFNA(COM.MICROSOFT.FILTER(['Combat Abilities By Art'.$A$2:.$A$68];['Combat Abilities By Art'.$B$2:.$B$68]=[.F37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7:.$E$55]; [Build.$G$37:.$G$55]=&quot;Action&quot;);[.A38]);&quot;&quot;);&quot;&quot;)" office:value-type="string" office:string-value="Dash" calcext:value-type="string">
            <text:p>Dash</text:p>
          </table:table-cell>
          <table:table-cell table:formula="of:=IFERROR(IFNA(INDEX(COM.MICROSOFT.FILTER([Build.$F$37:.$F$55];[Build.$G$37:.$G$55]=&quot;Action&quot;); [.A38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Combat Abilities By Art'.$C$2:.$C$68]; ['Combat Abilities By Art'.$B$2:.$B$68]=[.F37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7:.$E$55]; [Build.$G$37:.$G$55]=&quot;Action&quot;);[.A39]);&quot;&quot;);&quot;&quot;)" office:value-type="string" office:string-value="Recover" calcext:value-type="string">
            <text:p>Recover</text:p>
          </table:table-cell>
          <table:table-cell table:formula="of:=IFERROR(IFNA(INDEX(COM.MICROSOFT.FILTER([Build.$F$37:.$F$55];[Build.$G$37:.$G$55]=&quot;Action&quot;); [.A39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Combat Abilities By Art'.$D$2:.$D$68]; ['Combat Abilities By Art'.$B$2:.$B$68]=[.F37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7:.$E$55]; [Build.$G$37:.$G$55]=&quot;Action&quot;);[.A40]);&quot;&quot;);&quot;&quot;)" office:value-type="string" office:string-value="Resuscitate" calcext:value-type="string">
            <text:p>Resuscitate</text:p>
          </table:table-cell>
          <table:table-cell table:formula="of:=IFERROR(IFNA(INDEX(COM.MICROSOFT.FILTER([Build.$F$37:.$F$55];[Build.$G$37:.$G$55]=&quot;Action&quot;); [.A40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7:.$E$55]; [Build.$G$37:.$G$55]=&quot;Action&quot;);[.A41]);&quot;&quot;);&quot;&quot;)" office:value-type="string" office:string-value="Piercing Shot" calcext:value-type="string">
            <text:p>Piercing Shot</text:p>
          </table:table-cell>
          <table:table-cell table:formula="of:=IFERROR(IFNA(INDEX(COM.MICROSOFT.FILTER([Build.$F$37:.$F$55];[Build.$G$37:.$G$55]=&quot;Action&quot;); [.A41]);&quot;&quot;);&quot;&quot;)" office:value-type="string" office:string-value="Archery" calcext:value-type="string">
            <text:p>Archery</text:p>
          </table:table-cell>
          <table:table-cell/>
          <table:table-cell office:value-type="float" office:value="6" calcext:value-type="float">
            <text:p>6</text:p>
          </table:table-cell>
          <table:table-cell table:style-name="ce317" table:formula="of:=IFNA(INDEX(COM.MICROSOFT.SORT([$Build.$E$37:.$G$55];3;-1);[.E42];1); &quot;&quot;)" office:value-type="string" office:string-value="Prepared Shot" calcext:value-type="string">
            <text:p>Prepared Shot</text:p>
          </table:table-cell>
          <table:table-cell table:style-name="ce178" table:formula="of:=IFERROR(IFNA(INDEX(COM.MICROSOFT.FILTER([$'Combat Abilities By Art'.$E$2:.$E$73];['Combat Abilities By Art'.$B$2:.$B$73]=[.F42]);1);&quot;&quot;);&quot;&quot;)" office:value-type="string" office:string-value="Effect: Choose one: Gain Aura 6, or Gain Aura 4 and apply 1$^b$ Mark to an enemy within 6&#10;Trigger: An enemy moves into the Aura&#10;Effect: You may make a Ranged Physical Attack against the triggering enemy,&#10;with 1$^c$ Boon if the target is Marked. &#10;If you do, end this stance and you cannot take an action during your next turn&#10;(you can still move and take a new stance).&#10;Succeed: Deal Fatigue equal to 2 plus the stacks of Mark on the target.&#10;Critical: Deal an additional 1$^a$ Fatigue " calcext:value-type="string" table:number-columns-spanned="4" table:number-rows-spanned="5">
            <text:p>Effect: Choose one: Gain Aura 6, or Gain Aura 4 and apply 1$^b$ Mark to an enemy within 6</text:p>
            <text:p>Trigger: An enemy moves into the Aura</text:p>
            <text:p>Effect: You may make a Ranged Physical Attack against the triggering enemy,</text:p>
            <text:p>with 1$^c$ Boon if the target is Marked. </text:p>
            <text:p>If you do, end this stance and you cannot take an action during your next turn</text:p>
            <text:p>(you can still move and take a new stance).</text:p>
            <text:p>Succeed: Deal Fatigue equal to 2 plus the stacks of Mark on the target.</text:p>
            <text:p>Critical: Deal an additional 1$^a$ Fatigue 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70] = [.$F42]) &lt;&gt; &quot;&quot;; COM.MICROSOFT.FILTER([$'Nova Abilities'.G:.I]; [$'Nova Abilities'.C:.C] = [.F42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7:.$E$55]; [Build.$G$37:.$G$55]=&quot;Action&quot;);[.A42]);&quot;&quot;);&quot;&quot;)">
            <text:p/>
          </table:table-cell>
          <table:table-cell table:formula="of:=IFERROR(IFNA(INDEX(COM.MICROSOFT.FILTER([Build.$F$37:.$F$55];[Build.$G$37:.$G$55]=&quot;Action&quot;); [.A42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A$2:.$A$68];['Combat Abilities By Art'.$B$2:.$B$68]=[.F42]);&quot;&quot;);&quot;&quot;)" office:value-type="string" office:string-value="Archery" calcext:value-type="string">
            <text:p>Archery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7:.$E$55]; [Build.$G$37:.$G$55]=&quot;Action&quot;);[.A43]);&quot;&quot;);&quot;&quot;)">
            <text:p/>
          </table:table-cell>
          <table:table-cell table:formula="of:=IFERROR(IFNA(INDEX(COM.MICROSOFT.FILTER([Build.$F$37:.$F$55];[Build.$G$37:.$G$55]=&quot;Action&quot;); [.A43]);&quot;&quot;);&quot;&quot;)">
            <text:p/>
          </table:table-cell>
          <table:table-cell table:number-columns-repeated="2"/>
          <table:table-cell table:formula="of:=IFERROR(IFNA(COM.MICROSOFT.FILTER(['Combat Abilities By Art'.$C$2:.$C$68]; ['Combat Abilities By Art'.$B$2:.$B$68]=[.F42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7:.$E$55]; [Build.$G$37:.$G$55]=&quot;Action&quot;);[.A44]);&quot;&quot;);&quot;&quot;)">
            <text:p/>
          </table:table-cell>
          <table:table-cell table:formula="of:=IFERROR(IFNA(INDEX(COM.MICROSOFT.FILTER([Build.$F$37:.$F$55];[Build.$G$37:.$G$55]=&quot;Action&quot;); [.A44]);&quot;&quot;);&quot;&quot;)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F42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7:.$E$55]; [Build.$G$37:.$G$55]=&quot;Action&quot;);[.A45]);&quot;&quot;);&quot;&quot;)">
            <text:p/>
          </table:table-cell>
          <table:table-cell table:formula="of:=IFERROR(IFNA(INDEX(COM.MICROSOFT.FILTER([Build.$F$37:.$F$55];[Build.$G$37:.$G$55]=&quot;Action&quot;); [.A45]);&quot;&quot;);&quot;&quot;)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7:.$E$55]; [Build.$G$37:.$G$55]=&quot;Action&quot;);[.A46]);&quot;&quot;);&quot;&quot;)">
            <text:p/>
          </table:table-cell>
          <table:table-cell table:formula="of:=IFERROR(IFNA(INDEX(COM.MICROSOFT.FILTER([Build.$F$37:.$F$55];[Build.$G$37:.$G$55]=&quot;Action&quot;); [.A46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317" table:formula="of:=IFNA(INDEX(COM.MICROSOFT.SORT([$Build.$E$37:.$G$55];3;-1);[.E47];1); &quot;&quot;)" office:value-type="string" office:string-value="Study" calcext:value-type="string">
            <text:p>Study</text:p>
          </table:table-cell>
          <table:table-cell table:style-name="ce178" table:formula="of:=IFERROR(IFNA(INDEX(COM.MICROSOFT.FILTER([$'Combat Abilities By Art'.$E$2:.$E$73];['Combat Abilities By Art'.$B$2:.$B$73]=[.F47]);1);&quot;&quot;);&quot;&quot;)" office:value-type="string" office:string-value="Range: 3&#10;Target: One enemy&#10;Effect: The target gains +1 Mark, you become Hidden, and gain Aura 1$^b$&#10;Trigger: A enemy with Mark enters a square in the Aura&#10;Effect: The triggering enemy immediately gains +1$^a$ Mark " calcext:value-type="string" table:number-columns-spanned="4" table:number-rows-spanned="5">
            <text:p>Range: 3</text:p>
            <text:p>Target: One enemy</text:p>
            <text:p>Effect: The target gains +1 Mark, you become Hidden, and gain Aura 1$^b$</text:p>
            <text:p>Trigger: A enemy with Mark enters a square in the Aura</text:p>
            <text:p>Effect: The triggering enemy immediately gains +1$^a$ Mark 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70] = [.$F47]) &lt;&gt; &quot;&quot;; COM.MICROSOFT.FILTER([$'Nova Abilities'.G:.I]; [$'Nova Abilities'.C:.C] = [.F47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7:.$E$55]; [Build.$G$37:.$G$55]=&quot;Action&quot;);[.A47]);&quot;&quot;);&quot;&quot;)">
            <text:p/>
          </table:table-cell>
          <table:table-cell table:formula="of:=IFERROR(IFNA(INDEX(COM.MICROSOFT.FILTER([Build.$F$37:.$F$55];[Build.$G$37:.$G$55]=&quot;Action&quot;); [.A47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A$2:.$A$68];['Combat Abilities By Art'.$B$2:.$B$68]=[.F47]);&quot;&quot;);&quot;&quot;)" office:value-type="string" office:string-value="Ninjutsu" calcext:value-type="string">
            <text:p>Ninjutsu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7:.$E$55]; [Build.$G$37:.$G$55]=&quot;Action&quot;);[.A48]);&quot;&quot;);&quot;&quot;)">
            <text:p/>
          </table:table-cell>
          <table:table-cell table:formula="of:=IFERROR(IFNA(INDEX(COM.MICROSOFT.FILTER([Build.$F$37:.$F$55];[Build.$G$37:.$G$55]=&quot;Action&quot;); [.A48]);&quot;&quot;);&quot;&quot;)">
            <text:p/>
          </table:table-cell>
          <table:table-cell table:number-columns-repeated="2"/>
          <table:table-cell table:formula="of:=IFERROR(IFNA(COM.MICROSOFT.FILTER(['Combat Abilities By Art'.$C$2:.$C$68]; ['Combat Abilities By Art'.$B$2:.$B$68]=[.F47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7:.$E$55]; [Build.$G$37:.$G$55]=&quot;Action&quot;);[.A49]);&quot;&quot;);&quot;&quot;)">
            <text:p/>
          </table:table-cell>
          <table:table-cell table:formula="of:=IFERROR(IFNA(INDEX(COM.MICROSOFT.FILTER([Build.$F$37:.$F$55];[Build.$G$37:.$G$55]=&quot;Action&quot;); [.A49]);&quot;&quot;);&quot;&quot;)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F47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formula="of:=IFERROR(IFNA(INDEX(COM.MICROSOFT.FILTER([Build.$E$37:.$E$55]; [Build.$G$37:.$G$55]=&quot;Action&quot;);[.A50]);&quot;&quot;);&quot;&quot;)">
            <text:p/>
          </table:table-cell>
          <table:table-cell table:formula="of:=IFERROR(IFNA(INDEX(COM.MICROSOFT.FILTER([Build.$F$37:.$F$55];[Build.$G$37:.$G$55]=&quot;Action&quot;); [.A50]);&quot;&quot;);&quot;&quot;)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172"/>
          <table:table-cell table:style-name="ce10" office:value-type="string" calcext:value-type="string" table:number-columns-spanned="2" table:number-rows-spanned="1">
            <text:p>STANCES</text:p>
          </table:table-cell>
          <table:covered-table-cell table:style-name="ce192"/>
          <table:table-cell/>
          <table:table-cell office:value-type="float" office:value="8" calcext:value-type="float">
            <text:p>8</text:p>
          </table:table-cell>
          <table:table-cell table:style-name="ce317" table:formula="of:=IFNA(INDEX(COM.MICROSOFT.SORT([$Build.$E$37:.$G$55];3;-1);[.E52];1); &quot;&quot;)" office:value-type="string" office:string-value="Quiet Mind" calcext:value-type="string">
            <text:p>Quiet Mind</text:p>
          </table:table-cell>
          <table:table-cell table:style-name="ce178" table:formula="of:=IFERROR(IFNA(INDEX(COM.MICROSOFT.FILTER([$'Combat Abilities By Art'.$E$2:.$E$73];['Combat Abilities By Art'.$B$2:.$B$73]=[.F52]);1);&quot;&quot;);&quot;&quot;)" office:value-type="string" office:string-value="Trigger: You make an Evasion roll&#10;Effect: If you Critically Succeeded, you may remove 2$^a$ stacks of any one status&#10;from yourself after the attack resolves. Otherwise, you may treat the outcome&#10;as one category better than the roll. In either case, end this stance.  " calcext:value-type="string" table:number-columns-spanned="4" table:number-rows-spanned="5">
            <text:p>Trigger: You make an Evasion roll</text:p>
            <text:p>Effect: If you Critically Succeeded, you may remove 2$^a$ stacks of any one status</text:p>
            <text:p>from yourself after the attack resolves. Otherwise, you may treat the outcome</text:p>
            <text:p>as one category better than the roll. In either case, end this stance.  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70] = [.$F52]) &lt;&gt; &quot;&quot;; COM.MICROSOFT.FILTER([$'Nova Abilities'.G:.I]; [$'Nova Abilities'.C:.C] = [.F52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87" office:value-type="string" calcext:value-type="string">
            <text:p>Art</text:p>
          </table:table-cell>
          <table:table-cell table:number-columns-repeated="2"/>
          <table:table-cell table:style-name="ce318" table:formula="of:=IFERROR(IFNA(COM.MICROSOFT.FILTER(['Combat Abilities By Art'.$A$2:.$A$68];['Combat Abilities By Art'.$B$2:.$B$68]=[.F52]);&quot;&quot;);&quot;&quot;)" office:value-type="string" office:string-value="Ninjutsu" calcext:value-type="string">
            <text:p>Ninjutsu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7:.$E$55]; [Build.$G$37:.$G$55]=&quot;Stance&quot;);[.A53]);&quot;&quot;);&quot;&quot;)" office:value-type="string" office:string-value="Brace" calcext:value-type="string">
            <text:p>Brace</text:p>
          </table:table-cell>
          <table:table-cell table:formula="of:=IFERROR(IFNA(INDEX(COM.MICROSOFT.FILTER([Build.$F$37:.$F$55];[Build.$G$37:.$G$55]=&quot;Stance&quot;); [.A53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Combat Abilities By Art'.$C$2:.$C$68]; ['Combat Abilities By Art'.$B$2:.$B$68]=[.F52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7:.$E$55]; [Build.$G$37:.$G$55]=&quot;Stance&quot;);[.A54]);&quot;&quot;);&quot;&quot;)" office:value-type="string" office:string-value="Dodge" calcext:value-type="string">
            <text:p>Dodge</text:p>
          </table:table-cell>
          <table:table-cell table:formula="of:=IFERROR(IFNA(INDEX(COM.MICROSOFT.FILTER([Build.$F$37:.$F$55];[Build.$G$37:.$G$55]=&quot;Stance&quot;); [.A54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Combat Abilities By Art'.$D$2:.$D$68]; ['Combat Abilities By Art'.$B$2:.$B$68]=[.F52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7:.$E$55]; [Build.$G$37:.$G$55]=&quot;Stance&quot;);[.A55]);&quot;&quot;);&quot;&quot;)" office:value-type="string" office:string-value="Concentrate" calcext:value-type="string">
            <text:p>Concentrate</text:p>
          </table:table-cell>
          <table:table-cell table:formula="of:=IFERROR(IFNA(INDEX(COM.MICROSOFT.FILTER([Build.$F$37:.$F$55];[Build.$G$37:.$G$55]=&quot;Stance&quot;); [.A55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7:.$E$55]; [Build.$G$37:.$G$55]=&quot;Stance&quot;);[.A56]);&quot;&quot;);&quot;&quot;)" office:value-type="string" office:string-value="Assist" calcext:value-type="string">
            <text:p>Assist</text:p>
          </table:table-cell>
          <table:table-cell table:formula="of:=IFERROR(IFNA(INDEX(COM.MICROSOFT.FILTER([Build.$F$37:.$F$55];[Build.$G$37:.$G$55]=&quot;Stance&quot;); [.A56]);&quot;&quot;);&quot;&quot;)" office:value-type="string" office:string-value="Basic" calcext:value-type="string">
            <text:p>Basic</text:p>
          </table:table-cell>
          <table:table-cell/>
          <table:table-cell office:value-type="float" office:value="9" calcext:value-type="float">
            <text:p>9</text:p>
          </table:table-cell>
          <table:table-cell table:style-name="ce317" table:formula="of:=IFNA(INDEX(COM.MICROSOFT.SORT([$Build.$E$37:.$G$55];3;-1);[.E57];1); &quot;&quot;)" office:value-type="string" office:string-value="Basic Attack" calcext:value-type="string">
            <text:p>Basic Attack</text:p>
          </table:table-cell>
          <table:table-cell table:style-name="ce178" table:formula="of:=IFERROR(IFNA(INDEX(COM.MICROSOFT.FILTER([$'Combat Abilities By Art'.$E$2:.$E$73];['Combat Abilities By Art'.$B$2:.$B$73]=[.F57]);1);&quot;&quot;);&quot;&quot;)" office:value-type="string" office:string-value="Range: 3&#10;Target: One enemy&#10;Effect: Roll an attack using your highest Combat Art modifier&#10;Success: Deal 2 Fatigue " calcext:value-type="string" table:number-columns-spanned="4" table:number-rows-spanned="5">
            <text:p>Range: 3</text:p>
            <text:p>Target: One enemy</text:p>
            <text:p>Effect: Roll an attack using your highest Combat Art modifier</text:p>
            <text:p>Success: Deal 2 Fatigue 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70] = [.$F57]) &lt;&gt; &quot;&quot;; COM.MICROSOFT.FILTER([$'Nova Abilities'.G:.I]; [$'Nova Abilities'.C:.C] = [.F57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7:.$E$55]; [Build.$G$37:.$G$55]=&quot;Stance&quot;);[.A57]);&quot;&quot;);&quot;&quot;)" office:value-type="string" office:string-value="Protect" calcext:value-type="string">
            <text:p>Protect</text:p>
          </table:table-cell>
          <table:table-cell table:formula="of:=IFERROR(IFNA(INDEX(COM.MICROSOFT.FILTER([Build.$F$37:.$F$55];[Build.$G$37:.$G$55]=&quot;Stance&quot;); [.A57]);&quot;&quot;);&quot;&quot;)" office:value-type="string" office:string-value="Basic" calcext:value-type="string">
            <text:p>Basic</text:p>
          </table:table-cell>
          <table:table-cell table:number-columns-repeated="2"/>
          <table:table-cell table:style-name="ce318" table:formula="of:=IFERROR(IFNA(COM.MICROSOFT.FILTER(['Combat Abilities By Art'.$A$2:.$A$68];['Combat Abilities By Art'.$B$2:.$B$68]=[.F57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7:.$E$55]; [Build.$G$37:.$G$55]=&quot;Stance&quot;);[.A58]);&quot;&quot;);&quot;&quot;)" office:value-type="string" office:string-value="Prepared Shot" calcext:value-type="string">
            <text:p>Prepared Shot</text:p>
          </table:table-cell>
          <table:table-cell table:formula="of:=IFERROR(IFNA(INDEX(COM.MICROSOFT.FILTER([Build.$F$37:.$F$55];[Build.$G$37:.$G$55]=&quot;Stance&quot;); [.A58]);&quot;&quot;);&quot;&quot;)" office:value-type="string" office:string-value="Archery" calcext:value-type="string">
            <text:p>Archery</text:p>
          </table:table-cell>
          <table:table-cell table:number-columns-repeated="2"/>
          <table:table-cell table:formula="of:=IFERROR(IFNA(COM.MICROSOFT.FILTER(['Combat Abilities By Art'.$C$2:.$C$68]; ['Combat Abilities By Art'.$B$2:.$B$68]=[.F57]);&quot;&quot;);&quot;&quot;)" office:value-type="string" office:string-value="Action" calcext:value-type="string">
            <text:p>Action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7:.$E$55]; [Build.$G$37:.$G$55]=&quot;Stance&quot;);[.A59]);&quot;&quot;);&quot;&quot;)" office:value-type="string" office:string-value="Study" calcext:value-type="string">
            <text:p>Study</text:p>
          </table:table-cell>
          <table:table-cell table:formula="of:=IFERROR(IFNA(INDEX(COM.MICROSOFT.FILTER([Build.$F$37:.$F$55];[Build.$G$37:.$G$55]=&quot;Stance&quot;); [.A59]);&quot;&quot;);&quot;&quot;)" office:value-type="string" office:string-value="Ninjutsu" calcext:value-type="string">
            <text:p>Ninjutsu</text:p>
          </table:table-cell>
          <table:table-cell table:number-columns-repeated="2"/>
          <table:table-cell table:formula="of:=IFERROR(IFNA(COM.MICROSOFT.FILTER(['Combat Abilities By Art'.$D$2:.$D$68]; ['Combat Abilities By Art'.$B$2:.$B$68]=[.F57]);&quot;&quot;);&quot;&quot;)" office:value-type="string" office:string-value="Physical Attack, Ranged" calcext:value-type="string">
            <text:p>Physical Attack, Ranged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7:.$E$55]; [Build.$G$37:.$G$55]=&quot;Stance&quot;);[.A60]);&quot;&quot;);&quot;&quot;)" office:value-type="string" office:string-value="Quiet Mind" calcext:value-type="string">
            <text:p>Quiet Mind</text:p>
          </table:table-cell>
          <table:table-cell table:formula="of:=IFERROR(IFNA(INDEX(COM.MICROSOFT.FILTER([Build.$F$37:.$F$55];[Build.$G$37:.$G$55]=&quot;Stance&quot;); [.A60]);&quot;&quot;);&quot;&quot;)" office:value-type="string" office:string-value="Ninjutsu" calcext:value-type="string">
            <text:p>Ninjutsu</text:p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7:.$E$55]; [Build.$G$37:.$G$55]=&quot;Stance&quot;);[.A61]);&quot;&quot;);&quot;&quot;)">
            <text:p/>
          </table:table-cell>
          <table:table-cell table:formula="of:=IFERROR(IFNA(INDEX(COM.MICROSOFT.FILTER([Build.$F$37:.$F$55];[Build.$G$37:.$G$55]=&quot;Stance&quot;); [.A61]);&quot;&quot;);&quot;&quot;)"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style-name="ce317" table:formula="of:=IFNA(INDEX(COM.MICROSOFT.SORT([$Build.$E$37:.$G$55];3;-1);[.E62];1); &quot;&quot;)" office:value-type="string" office:string-value="Dash" calcext:value-type="string">
            <text:p>Dash</text:p>
          </table:table-cell>
          <table:table-cell table:style-name="ce178" table:formula="of:=IFERROR(IFNA(INDEX(COM.MICROSOFT.FILTER([$'Combat Abilities By Art'.$E$2:.$E$73];['Combat Abilities By Art'.$B$2:.$B$73]=[.F62]);1);&quot;&quot;);&quot;&quot;)" office:value-type="string" office:string-value="Effect: Move a number of spaces up to your speed  " calcext:value-type="string" table:number-columns-spanned="4" table:number-rows-spanned="5">
            <text:p>Effect: Move a number of spaces up to your speed <text:s/>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70] = [.$F62]) &lt;&gt; &quot;&quot;; COM.MICROSOFT.FILTER([$'Nova Abilities'.G:.I]; [$'Nova Abilities'.C:.C] = [.F62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7:.$E$55]; [Build.$G$37:.$G$55]=&quot;Stance&quot;);[.A62]);&quot;&quot;);&quot;&quot;)">
            <text:p/>
          </table:table-cell>
          <table:table-cell table:formula="of:=IFERROR(IFNA(INDEX(COM.MICROSOFT.FILTER([Build.$F$37:.$F$55];[Build.$G$37:.$G$55]=&quot;Stance&quot;); [.A62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A$2:.$A$68];['Combat Abilities By Art'.$B$2:.$B$68]=[.F62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7:.$E$55]; [Build.$G$37:.$G$55]=&quot;Stance&quot;);[.A63]);&quot;&quot;);&quot;&quot;)">
            <text:p/>
          </table:table-cell>
          <table:table-cell table:formula="of:=IFERROR(IFNA(INDEX(COM.MICROSOFT.FILTER([Build.$F$37:.$F$55];[Build.$G$37:.$G$55]=&quot;Stance&quot;); [.A63]);&quot;&quot;);&quot;&quot;)">
            <text:p/>
          </table:table-cell>
          <table:table-cell table:number-columns-repeated="2"/>
          <table:table-cell table:formula="of:=IFERROR(IFNA(COM.MICROSOFT.FILTER(['Combat Abilities By Art'.$C$2:.$C$68]; ['Combat Abilities By Art'.$B$2:.$B$68]=[.F62]);&quot;&quot;);&quot;&quot;)" office:value-type="string" office:string-value="Action" calcext:value-type="string">
            <text:p>Action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7:.$E$55]; [Build.$G$37:.$G$55]=&quot;Stance&quot;);[.A64]);&quot;&quot;);&quot;&quot;)">
            <text:p/>
          </table:table-cell>
          <table:table-cell table:formula="of:=IFERROR(IFNA(INDEX(COM.MICROSOFT.FILTER([Build.$F$37:.$F$55];[Build.$G$37:.$G$55]=&quot;Stance&quot;); [.A64]);&quot;&quot;);&quot;&quot;)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F62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7:.$E$55]; [Build.$G$37:.$G$55]=&quot;Stance&quot;);[.A65]);&quot;&quot;);&quot;&quot;)">
            <text:p/>
          </table:table-cell>
          <table:table-cell table:formula="of:=IFERROR(IFNA(INDEX(COM.MICROSOFT.FILTER([Build.$F$37:.$F$55];[Build.$G$37:.$G$55]=&quot;Stance&quot;); [.A65]);&quot;&quot;);&quot;&quot;)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/>
          <table:table-cell table:formula="of:=IFERROR(IFNA(INDEX(COM.MICROSOFT.FILTER([Build.$E$37:.$E$55]; [Build.$G$37:.$G$55]=&quot;Stance&quot;);[.A66]);&quot;&quot;);&quot;&quot;)">
            <text:p/>
          </table:table-cell>
          <table:table-cell table:formula="of:=IFERROR(IFNA(INDEX(COM.MICROSOFT.FILTER([Build.$F$37:.$F$55];[Build.$G$37:.$G$55]=&quot;Stance&quot;); [.A66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317" table:formula="of:=IFNA(INDEX(COM.MICROSOFT.SORT([$Build.$E$37:.$G$55];3;-1);[.E67];1); &quot;&quot;)" office:value-type="string" office:string-value="Recover" calcext:value-type="string">
            <text:p>Recover</text:p>
          </table:table-cell>
          <table:table-cell table:style-name="ce178" table:formula="of:=IFERROR(IFNA(INDEX(COM.MICROSOFT.FILTER([$'Combat Abilities By Art'.$E$2:.$E$73];['Combat Abilities By Art'.$B$2:.$B$73]=[.F67]);1);&quot;&quot;);&quot;&quot;)" office:value-type="string" office:string-value="Target: Self&#10;Effect: Reduce current Fatigue or Stress by 1 or end one Status " calcext:value-type="string" table:number-columns-spanned="4" table:number-rows-spanned="5">
            <text:p>Target: Self</text:p>
            <text:p>Effect: Reduce current Fatigue or Stress by 1 or end one Status 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70] = [.$F67]) &lt;&gt; &quot;&quot;; COM.MICROSOFT.FILTER([$'Nova Abilities'.G:.I]; [$'Nova Abilities'.C:.C] = [.F67]); &quot;&quot;))" table:number-columns-spanned="1" table:number-rows-spanned="5">
            <text:p/>
          </table:table-cell>
          <table:table-cell table:number-columns-repeated="5"/>
        </table:table-row>
        <table:table-row table:style-name="ro5">
          <table:table-cell/>
          <table:table-cell table:style-name="ce10" office:value-type="string" calcext:value-type="string" table:number-columns-spanned="2" table:number-rows-spanned="1">
            <text:p>PASSIVE ABILITIES</text:p>
          </table:table-cell>
          <table:covered-table-cell table:style-name="ce2"/>
          <table:table-cell table:number-columns-repeated="2"/>
          <table:table-cell table:style-name="ce318" table:formula="of:=IFERROR(IFNA(COM.MICROSOFT.FILTER(['Combat Abilities By Art'.$A$2:.$A$68];['Combat Abilities By Art'.$B$2:.$B$68]=[.F67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formula="of:=IFERROR(IFNA(COM.MICROSOFT.FILTER(['Combat Abilities By Art'.$C$2:.$C$68]; ['Combat Abilities By Art'.$B$2:.$B$68]=[.F67]);&quot;&quot;);&quot;&quot;)" office:value-type="string" office:string-value="Action" calcext:value-type="string">
            <text:p>Action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7:.$E$55]; [Build.$G$37:.$G$55]=&quot;Passive&quot;);[.A69]);&quot;&quot;);&quot;&quot;)">
            <text:p/>
          </table:table-cell>
          <table:table-cell table:formula="of:=IFERROR(IFNA(INDEX(COM.MICROSOFT.FILTER([Build.$F$37:.$F$55];[Build.$G$37:.$G$55]=&quot;Passive&quot;); [.A69]);&quot;&quot;);&quot;&quot;)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F67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7:.$E$55]; [Build.$G$37:.$G$55]=&quot;Passive&quot;);[.A70]);&quot;&quot;);&quot;&quot;)">
            <text:p/>
          </table:table-cell>
          <table:table-cell table:formula="of:=IFERROR(IFNA(INDEX(COM.MICROSOFT.FILTER([Build.$F$37:.$F$55];[Build.$G$37:.$G$55]=&quot;Passive&quot;); [.A70]);&quot;&quot;);&quot;&quot;)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7:.$E$55]; [Build.$G$37:.$G$55]=&quot;Passive&quot;);[.A71]);&quot;&quot;);&quot;&quot;)">
            <text:p/>
          </table:table-cell>
          <table:table-cell table:formula="of:=IFERROR(IFNA(INDEX(COM.MICROSOFT.FILTER([Build.$F$37:.$F$55];[Build.$G$37:.$G$55]=&quot;Passive&quot;); [.A71]);&quot;&quot;);&quot;&quot;)"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style-name="ce317" table:formula="of:=IFNA(INDEX(COM.MICROSOFT.SORT([$Build.$E$37:.$G$55];3;-1);[.E72];1); &quot;&quot;)" office:value-type="string" office:string-value="Resuscitate" calcext:value-type="string">
            <text:p>Resuscitate</text:p>
          </table:table-cell>
          <table:table-cell table:style-name="ce178" table:formula="of:=IFERROR(IFNA(INDEX(COM.MICROSOFT.FILTER([$'Combat Abilities By Art'.$E$2:.$E$73];['Combat Abilities By Art'.$B$2:.$B$73]=[.F72]);1);&quot;&quot;);&quot;&quot;)" office:value-type="string" office:string-value="Range: 1&#10;Target: One ally who is Incapacitated&#10;Effect: The target is no longer Incapacitated, their Fatigue and&#10;Stress are halved (round down), and they clear any negative statuses" calcext:value-type="string" table:number-columns-spanned="4" table:number-rows-spanned="5">
            <text:p>Range: 1</text:p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70] = [.$F72]) &lt;&gt; &quot;&quot;; COM.MICROSOFT.FILTER([$'Nova Abilities'.G:.I]; [$'Nova Abilities'.C:.C] = [.F72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7:.$E$55]; [Build.$G$37:.$G$55]=&quot;Passive&quot;);[.A72]);&quot;&quot;);&quot;&quot;)">
            <text:p/>
          </table:table-cell>
          <table:table-cell table:formula="of:=IFERROR(IFNA(INDEX(COM.MICROSOFT.FILTER([Build.$F$37:.$F$55];[Build.$G$37:.$G$55]=&quot;Passive&quot;); [.A72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A$2:.$A$68];['Combat Abilities By Art'.$B$2:.$B$68]=[.F72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7:.$E$55]; [Build.$G$37:.$G$55]=&quot;Passive&quot;);[.A73]);&quot;&quot;);&quot;&quot;)">
            <text:p/>
          </table:table-cell>
          <table:table-cell table:formula="of:=IFERROR(IFNA(INDEX(COM.MICROSOFT.FILTER([Build.$F$37:.$F$55];[Build.$G$37:.$G$55]=&quot;Passive&quot;); [.A73]);&quot;&quot;);&quot;&quot;)">
            <text:p/>
          </table:table-cell>
          <table:table-cell table:number-columns-repeated="2"/>
          <table:table-cell table:formula="of:=IFERROR(IFNA(COM.MICROSOFT.FILTER(['Combat Abilities By Art'.$C$2:.$C$68]; ['Combat Abilities By Art'.$B$2:.$B$68]=[.F72]);&quot;&quot;);&quot;&quot;)" office:value-type="string" office:string-value="Action" calcext:value-type="string">
            <text:p>Action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7:.$E$55]; [Build.$G$37:.$G$55]=&quot;Passive&quot;);[.A74]);&quot;&quot;);&quot;&quot;)">
            <text:p/>
          </table:table-cell>
          <table:table-cell table:formula="of:=IFERROR(IFNA(INDEX(COM.MICROSOFT.FILTER([Build.$F$37:.$F$55];[Build.$G$37:.$G$55]=&quot;Passive&quot;); [.A74]);&quot;&quot;);&quot;&quot;)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F72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7:.$E$55]; [Build.$G$37:.$G$55]=&quot;Passive&quot;);[.A75]);&quot;&quot;);&quot;&quot;)">
            <text:p/>
          </table:table-cell>
          <table:table-cell table:formula="of:=IFERROR(IFNA(INDEX(COM.MICROSOFT.FILTER([Build.$F$37:.$F$55];[Build.$G$37:.$G$55]=&quot;Passive&quot;); [.A75]);&quot;&quot;);&quot;&quot;)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7:.$E$55]; [Build.$G$37:.$G$55]=&quot;Passive&quot;);[.A76]);&quot;&quot;);&quot;&quot;)">
            <text:p/>
          </table:table-cell>
          <table:table-cell table:formula="of:=IFERROR(IFNA(INDEX(COM.MICROSOFT.FILTER([Build.$F$37:.$F$55];[Build.$G$37:.$G$55]=&quot;Passive&quot;); [.A76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317" table:formula="of:=IFNA(INDEX(COM.MICROSOFT.SORT([$Build.$E$37:.$G$55];3;-1);[.E77];1); &quot;&quot;)" office:value-type="string" office:string-value="Piercing Shot" calcext:value-type="string">
            <text:p>Piercing Shot</text:p>
          </table:table-cell>
          <table:table-cell table:style-name="ce178" table:formula="of:=IFERROR(IFNA(INDEX(COM.MICROSOFT.FILTER([$'Combat Abilities By Art'.$E$2:.$E$73];['Combat Abilities By Art'.$B$2:.$B$73]=[.F77]);1);&quot;&quot;);&quot;&quot;)" office:value-type="string" office:string-value="Range: 6&#10;Target: One enemy&#10;Special: Targeting and effects from this ability do not trigger any&#10;Triggered Effects granted by enemy abilities&#10;Succeed: Deal 2 Fatigue&#10;Critical: Deal an additional 1$^a$ Fatigue" calcext:value-type="string" table:number-columns-spanned="4" table:number-rows-spanned="5">
            <text:p>Range: 6</text:p>
            <text:p>Target: One enemy</text:p>
            <text:p>Special: Targeting and effects from this ability do not trigger any</text:p>
            <text:p>Triggered Effects granted by enemy abilities</text:p>
            <text:p>Succeed: Deal 2 Fatigue</text:p>
            <text:p>Critical: Deal an additional 1$^a$ Fatigue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70] = [.$F77]) &lt;&gt; &quot;&quot;; COM.MICROSOFT.FILTER([$'Nova Abilities'.G:.I]; [$'Nova Abilities'.C:.C] = [.F77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/>
          <table:table-cell table:formula="of:=IFERROR(IFNA(INDEX(COM.MICROSOFT.FILTER([Build.$E$37:.$E$55]; [Build.$G$37:.$G$55]=&quot;Passive&quot;);[.A77]);&quot;&quot;);&quot;&quot;)">
            <text:p/>
          </table:table-cell>
          <table:table-cell table:formula="of:=IFERROR(IFNA(INDEX(COM.MICROSOFT.FILTER([Build.$F$37:.$F$55];[Build.$G$37:.$G$55]=&quot;Passive&quot;); [.A77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A$2:.$A$68];['Combat Abilities By Art'.$B$2:.$B$68]=[.F77]);&quot;&quot;);&quot;&quot;)" office:value-type="string" office:string-value="Archery" calcext:value-type="string">
            <text:p>Archery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C$2:.$C$68]; ['Combat Abilities By Art'.$B$2:.$B$68]=[.F77]);&quot;&quot;);&quot;&quot;)" office:value-type="string" office:string-value="Action" calcext:value-type="string">
            <text:p>Action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D$2:.$D$68]; ['Combat Abilities By Art'.$B$2:.$B$68]=[.F77]);&quot;&quot;);&quot;&quot;)" office:value-type="string" office:string-value="Physical Attack, Ranged, Finisher" calcext:value-type="string">
            <text:p>Physical Attack, Ranged, Finisher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office:value-type="float" office:value="14" calcext:value-type="float">
            <text:p>14</text:p>
          </table:table-cell>
          <table:table-cell table:style-name="ce317" table:formula="of:=IFNA(INDEX(COM.MICROSOFT.SORT([$Build.$E$37:.$G$55];3;-1);[.E82];1); &quot;&quot;)">
            <text:p/>
          </table:table-cell>
          <table:table-cell table:style-name="ce178" table:formula="of:=IFERROR(IFNA(INDEX(COM.MICROSOFT.FILTER([$'Combat Abilities By Art'.$E$2:.$E$73];['Combat Abilities By Art'.$B$2:.$B$73]=[.F82]);1);&quot;&quot;);&quot;&quot;)" table:number-columns-spanned="4" table:number-rows-spanned="5">
            <text:p/>
          </table:table-cell>
          <table:covered-table-cell table:number-columns-repeated="3"/>
          <table:table-cell table:style-name="ce256" table:formula="of:=COM.MICROSOFT.TEXTJOIN(CHAR(10); 1; IF(COM.MICROSOFT.FILTER([$Build.$H$37:.$J$70]; [$Build.$E$37:.$E$70] = [.$F82]) &lt;&gt; &quot;&quot;; COM.MICROSOFT.FILTER([$'Nova Abilities'.G:.I]; [$'Nova Abilities'.C:.C] = [.F82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style-name="ce318" table:formula="of:=IFERROR(IFNA(COM.MICROSOFT.FILTER(['Combat Abilities By Art'.$A$2:.$A$68];['Combat Abilities By Art'.$B$2:.$B$68]=[.F82]);&quot;&quot;);&quot;&quot;)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C$2:.$C$68]; ['Combat Abilities By Art'.$B$2:.$B$68]=[.F82]);&quot;&quot;);&quot;&quot;)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D$2:.$D$68]; ['Combat Abilities By Art'.$B$2:.$B$68]=[.F82]);&quot;&quot;);&quot;&quot;)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office:value-type="float" office:value="15" calcext:value-type="float">
            <text:p>15</text:p>
          </table:table-cell>
          <table:table-cell table:style-name="ce317" table:formula="of:=IFNA(INDEX(COM.MICROSOFT.SORT([$Build.$E$37:.$G$55];3;-1);[.E87];1); &quot;&quot;)">
            <text:p/>
          </table:table-cell>
          <table:table-cell table:style-name="ce178" table:formula="of:=IFERROR(IFNA(INDEX(COM.MICROSOFT.FILTER([$'Combat Abilities By Art'.$E$2:.$E$73];['Combat Abilities By Art'.$B$2:.$B$73]=[.F87]);1);&quot;&quot;);&quot;&quot;)" table:number-columns-spanned="4" table:number-rows-spanned="5">
            <text:p/>
          </table:table-cell>
          <table:covered-table-cell table:number-columns-repeated="3"/>
          <table:table-cell table:style-name="ce256" table:formula="of:=COM.MICROSOFT.TEXTJOIN(CHAR(10); 1; IF(COM.MICROSOFT.FILTER([$Build.$H$37:.$J$70]; [$Build.$E$37:.$E$70] = [.$F87]) &lt;&gt; &quot;&quot;; COM.MICROSOFT.FILTER([$'Nova Abilities'.G:.I]; [$'Nova Abilities'.C:.C] = [.F87]); &quot;&quot;))" table:number-columns-spanned="1" table:number-rows-spanned="5">
            <text:p/>
          </table:table-cell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style-name="ce318" table:formula="of:=IFERROR(IFNA(COM.MICROSOFT.FILTER(['Combat Abilities By Art'.$A$2:.$A$68];['Combat Abilities By Art'.$B$2:.$B$68]=[.F87]);&quot;&quot;);&quot;&quot;)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C$2:.$C$68]; ['Combat Abilities By Art'.$B$2:.$B$68]=[.F87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D$2:.$D$68]; ['Combat Abilities By Art'.$B$2:.$B$68]=[.F87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3"/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office:value-type="float" office:value="16" calcext:value-type="float">
            <text:p>16</text:p>
          </table:table-cell>
          <table:table-cell table:style-name="ce317" table:formula="of:=IFNA(INDEX(COM.MICROSOFT.SORT([$Build.$E$37:.$G$55];3;-1);[.E92];1); &quot;&quot;)">
            <text:p/>
          </table:table-cell>
          <table:table-cell table:style-name="ce178" table:formula="of:=IFERROR(IFNA(INDEX(COM.MICROSOFT.FILTER([$'Combat Abilities By Art'.$E$2:.$E$73];['Combat Abilities By Art'.$B$2:.$B$73]=[.F92]);1);&quot;&quot;);&quot;&quot;)" table:number-columns-spanned="4" table:number-rows-spanned="5">
            <text:p/>
          </table:table-cell>
          <table:covered-table-cell table:number-columns-repeated="3"/>
          <table:table-cell table:style-name="ce256" table:formula="of:=COM.MICROSOFT.TEXTJOIN(CHAR(10); 1; IF(COM.MICROSOFT.FILTER([$Build.$H$37:.$J$70]; [$Build.$E$37:.$E$70] = [.$F92]) &lt;&gt; &quot;&quot;; COM.MICROSOFT.FILTER([$'Nova Abilities'.G:.I]; [$'Nova Abilities'.C:.C] = [.F92]); &quot;&quot;))" table:number-columns-spanned="1" table:number-rows-spanned="5">
            <text:p/>
          </table:table-cell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style-name="ce318" table:formula="of:=IFERROR(IFNA(COM.MICROSOFT.FILTER(['Combat Abilities By Art'.$A$2:.$A$68];['Combat Abilities By Art'.$B$2:.$B$68]=[.F92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C$2:.$C$68]; ['Combat Abilities By Art'.$B$2:.$B$68]=[.F92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D$2:.$D$68]; ['Combat Abilities By Art'.$B$2:.$B$68]=[.F92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3"/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office:value-type="float" office:value="17" calcext:value-type="float">
            <text:p>17</text:p>
          </table:table-cell>
          <table:table-cell table:style-name="ce317" table:formula="of:=IFNA(INDEX(COM.MICROSOFT.SORT([$Build.$E$37:.$G$55];3;-1);[.E97];1); &quot;&quot;)">
            <text:p/>
          </table:table-cell>
          <table:table-cell table:style-name="ce178" table:formula="of:=IFERROR(IFNA(INDEX(COM.MICROSOFT.FILTER([$'Combat Abilities By Art'.$E$2:.$E$73];['Combat Abilities By Art'.$B$2:.$B$73]=[.F97]);1);&quot;&quot;);&quot;&quot;)" table:number-columns-spanned="4" table:number-rows-spanned="5">
            <text:p/>
          </table:table-cell>
          <table:covered-table-cell table:number-columns-repeated="3"/>
          <table:table-cell table:style-name="ce256" table:formula="of:=COM.MICROSOFT.TEXTJOIN(CHAR(10); 1; IF(COM.MICROSOFT.FILTER([$Build.$H$37:.$J$70]; [$Build.$E$37:.$E$70] = [.$F97]) &lt;&gt; &quot;&quot;; COM.MICROSOFT.FILTER([$'Nova Abilities'.G:.I]; [$'Nova Abilities'.C:.C] = [.F97]); &quot;&quot;))" table:number-columns-spanned="1" table:number-rows-spanned="5">
            <text:p/>
          </table:table-cell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style-name="ce318" table:formula="of:=IFERROR(IFNA(COM.MICROSOFT.FILTER(['Combat Abilities By Art'.$A$2:.$A$68];['Combat Abilities By Art'.$B$2:.$B$68]=[.F97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C$2:.$C$68]; ['Combat Abilities By Art'.$B$2:.$B$68]=[.F97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D$2:.$D$68]; ['Combat Abilities By Art'.$B$2:.$B$68]=[.F97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3"/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office:value-type="float" office:value="18" calcext:value-type="float">
            <text:p>18</text:p>
          </table:table-cell>
          <table:table-cell table:style-name="ce317" table:formula="of:=IFNA(INDEX(COM.MICROSOFT.SORT([$Build.$E$37:.$G$55];3;-1);[.E102];1); &quot;&quot;)">
            <text:p/>
          </table:table-cell>
          <table:table-cell table:style-name="ce178" table:formula="of:=IFERROR(IFNA(INDEX(COM.MICROSOFT.FILTER([$'Combat Abilities By Art'.$E$2:.$E$73];['Combat Abilities By Art'.$B$2:.$B$73]=[.F102]);1);&quot;&quot;);&quot;&quot;)" table:number-columns-spanned="4" table:number-rows-spanned="5">
            <text:p/>
          </table:table-cell>
          <table:covered-table-cell table:number-columns-repeated="3"/>
          <table:table-cell table:style-name="ce256" table:formula="of:=COM.MICROSOFT.TEXTJOIN(CHAR(10); 1; IF(COM.MICROSOFT.FILTER([$Build.$H$37:.$J$70]; [$Build.$E$37:.$E$70] = [.$F102]) &lt;&gt; &quot;&quot;; COM.MICROSOFT.FILTER([$'Nova Abilities'.G:.I]; [$'Nova Abilities'.C:.C] = [.F102]); &quot;&quot;))" table:number-columns-spanned="1" table:number-rows-spanned="5">
            <text:p/>
          </table:table-cell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style-name="ce318" table:formula="of:=IFERROR(IFNA(COM.MICROSOFT.FILTER(['Combat Abilities By Art'.$A$2:.$A$68];['Combat Abilities By Art'.$B$2:.$B$68]=[.F102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C$2:.$C$68]; ['Combat Abilities By Art'.$B$2:.$B$68]=[.F102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D$2:.$D$68]; ['Combat Abilities By Art'.$B$2:.$B$68]=[.F102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3"/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office:value-type="float" office:value="19" calcext:value-type="float">
            <text:p>19</text:p>
          </table:table-cell>
          <table:table-cell table:style-name="ce317" table:formula="of:=IFNA(INDEX(COM.MICROSOFT.SORT([$Build.$E$37:.$G$55];3;-1);[.E107];1); &quot;&quot;)">
            <text:p/>
          </table:table-cell>
          <table:table-cell table:style-name="ce178" table:formula="of:=IFERROR(IFNA(INDEX(COM.MICROSOFT.FILTER([$'Combat Abilities By Art'.$E$2:.$E$73];['Combat Abilities By Art'.$B$2:.$B$73]=[.F107]);1);&quot;&quot;);&quot;&quot;)" table:number-columns-spanned="4" table:number-rows-spanned="5">
            <text:p/>
          </table:table-cell>
          <table:covered-table-cell table:number-columns-repeated="3"/>
          <table:table-cell table:style-name="ce256" table:formula="of:=COM.MICROSOFT.TEXTJOIN(CHAR(10); 1; IF(COM.MICROSOFT.FILTER([$Build.$H$37:.$J$70]; [$Build.$E$37:.$E$70] = [.$F107]) &lt;&gt; &quot;&quot;; COM.MICROSOFT.FILTER([$'Nova Abilities'.G:.I]; [$'Nova Abilities'.C:.C] = [.F107]); &quot;&quot;))" table:number-columns-spanned="1" table:number-rows-spanned="5">
            <text:p/>
          </table:table-cell>
          <table:table-cell table:style-name="Default" table:number-columns-repeated="5"/>
        </table:table-row>
        <table:table-row table:style-name="ro4">
          <table:table-cell/>
          <table:table-cell table:style-name="ce2" table:number-columns-repeated="2"/>
          <table:table-cell table:style-name="Default"/>
          <table:table-cell/>
          <table:table-cell table:style-name="ce318" table:formula="of:=IFERROR(IFNA(COM.MICROSOFT.FILTER(['Combat Abilities By Art'.$A$2:.$A$68];['Combat Abilities By Art'.$B$2:.$B$68]=[.F107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3"/>
          <table:table-cell/>
          <table:table-cell table:formula="of:=IFERROR(IFNA(COM.MICROSOFT.FILTER(['Combat Abilities By Art'.$C$2:.$C$68]; ['Combat Abilities By Art'.$B$2:.$B$68]=[.F107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3"/>
          <table:table-cell/>
          <table:table-cell table:formula="of:=IFERROR(IFNA(COM.MICROSOFT.FILTER(['Combat Abilities By Art'.$D$2:.$D$68]; ['Combat Abilities By Art'.$B$2:.$B$68]=[.F107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3"/>
          <table:table-cell table:number-columns-repeated="2"/>
          <table:covered-table-cell table:number-columns-repeated="5"/>
          <table:table-cell table:style-name="Default" table:number-columns-repeated="5"/>
        </table:table-row>
      </table:table>
      <table:table table:name="Archetype Traits" table:style-name="ta1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row table:style-name="ro3">
          <table:table-cell table:style-name="ce283" office:value-type="string" calcext:value-type="string">
            <text:p>Archetype</text:p>
          </table:table-cell>
          <table:table-cell table:style-name="ce283" office:value-type="string" calcext:value-type="string">
            <text:p>Type</text:p>
          </table:table-cell>
          <table:table-cell table:style-name="ce283" office:value-type="string" calcext:value-type="string">
            <text:p>Attribute Bonus</text:p>
          </table:table-cell>
          <table:table-cell table:style-name="ce283" office:value-type="string" calcext:value-type="string">
            <text:p>Trait</text:p>
          </table:table-cell>
          <table:table-cell table:style-name="ce283" office:value-type="string" calcext:value-type="string">
            <text:p>Upgrade</text:p>
          </table:table-cell>
        </table:table-row>
        <table:table-row table:style-name="ro3">
          <table:table-cell office:value-type="string" calcext:value-type="string">
            <text:p>The Hero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Gain +1 to Struction, Athletics, and Leadership Training</text:p>
          </table:table-cell>
          <table:table-cell office:value-type="string" calcext:value-type="string">
            <text:p>Increase the Training Bonuses to +2</text:p>
          </table:table-cell>
        </table:table-row>
        <table:table-row table:style-name="ro3">
          <table:table-cell office:value-type="string" calcext:value-type="string">
            <text:p>The Artist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Gain +1 to Craft, Stealth, and Influence Training</text:p>
          </table:table-cell>
          <table:table-cell office:value-type="string" calcext:value-type="string">
            <text:p>Increase the Training Bonuses to +2</text:p>
          </table:table-cell>
        </table:table-row>
        <table:table-row table:style-name="ro3">
          <table:table-cell office:value-type="string" calcext:value-type="string">
            <text:p>The Sage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Gain +1 to Research, Problem-Solving, and Reconnaissance Training</text:p>
          </table:table-cell>
          <table:table-cell office:value-type="string" calcext:value-type="string">
            <text:p>Increase the Training Bonuses to +2</text:p>
          </table:table-cell>
        </table:table-row>
        <table:table-row table:style-name="ro3">
          <table:table-cell office:value-type="string" calcext:value-type="string">
            <text:p>The Loomer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paces orthogonally adjacent to you are Difficult Terrain for your enemies</text:p>
          </table:table-cell>
          <table:table-cell office:value-type="string" calcext:value-type="string">
            <text:p>Extend the effect to diagonally adjacent spaces as well</text:p>
          </table:table-cell>
        </table:table-row>
        <table:table-row table:style-name="ro3">
          <table:table-cell office:value-type="string" calcext:value-type="string">
            <text:p>The Weaver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gnore the first effect from terrain or an ability that would reduce your Movement on each of your turns</text:p>
          </table:table-cell>
          <table:table-cell office:value-type="string" calcext:value-type="string">
            <text:p>Ignore all effects that would reduce your Movement on your turn</text:p>
          </table:table-cell>
        </table:table-row>
        <table:table-row table:style-name="ro3">
          <table:table-cell office:value-type="string" calcext:value-type="string">
            <text:p>The Quill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You have +1 on Defense Rolls when the Attacker is 3 or more spaces away</text:p>
          </table:table-cell>
          <table:table-cell office:value-type="string" calcext:value-type="string">
            <text:p>Increase the bonus to +2</text:p>
          </table:table-cell>
        </table:table-row>
      </table:table>
      <table:table table:name="Utility Abilities By Art" table:style-name="ta1">
        <office:forms form:automatic-focus="false" form:apply-design-mode="false"/>
        <table:table-column table:style-name="co9" table:default-cell-style-name="Default"/>
        <table:table-column table:style-name="co38" table:default-cell-style-name="Default"/>
        <table:table-column table:style-name="co9" table:number-columns-repeated="6" table:default-cell-style-name="Default"/>
        <table:table-row table:style-name="ro3">
          <table:table-cell office:value-type="string" calcext:value-type="string">
            <table:cell-range-source table:name="CSV_all" xlink:type="simple" xlink:href="../../abilities/generated/all_utility.csv" table:filter-name="Text - txt - csv (StarCalc)" table:filter-options="44,34,12,1,,0,false,false,true,false,false,0,false,false,true" table:last-column-spanned="8" table:last-row-spanned="61"/>
            <text:p>Art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pgrade a</text:p>
          </table:table-cell>
          <table:table-cell office:value-type="string" calcext:value-type="string">
            <text:p>Upgrade b</text:p>
          </table:table-cell>
          <table:table-cell office:value-type="string" calcext:value-type="string">
            <text:p>Upgrade c</text:p>
          </table:table-cell>
        </table:table-row>
        <table:table-row table:style-name="ro12">
          <table:table-cell office:value-type="string" calcext:value-type="string">
            <text:p>Basic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ny Gambit Roll</text:p>
            <text:p>Effort Cost: 1</text:p>
            <text:p>Effect: Gain +1 Boon on the roll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Basic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An ally makes any Gambit Roll</text:p>
            <text:p>Effort Cost: 1</text:p>
            <text:p>Effect: Grant +1 Boon on the roll</text:p>
          </table:table-cell>
          <table:table-cell table:number-columns-repeated="3"/>
        </table:table-row>
        <table:table-row table:style-name="ro14">
          <table:table-cell office:value-type="string" calcext:value-type="string">
            <text:p>Basic</text:p>
          </table:table-cell>
          <table:table-cell office:value-type="string" calcext:value-type="string">
            <text:p>Intercede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An ally fumbles a Gambit, succeeds on a Costly Gambit, </text:p>
            <text:p>or Critically Fumbles a Risky Gambit</text:p>
            <text:p>Effort Cost: 2</text:p>
            <text:p>Effect: The negative consequence is avoided, or in the case of a Critical Fumble</text:p>
            <text:p>it is treated as a normal Fumble instead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Basic</text:p>
          </table:table-cell>
          <table:table-cell office:value-type="string" calcext:value-type="string">
            <text:p>Double or Nothing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fumble (but don't Critical Fumble) a Gambit that is not Costly</text:p>
            <text:p>Uses/Cooldown: 1/Episode</text:p>
            <text:p>Effect: Both your roll and the opposition roll are repeated,</text:p>
            <text:p>and the outcome is determined by the new rolls, however the Gambit</text:p>
            <text:p>is now both Costly and Risky and if it was Controlled it no longer is.</text:p>
            <text:p>If the Gambit was Powerful it still is.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Basic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Downtime Activity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Succeed: While this Buff is active, you may use the Push or Help modifier</text:p>
            <text:p>without expending effort. If you do, end this buff.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Basic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Downtime Activity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Succeed: Choose one Utility Art. You have +1 Boon</text:p>
            <text:p>on all Gambit rolls using that art while this buff is active.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Struction</text:p>
          </table:table-cell>
          <table:table-cell office:value-type="string" calcext:value-type="string">
            <text:p>Accessible Design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able:cell-range-source table:name="CSV_all" xlink:type="simple" xlink:href="../../abilities/generated/all_utility.csv" table:filter-name="Text - txt - csv (StarCalc)" table:filter-options="44,34,12,1,,0,false,false,true,false,false,0,false,false,true" table:last-column-spanned="1" table:last-row-spanned="1"/>
            <text:p>Circumstance: You make a Struction gambit to create a ramp, scaffolding, or</text:p>
            <text:p>similar structure to facilitate entry to a building or structure</text:p>
            <text:p>at a spot not normally accessible.</text:p>
            <text:p>Effort Cost: 1</text:p>
            <text:p>effect: The Gambit is Controlled and Powerful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Struction</text:p>
          </table:table-cell>
          <table:table-cell office:value-type="string" calcext:value-type="string">
            <text:p>Hate if Something Happened To It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make a gambit (using any Art) to intimidate someone</text:p>
            <text:p>Uses/Cooldown: 1/Episode</text:p>
            <text:p>Effect: Treat the outcome as one category better than the roll</text:p>
            <text:p>(Critical Fumble becomes normal Fumble, Fumble becomes normal Success,</text:p>
            <text:p>Success becomes Critical Success)  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Struction</text:p>
          </table:table-cell>
          <table:table-cell office:value-type="string" calcext:value-type="string">
            <text:p>More Like a Window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 always have +1 Boon on Gambits to destroy obstacles</text:p>
            <text:p>(such as doors)  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Struction</text:p>
          </table:table-cell>
          <table:table-cell office:value-type="string" calcext:value-type="string">
            <text:p>An Eye for Workmanship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 can glean the following pieces of information about the visible parts</text:p>
            <text:p>of a building or other structure without a roll:\n</text:p>
            <text:p>  * Any structural weak-points\n</text:p>
            <text:p>  * The approximate age of the construction, as well as whether any parts were added or replaced more recently\n</text:p>
            <text:p>  * The approximate thickness of any wall, floor, or ceiling, and any hollowed out or similarly altered segments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Fixer-Upper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Treat the quality of your downtime accommodations as one tier higher.</text:p>
            <text:p>If it is already a luxury accommodation, the party (re)gains 1 Eunoia.</text:p>
            <text:p>Special: This activity should be resolved before allies' downtime activities,</text:p>
            <text:p>as it affects their rolls</text:p>
          </table:table-cell>
          <table:table-cell table:number-columns-repeated="3"/>
        </table:table-row>
        <table:table-row table:style-name="ro19">
          <table:table-cell office:value-type="string" calcext:value-type="string">
            <text:p>Struction</text:p>
          </table:table-cell>
          <table:table-cell office:value-type="string" calcext:value-type="string">
            <text:p>No Place Like It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Effect: When you select this ability, create a clock of 4, 6, or 8 segments,</text:p>
            <text:p>representing your project constructing a base of operations for the party.</text:p>
            <text:p>Each time you succeed on this activity but at most once per arc, mark off</text:p>
            <text:p>one segment. When the clock is complete, the base is usable for downtime</text:p>
            <text:p>with quality corresponding to the clock size (4 for modest, 6 for standard,</text:p>
            <text:p>8 for luxury), but must be maintained at a rate corresponding to the cost of</text:p>
            <text:p>downtime at its quality tier once per arc. Additionally, each time it is</text:p>
            <text:p>used, roll Struction with Opposition equal to the number of times the party</text:p>
            <text:p>has used the dwelling this arc. On a failed roll something breaks and the</text:p>
            <text:p>base cannot be used again until it is repaired by taking this downtime</text:p>
            <text:p>activity during downtime spent in other accommodations.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Athletics</text:p>
          </table:table-cell>
          <table:table-cell office:value-type="string" calcext:value-type="string">
            <text:p>Prodigious Leap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n Athletics Gambit to achieve a difficult jump, </text:p>
            <text:p>up to twice as far as a typical person could reliably achieve</text:p>
            <text:p>Effort Cost: 1</text:p>
            <text:p>Effect: You automatically succeed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Athletics</text:p>
          </table:table-cell>
          <table:table-cell office:value-type="string" calcext:value-type="string">
            <text:p>Determination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ort Cost: 1</text:p>
            <text:p>Effect: You can apply the Intercede ability to your own Athletics Gambit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Athletics</text:p>
          </table:table-cell>
          <table:table-cell office:value-type="string" calcext:value-type="string">
            <text:p>Fierce Competitor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an ally Critically Succeeds on any Powerful Gambit,</text:p>
            <text:p>you regain 1 Effort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Athletics</text:p>
          </table:table-cell>
          <table:table-cell office:value-type="string" calcext:value-type="string">
            <text:p>Quick Rescu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 use Intercede to mitigate or prevent consequences</text:p>
            <text:p>of a physical nature, it costs only 1 Effort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Athletics</text:p>
          </table:table-cell>
          <table:table-cell office:value-type="string" calcext:value-type="string">
            <text:p>Strength Conditioning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You have +1 Boon on all Struction and Leadership Gambits</text:p>
            <text:p>while this Buff is active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Athletics</text:p>
          </table:table-cell>
          <table:table-cell office:value-type="string" calcext:value-type="string">
            <text:p>Reflex Conditioning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You have +1 Boon on all Stealth and Problem-Solving Gambits</text:p>
            <text:p>while this Buff is active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Craft</text:p>
          </table:table-cell>
          <table:table-cell office:value-type="string" calcext:value-type="string">
            <text:p>Quickfingered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hat involves an act of time-sensitive</text:p>
            <text:p>manual precision, such as stitching a wound, picking a pocket,</text:p>
            <text:p>manipulating a deck of cards, or playing a musical instrument</text:p>
            <text:p>Effort Cost: 1</text:p>
            <text:p>Effect: You can make the Gambit Controlled or Powerful. You can use this</text:p>
            <text:p>modifier twice on the same Gambit to add both properties.  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Craft</text:p>
          </table:table-cell>
          <table:table-cell office:value-type="string" calcext:value-type="string">
            <text:p>Do It With Flare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get a critical success on a Powerful Gambit using Craft</text:p>
            <text:p>in front of NPC witnesses</text:p>
            <text:p>Uses/Cooldown: 1/Episode</text:p>
            <text:p>Effect: The party gains +1 Eunoia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Craft</text:p>
          </table:table-cell>
          <table:table-cell office:value-type="string" calcext:value-type="string">
            <text:p>Mechanically-Minded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 attempt a Gambit to understand or intervene in the operation</text:p>
            <text:p>of something with moving parts (such as a machine or lock),</text:p>
            <text:p>it is Controlled and Powerful 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Craft</text:p>
          </table:table-cell>
          <table:table-cell office:value-type="string" calcext:value-type="string">
            <text:p>Utility Bel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At the start of each episode, you may select an Ability from another Art.</text:p>
            <text:p>You cannot repeat the same one more than once per Arc.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Craft</text:p>
          </table:table-cell>
          <table:table-cell office:value-type="string" calcext:value-type="string">
            <text:p>Assistive Technology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Choose a Utility Art. You fashion a rough device that aids in that pursuit.</text:p>
            <text:p>Your own Gambits using that art become Controlled, and you may</text:p>
            <text:p>use the Help ability on Gambits using that Art without expending Effort,</text:p>
            <text:p>as long as this Buff is active. When a Gambit benefitting from this Buff is a</text:p>
            <text:p>Critical Fumble, the device breaks and this Buff ends. 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aft</text:p>
          </table:table-cell>
          <table:table-cell office:value-type="string" calcext:value-type="string">
            <text:p>Artisan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You create a trinket that can be sold for 1 Lucre 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Problem Solving</text:p>
          </table:table-cell>
          <table:table-cell office:value-type="string" calcext:value-type="string">
            <text:p>Deus Ex Machina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s to do something Risky against formidable opposition.</text:p>
            <text:p>Uses/Cooldown: 1/Arc</text:p>
            <text:p>Effect: Swap the player and opposition modifiers, and invert the Risk profile:</text:p>
            <text:p>  Risky becomes Powerful and vice versa,</text:p>
            <text:p>  Costly becomes Controlled and vice versa, and </text:p>
            <text:p>  if there are Boons or Banes in effect, swap those as well.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Eureka Moment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A Gambit attempt by you or an ally results in new information</text:p>
            <text:p>Uses/Cooldown: 1/Episode</text:p>
            <text:p>Effect: The GM offers additional detail or a second related piece of information</text:p>
            <text:p>relevant to the party's current Arc objective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Problem Solving</text:p>
          </table:table-cell>
          <table:table-cell office:value-type="string" calcext:value-type="string">
            <text:p>Puzzle Enthusias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r Problem Solving Gambits involving Traps, Ciphers, Riddles,</text:p>
            <text:p>and Puzzles are at +1 Boon and are Powerful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Student of Peopl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the party interacts with an NPC that has an ulterior motive</text:p>
            <text:p>or has something to hide, you intuit this (but you do not necessarily</text:p>
            <text:p>learn what it is). When a piece of information offered by an NPC contradicts</text:p>
            <text:p>another (either from the same NPC or a different one), you notice this as well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blem Solving</text:p>
          </table:table-cell>
          <table:table-cell office:value-type="string" calcext:value-type="string">
            <text:p>Mental Conditioning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You gain +1 Boon on Research and Reconnaissance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Strategize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You may present the GM with up to two sets of two alternatives</text:p>
            <text:p>involving the current or upcoming Arc objective. The GM offers</text:p>
            <text:p>any relevant pros and cons that make use of information or context</text:p>
            <text:p>the party could reasonably have had access to.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Stealth</text:p>
          </table:table-cell>
          <table:table-cell office:value-type="string" calcext:value-type="string">
            <text:p>Silent Pursuit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follow someone undetected</text:p>
            <text:p>Effort Cost: 1</text:p>
            <text:p>Effect: Choose 1: Gain +2 Boons, or the Gambit becomes</text:p>
            <text:p>Powerful and loses Risky 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Stealth</text:p>
          </table:table-cell>
          <table:table-cell office:value-type="string" calcext:value-type="string">
            <text:p>Now You Don't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Uses/Cooldown: 1/Episode</text:p>
            <text:p>Effect: You can apply the Intercede ability to your own Stealth Gambit</text:p>
            <text:p>without spending Effort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Stealth</text:p>
          </table:table-cell>
          <table:table-cell office:value-type="string" calcext:value-type="string">
            <text:p>I Am No On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 have +1 Boon on Stealth Gambits you make in any scene</text:p>
            <text:p>where the party is outnumbered by nonhostile NPC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ealth</text:p>
          </table:table-cell>
          <table:table-cell office:value-type="string" calcext:value-type="string">
            <text:p>Cover of Darkness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r Stealth Gambits are always Controlled when in darkness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Stealth</text:p>
          </table:table-cell>
          <table:table-cell office:value-type="string" calcext:value-type="string">
            <text:p>Cover Their Tracks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Your Stealth Gambits made to reach a location undetected apply</text:p>
            <text:p>to the whole party provided the location is known when this</text:p>
            <text:p>activity is taken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Master of Disguise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Designate a faction. You disguise the party as generic members of that</text:p>
            <text:p>faction while this effect persists. The party's own renown and infamy</text:p>
            <text:p>do not apply to Gambits while this effect is active, and are replaced</text:p>
            <text:p>by modifiers appropriate to relationships with the designated faction.</text:p>
            <text:p>Any Eunoia earned while this effect is active must be expended before it ends.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Research</text:p>
          </table:table-cell>
          <table:table-cell office:value-type="string" calcext:value-type="string">
            <text:p>Historical Aside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involving a public figure, institution, or place</text:p>
            <text:p>Uses/Cooldown: 1/Episode</text:p>
            <text:p>Effect: You remember reading something that could help here! The Gambit gains</text:p>
            <text:p>+1 Boon and is Powerful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Research</text:p>
          </table:table-cell>
          <table:table-cell office:value-type="string" calcext:value-type="string">
            <text:p>Applied Booksmarts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An ally makes any Gambit</text:p>
            <text:p>Uses/Cooldown: 1/Scene</text:p>
            <text:p>Effect: You may make a Research roll. On a success, the Gambit gains</text:p>
            <text:p>+1 Boon. On a Fumble, there is no effect. On a Critical Fumble,</text:p>
            <text:p>the Gambit gains +1 Bane.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Research</text:p>
          </table:table-cell>
          <table:table-cell office:value-type="string" calcext:value-type="string">
            <text:p>Polymath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 gain this Ability, designate a Utility Art other than this one.</text:p>
            <text:p>Gain +1 to your modifier in that Art</text:p>
            <text:p>Special: You can choose this ability more than once, but must choose a different Art each time</text:p>
          </table:table-cell>
          <table:table-cell table:number-columns-repeated="3"/>
        </table:table-row>
        <table:table-row table:style-name="ro20">
          <table:table-cell office:value-type="string" calcext:value-type="string">
            <text:p>Research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 gain this Ability, choose one of the following areas of expertise.</text:p>
            <text:p>Your Research Gambits made to recall or acquire knowledge in that area</text:p>
            <text:p>are Powerful\n</text:p>
            <text:p>* Botany and Brewing</text:p>
            <text:p>* The Arcane Arts</text:p>
            <text:p>* Human Physiology and Medicine</text:p>
            <text:p>* Religious or Occult Practices  </text:p>
            <text:p>Special: You may choose this ability more than once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Research</text:p>
          </table:table-cell>
          <table:table-cell office:value-type="string" calcext:value-type="string">
            <text:p>Anthropological Staycation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Designate a Faction. You brush up on their history, customs and practices</text:p>
            <text:p>that provides a benefit when interacting with a member of that Faction socially,</text:p>
            <text:p>or to interact with a location they control. During such an interaction,</text:p>
            <text:p>choose one of the following:\n</text:p>
            <text:p>* You may make a Gambit Controlled or Powerful. If the Gambit is fumbled, end this effect.</text:p>
            <text:p>* You may use Intercede on the Gambit without expending Effort. Then end this effect.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Research</text:p>
          </table:table-cell>
          <table:table-cell office:value-type="string" calcext:value-type="string">
            <text:p>Crash Course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Choose one Utility Art. You may use Help on Gambits involving</text:p>
            <text:p>that Art without expending effort. When you do, you grant</text:p>
            <text:p>+2 Boons instead of +1.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Leadership</text:p>
          </table:table-cell>
          <table:table-cell office:value-type="string" calcext:value-type="string">
            <text:p>Create a Diversion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 Leadership Gambit to draw the attention of a group</text:p>
            <text:p>Effort Cost: 2</text:p>
            <text:p>Effect: Gain +1 Boon on the roll. On a Success, all opposition rolls involving</text:p>
            <text:p>NPCs are at +1 Bane until the end of the scene as long as you do not</text:p>
            <text:p>take any additional Gambits or use Proactive abilities. On a Critical Success,</text:p>
            <text:p>your allies' Gambits are at +1 Boon as well and you refund 1 Effort.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Leadership</text:p>
          </table:table-cell>
          <table:table-cell office:value-type="string" calcext:value-type="string">
            <text:p>Intimidating Presence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where Infamy would be added</text:p>
            <text:p>to the Opposition roll</text:p>
            <text:p>Uses/Cooldown: 1/Arc per Faction</text:p>
            <text:p>Effect: Add Infamy to the player roll instead  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Leadership</text:p>
          </table:table-cell>
          <table:table-cell office:value-type="string" calcext:value-type="string">
            <text:p>Natural Charisma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succeed on any Gambit involving social interaction</text:p>
            <text:p>Uses/Cooldown: 1/Episode</text:p>
            <text:p>Effect: The party gains +1 Eunoi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eadership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the party would gain Renown, they gain +1 additional Renown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Leadership</text:p>
          </table:table-cell>
          <table:table-cell office:value-type="string" calcext:value-type="string">
            <text:p>Motivational Speech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Your allies gain 1 Effort in addition to what they would regain normally</text:p>
            <text:p>during the downtime. This can cause their effort total to exceed their</text:p>
            <text:p>normal maximum.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Leadership</text:p>
          </table:table-cell>
          <table:table-cell office:value-type="string" calcext:value-type="string">
            <text:p>Team-Building Exercise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When you or an ally use Help or Intercede, the next Gambit</text:p>
            <text:p>the party attempts gains +1 Boon as well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Shrewd Negotiation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improve the terms of a deal, such as</text:p>
            <text:p>a quest reward or a purchase price</text:p>
            <text:p>Effort Cost: 1</text:p>
            <text:p>Effect: The Gambit becomes Controlled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Influence</text:p>
          </table:table-cell>
          <table:table-cell office:value-type="string" calcext:value-type="string">
            <text:p>Silver Tongue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attempt any Gambit involving social interaction</text:p>
            <text:p>Uses/Cooldown: 1/Episode</text:p>
            <text:p>Effect: Add the party's current Eunoia total to the roll  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Influence</text:p>
          </table:table-cell>
          <table:table-cell office:value-type="string" calcext:value-type="string">
            <text:p>Smooth Operator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 use Intercede to mitigate or prevent consequences</text:p>
            <text:p>of a social nature, it costs only 1 Effort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Influence</text:p>
          </table:table-cell>
          <table:table-cell office:value-type="string" calcext:value-type="string">
            <text:p>Charlatan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Opposition rolls on Gambits made to deceive an individual NPC</text:p>
            <text:p>are at +1 Bane, provided you have not previously failed</text:p>
            <text:p>at such a gambit with that NPC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Influence</text:p>
          </table:table-cell>
          <table:table-cell office:value-type="string" calcext:value-type="string">
            <text:p>Diplomacy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Designate a Faction. The party temporarily gains +1 Renown,</text:p>
            <text:p>+1 Infamy or -1 Infamy with that faction (reverted when</text:p>
            <text:p>this Buff ends)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Extended Stay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If any ally failed a Downtime Activity roll during this instance</text:p>
            <text:p>of downtime, they can attempt a different Downtime Activity</text:p>
            <text:p>Special: This activity can be declared and resolved after everyone else has</text:p>
            <text:p>attemped their Downtime Activity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Clairvoyant Synesthesia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see, hear, or smell something in a nearby location</text:p>
            <text:p>Effort Cost: 1</text:p>
            <text:p>Effect: If the Gambit succeeds, you obtain information from all of your senses</text:p>
            <text:p>as though you were up close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Reconnaissance</text:p>
          </table:table-cell>
          <table:table-cell office:value-type="string" calcext:value-type="string">
            <text:p>Retroactive Continuity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fumbles a Gambit opposed by an NPC or in a location</text:p>
            <text:p>the party has interacted with in a previous episode</text:p>
            <text:p>Uses/Cooldown: 1/Episode</text:p>
            <text:p>Effect: You recall something you noticed on a previous occasion that suggests</text:p>
            <text:p>a different approach. You or your ally may treat the first attempt</text:p>
            <text:p>as if it never happened, and reattempt the Gambit with a different</text:p>
            <text:p>Approach, at +1 Boon.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Eagle-Ey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ever you are outdoors and you make a Reconnassaince Gambit</text:p>
            <text:p>to observe something in the distance, choose one of the following:\n</text:p>
            <text:p>* The Opposition is treated as if you were half the distance away</text:p>
            <text:p>* It becomes Powerful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Reconnaissance</text:p>
          </table:table-cell>
          <table:table-cell office:value-type="string" calcext:value-type="string">
            <text:p>Forensic Specialis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r Gambits made to notice clues about past activities in a location</text:p>
            <text:p>(such as finding footprints, smudges or other marks, or evidence of</text:p>
            <text:p>something out of place) are at +1 Boon</text:p>
          </table:table-cell>
          <table:table-cell table:number-columns-repeated="3"/>
        </table:table-row>
        <table:table-row table:style-name="ro22">
          <table:table-cell office:value-type="string" calcext:value-type="string">
            <text:p>Reconnaissance</text:p>
          </table:table-cell>
          <table:table-cell office:value-type="string" calcext:value-type="string">
            <text:p>Due Diligence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You learn a piece of useful information about your current or next</text:p>
            <text:p>Arc objective. Choose one of the following:\n</text:p>
            <text:p>* You overhear something about a specific NPC. The party gains one of +1 Boon,</text:p>
            <text:p>  Controlled or Powerful on Influence Gambits involving them (based on</text:p>
            <text:p>  the nature of the information)</text:p>
            <text:p>* You discover a hidden route or entrance to a specified location. Fill in one</text:p>
            <text:p>  segment on a Progress Clock involving reaching that location (representing a</text:p>
            <text:p>  more efficient path), </text:p>
            <text:p>  or add one to an associated Threat Clock (representing a safer one).</text:p>
            <text:p>* You gain advance knowledge of an obstacle or hazard. When you or an ally</text:p>
            <text:p>  attempts any Gambit to overcome it, it loses the Risky property if it</text:p>
            <text:p>  had it; otherwise, it becomes Controlled.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Dream Insight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The GM reveals a piece of information about the current Arc objective</text:p>
            <text:p>that the party could have learned previously using Reconnaissance but</text:p>
            <text:p>didn't (either because of a fumbled Gambit or because they didn't</text:p>
            <text:p>seek it out)</text:p>
          </table:table-cell>
          <table:table-cell table:number-columns-repeated="3"/>
        </table:table-row>
      </table:table>
      <table:table table:name="Combat Abilities By Art" table:style-name="ta1">
        <office:forms form:automatic-focus="false" form:apply-design-mode="false"/>
        <table:table-column table:style-name="co39" table:default-cell-style-name="Default"/>
        <table:table-column table:style-name="co22" table:default-cell-style-name="Default"/>
        <table:table-column table:style-name="co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3" table:default-cell-style-name="Default"/>
        <table:table-row table:style-name="ro3">
          <table:table-cell office:value-type="string" calcext:value-type="string">
            <table:cell-range-source table:name="CSV_all" xlink:type="simple" xlink:href="../../abilities/generated/all_combat.csv" table:filter-name="Text - txt - csv (StarCalc)" table:filter-options="44,34,12,1,,0,false,false,true,false,false,0,false,false,true" table:last-column-spanned="8" table:last-row-spanned="73"/>
            <text:p>Art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pgrade a</text:p>
          </table:table-cell>
          <table:table-cell office:value-type="string" calcext:value-type="string">
            <text:p>Upgrade b</text:p>
          </table:table-cell>
          <table:table-cell office:value-type="string" calcext:value-type="string">
            <text:p>Upgrade c</text:p>
          </table:table-cell>
        </table:table-row>
        <table:table-row table:style-name="ro23">
          <table:table-cell office:value-type="string" calcext:value-type="string">
            <text:p>Basic</text:p>
          </table:table-cell>
          <table:table-cell office:value-type="string" calcext:value-type="string">
            <text:p>Basic Attack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</text:p>
          </table:table-cell>
          <table:table-cell office:value-type="string" calcext:value-type="string">
            <text:p>Range: 3</text:p>
            <text:p>Target: One enemy</text:p>
            <text:p>Effect: Roll an attack using your highest Combat Art modifier</text:p>
            <text:p>Success: Deal 2 Fatigue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Effect: Move a number of spaces up to your speed <text:s/>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Basic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Target: Self</text:p>
            <text:p>Effect: Reduce current Fatigue or Stress by 1 or end one Status </text:p>
          </table:table-cell>
          <table:table-cell table:number-columns-repeated="3"/>
        </table:table-row>
        <table:table-row table:style-name="ro18">
          <table:table-cell office:value-type="string" calcext:value-type="string">
            <table:cell-range-source table:name="CSV_all" xlink:type="simple" xlink:href="../../abilities/generated/all_combat.csv" table:filter-name="Text - txt - csv (StarCalc)" table:filter-options="44,34,12,1,,0,false,false,true,false,false,0,false,false,true" table:last-column-spanned="1" table:last-row-spanned="1"/>
            <text:p>Basic</text:p>
          </table:table-cell>
          <table:table-cell office:value-type="string" calcext:value-type="string">
            <text:p>Resuscitate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Range: 1</text:p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Brac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Effect: Gain +1 Boon on Resilience rolls 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Effect: Gain +1 Boon on Evasion rolls 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Concentrat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Effect: Gain +1 Boon on Resolve rolls <text:s/>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able:cell-range-source table:name="CSV_all" xlink:type="simple" xlink:href="../../abilities/generated/all_combat.csv" table:filter-name="Text - txt - csv (StarCalc)" table:filter-options="44,34,12,1,,0,false,false,true,false,false,0,false,false,true" table:last-column-spanned="1" table:last-row-spanned="1"/>
            <text:p>Range: 1</text:p>
            <text:p>Trigger: An Ally targets an Enemy within range</text:p>
            <text:p>Effect: You may impose +1 Bane on the Enemy's defensive roll.</text:p>
            <text:p>If you do, end this stance.  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1</text:p>
            <text:p>Trigger: An Ally within range is targeted by an enemy</text:p>
            <text:p>Effect: You may grant the Ally +1 Boon on their Defensive roll.</text:p>
            <text:p>If you do, end this stance.  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Brawling</text:p>
          </table:table-cell>
          <table:table-cell office:value-type="string" calcext:value-type="string">
            <text:p>Sock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Range: 1</text:p>
            <text:p>Target: One enemy</text:p>
            <text:p>Effect: Choose one: move the target 1$^b$ in any direction, or target gains 1$^c$ Slowed</text:p>
            <text:p>Succeed: Deal 2 Fatigue</text:p>
            <text:p>Critical: Deal an additional 1$^a$ Fatigue and the target is Stunned**</text:p>
          </table:table-cell>
          <table:table-cell office:value-type="string" calcext:value-type="string">
            <text:p>Add half your POW to the additional Fatigue you deal on a Critical</text:p>
          </table:table-cell>
          <table:table-cell office:value-type="string" calcext:value-type="string">
            <text:p>Add half your REA to the distance you can move the target</text:p>
          </table:table-cell>
          <table:table-cell office:value-type="string" calcext:value-type="string">
            <text:p>When you add Slowed add additional stacks equal to half your FIN</text:p>
          </table:table-cell>
        </table:table-row>
        <table:table-row table:style-name="ro21">
          <table:table-cell office:value-type="string" calcext:value-type="string">
            <text:p>Brawling</text:p>
          </table:table-cell>
          <table:table-cell office:value-type="string" calcext:value-type="string">
            <text:p>Bull Ru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Range: 3</text:p>
            <text:p>Target: One character</text:p>
            <text:p>Effect: Move to any open space adjacent to the target which is within half your speed$^b$</text:p>
            <text:p>of your starting position</text:p>
            <text:p>Succeed: If the target is an enemy, they take 2 Fatigue</text:p>
            <text:p>Critical: Deal an additional 1$^(a)$ Fatigue and you may move the target</text:p>
            <text:p>to any open space adjacent to their starting position</text:p>
          </table:table-cell>
          <table:table-cell office:value-type="string" calcext:value-type="string">
            <text:p>Add half your POW to the additional Fatigue you deal on a Critical</text:p>
          </table:table-cell>
          <table:table-cell office:value-type="string" calcext:value-type="string">
            <text:p>Add half your FIN to the distance you can move before the attack</text:p>
          </table:table-cell>
          <table:table-cell/>
        </table:table-row>
        <table:table-row table:style-name="ro25">
          <table:table-cell office:value-type="string" calcext:value-type="string">
            <text:p>Brawling</text:p>
          </table:table-cell>
          <table:table-cell office:value-type="string" calcext:value-type="string">
            <text:p>Chokeho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1</text:p>
            <text:p>Target: One character</text:p>
            <text:p>Succeed: Target is Immobilized and Weakened until you are no longer in range</text:p>
            <text:p>or you choose to release them at any time. You can only have up to 1$^b$ targets</text:p>
            <text:p>in this effect at a time. If you would exceed this number, you can choose which to release.</text:p>
            <text:p>An affected target may use their Action to attempt to break this effect on their turn</text:p>
            <text:p>by making a Physical Attack contested by your Resilience.</text:p>
            <text:p>On a Critical Success they may take another action. You may drag immobilized targets at</text:p>
            <text:p>a cost of +1 additional square per square moved.</text:p>
            <text:p>Critical: Deal 1$^a$ Fatigue</text:p>
          </table:table-cell>
          <table:table-cell office:value-type="string" calcext:value-type="string">
            <text:p>Add half your POW to the additional Fatigue you deal on a Critical</text:p>
          </table:table-cell>
          <table:table-cell office:value-type="string" calcext:value-type="string">
            <text:p>Add half your FIN to the number of targets you can affect at once</text:p>
          </table:table-cell>
          <table:table-cell/>
        </table:table-row>
        <table:table-row table:style-name="ro15">
          <table:table-cell office:value-type="string" calcext:value-type="string">
            <text:p>Brawling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An enemy that has not triggered this stance on the current turn exits a square</text:p>
            <text:p>adjacent to you as part of their Move, Action or Stance effect</text:p>
            <text:p>Effect: They must spend 2 extra squares of movement or else return to the square they exited.</text:p>
            <text:p>Make a Physical Attack against the triggering enemy.</text:p>
            <text:p>Success: Deal 1$^a$ Fatigue.</text:p>
            <text:p>Critical: The target is Immobilized until the end of the turn.  </text:p>
          </table:table-cell>
          <table:table-cell office:value-type="string" calcext:value-type="string">
            <text:p>Add half your POW to the Fatigue you deal on a Success <text:s/></text:p>
          </table:table-cell>
          <table:table-cell office:value-type="string" calcext:value-type="string">
            <text:p>Enemy movement may trigger the effect when they exit a square within 2</text:p>
            <text:p>instead of needing to be adjacent, provided they are moving further away from you  </text:p>
          </table:table-cell>
          <table:table-cell/>
        </table:table-row>
        <table:table-row table:style-name="ro20">
          <table:table-cell office:value-type="string" calcext:value-type="string">
            <text:p>Brawling</text:p>
          </table:table-cell>
          <table:table-cell office:value-type="string" calcext:value-type="string">
            <table:cell-range-source table:name="CSV_all" xlink:type="simple" xlink:href="../../abilities/generated/all_combat.csv" table:filter-name="Text - txt - csv (StarCalc)" table:filter-options="44,34,12,1,,0,false,false,true,false,false,0,false,false,true" table:last-column-spanned="1" table:last-row-spanned="1"/>
            <text:p>Pounc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3</text:p>
            <text:p>Trigger: An enemy within range targets one of your allies with an attack</text:p>
            <text:p>Effect: You may move up to half your speed to any space adjacent to the triggering enemy and</text:p>
            <text:p>end this stance. If the attack does not target an Area, the target may redirect the</text:p>
            <text:p>triggering ability from the ally to you (this does not count as a new instance of</text:p>
            <text:p>targeting for the purpose of this or other triggered effects). If the attack targets</text:p>
            <text:p>multiple characters, only one of the targets is replaced. If the attack targets an</text:p>
            <text:p>Area or the attacker chooses not to retarget to you, they gain +1 Weakened.</text:p>
          </table:table-cell>
          <table:table-cell office:value-type="string" calcext:value-type="string">
            <text:p>You may deal Fatigue to the triggering enemy equal to half your POW</text:p>
          </table:table-cell>
          <table:table-cell office:value-type="string" calcext:value-type="string">
            <text:p>Instead of moving normally as part of the triggered effect, you may Teleport</text:p>
            <text:p>a number of spaces equal to 2 + half your REA</text:p>
          </table:table-cell>
          <table:table-cell/>
        </table:table-row>
        <table:table-row table:style-name="ro3">
          <table:table-cell office:value-type="string" calcext:value-type="string">
            <text:p>Brawling</text:p>
          </table:table-cell>
          <table:table-cell office:value-type="string" calcext:value-type="string">
            <text:p>Indefatigabl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Increase your Maximum Fatigue Tolerance by 1$^a$ <text:s/></text:p>
          </table:table-cell>
          <table:table-cell office:value-type="string" calcext:value-type="string">
            <text:p>Further increase your Maximum Fatigue Tolerance by half your END <text:s text:c="2"/>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Brawling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 are dealt Fatigue, you may end or ignore</text:p>
            <text:p>one Status of your choice affecting (or that would effect) you.</text:p>
            <text:p>While you are Exhausted you have +1$^a$ Boons on Panic Rolls</text:p>
          </table:table-cell>
          <table:table-cell office:value-type="string" calcext:value-type="string">
            <text:p>Increase the number of Boons this ability grants to Panic Rolls by half your REA <text:s/></text:p>
          </table:table-cell>
          <table:table-cell office:value-type="string" calcext:value-type="string">
            <text:p>When you take Fatigue, you may choose to reduce your Stress Load by 1</text:p>
            <text:p>instead of ending or ignoring a Status</text:p>
          </table:table-cell>
          <table:table-cell/>
        </table:table-row>
        <table:table-row table:style-name="ro17">
          <table:table-cell office:value-type="string" calcext:value-type="string">
            <text:p>Dueling</text:p>
          </table:table-cell>
          <table:table-cell office:value-type="string" calcext:value-type="string">
            <text:p>Precision Sla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Range: 1</text:p>
            <text:p>Target: One enemy</text:p>
            <text:p>Succeed: Deal 2 Fatigue</text:p>
            <text:p>Critical: Deal an additional 1$^a$ Fatigue</text:p>
            <text:p>Effect: The target gains 1$^b$ Bleed </text:p>
          </table:table-cell>
          <table:table-cell office:value-type="string" calcext:value-type="string">
            <text:p>Add half your POW to Fatigue you deal on a Critical <text:s/></text:p>
          </table:table-cell>
          <table:table-cell office:value-type="string" calcext:value-type="string">
            <text:p>Increase the Bleed stacks by half your FIN <text:s/></text:p>
          </table:table-cell>
          <table:table-cell/>
        </table:table-row>
        <table:table-row table:style-name="ro17">
          <table:table-cell office:value-type="string" calcext:value-type="string">
            <text:p>Dueling</text:p>
          </table:table-cell>
          <table:table-cell office:value-type="string" calcext:value-type="string">
            <text:p>Pressure Point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Range: 1</text:p>
            <text:p>Target: One enemy</text:p>
            <text:p>Succeed: Deal 2 Fatigue</text:p>
            <text:p>Critical: Deal an additional 1$^a$ Fatigue</text:p>
            <text:p>Effect: The target gains 1$^b$ Hamstrung </text:p>
          </table:table-cell>
          <table:table-cell office:value-type="string" calcext:value-type="string">
            <text:p>Add half your POW to Fatigue you deal on a Critical <text:s/></text:p>
          </table:table-cell>
          <table:table-cell office:value-type="string" calcext:value-type="string">
            <text:p>Increase the Hamstrung stacks by half your FIN <text:s/></text:p>
          </table:table-cell>
          <table:table-cell/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Whirling Slic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Range: 1</text:p>
            <text:p>Target: Up to 2$^b$ enemies within range</text:p>
            <text:p>Succeed: Deal 1$^a$ Fatigue</text:p>
            <text:p>Critical: You may move the target 1 space to an unoccupied space within range  </text:p>
          </table:table-cell>
          <table:table-cell office:value-type="string" calcext:value-type="string">
            <text:p>Add half your POW to the damage you deal on a Success <text:s/></text:p>
          </table:table-cell>
          <table:table-cell office:value-type="string" calcext:value-type="string">
            <text:p>The maximum number of targets increases by half your REA <text:s/></text:p>
          </table:table-cell>
          <table:table-cell/>
        </table:table-row>
        <table:table-row table:style-name="ro15">
          <table:table-cell office:value-type="string" calcext:value-type="string">
            <text:p>Dueling</text:p>
          </table:table-cell>
          <table:table-cell office:value-type="string" calcext:value-type="string">
            <text:p>Parry and Ripost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1</text:p>
            <text:p>Trigger: An enemy in range targets you with an attack.</text:p>
            <text:p>Effect: You may add your Dueling Training Level to your defense roll.</text:p>
            <text:p>If you do, end this stance. If your contesting roll is a Critical,</text:p>
            <text:p>make a Physical Attack with Finisher against the triggering enemy,</text:p>
            <text:p>dealing [1] Fatigue on a Success.  </text:p>
          </table:table-cell>
          <table:table-cell office:value-type="string" calcext:value-type="string">
            <text:p>Add half your POW to the damage you deal on a Success <text:s/></text:p>
          </table:table-cell>
          <table:table-cell office:value-type="string" calcext:value-type="string">
            <text:p>Increase the bonus to your defense roll by an amount equal to half your FIN <text:s/></text:p>
          </table:table-cell>
          <table:table-cell/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ivot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or an adjacent character are targeted with an attack</text:p>
            <text:p>Effect: End this stance and enter any Basic Stance of your choice.</text:p>
            <text:p>If the stance has an effect that shares a trigger with this one,</text:p>
            <text:p>you may carry it out immediately.</text:p>
          </table:table-cell>
          <table:table-cell office:value-type="string" calcext:value-type="string">
            <text:p>If the Stance would normally end after triggering, you may</text:p>
            <text:p>stay in it or enter a different Basic Stance instead  </text:p>
          </table:table-cell>
          <table:table-cell office:value-type="string" calcext:value-type="string">
            <text:p>If the Stance grants a Boon to your Defense Roll, gain an</text:p>
            <text:p>additional Boon for the attack triggering this ability  </text:p>
          </table:table-cell>
          <table:table-cell/>
        </table:table-row>
        <table:table-row table:style-name="ro13">
          <table:table-cell office:value-type="string" calcext:value-type="string">
            <text:p>Dueling</text:p>
          </table:table-cell>
          <table:table-cell office:value-type="string" calcext:value-type="string">
            <text:p>Press Advantag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r attacks that target an enemy suffering at least one Status</text:p>
            <text:p>are at +1$^a$ Boons  </text:p>
          </table:table-cell>
          <table:table-cell office:value-type="string" calcext:value-type="string">
            <text:p>Gain additional Boons equal to half your FIN <text:s/></text:p>
          </table:table-cell>
          <table:table-cell office:value-type="string" calcext:value-type="string">
            <text:p>In addition, when you get a Critical against an enemy with one or more Statuses,</text:p>
            <text:p>add +1 additional stack. If the target has more than one, add +1 to up to</text:p>
            <text:p>half your FIN of them  </text:p>
          </table:table-cell>
          <table:table-cell/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Long Reach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r abilities listed as having Range 1 have Range 2 instead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Infusion</text:p>
          </table:table-cell>
          <table:table-cell office:value-type="string" calcext:value-type="string">
            <text:p>Infuse Weapon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Effect: Make a Basic Attack against a valid target resolved using Infusion.</text:p>
            <text:p>If the target is adjacent to you, the Attack loses the Ranged tag for this</text:p>
            <text:p>use and gains Finisher.</text:p>
            <text:p>Critical: Deal 1$^a$ additional Fatigue</text:p>
            <text:p>Effect: Choose of the following to apply to the target: +1 Burning, +1 Slowed,</text:p>
            <text:p>+1 Blinded or +1 Shocked. If the attack was a Success, choose 1$^b$</text:p>
            <text:p>additional times (you may choose the same one more than once)  </text:p>
          </table:table-cell>
          <table:table-cell office:value-type="string" calcext:value-type="string">
            <text:p>Add half your POW to Fatigue you deal on a Critical <text:s/></text:p>
          </table:table-cell>
          <table:table-cell office:value-type="string" calcext:value-type="string">
            <text:p>Add half your FIN to the additional Status stacks you deal on a Success <text:s/></text:p>
          </table:table-cell>
          <table:table-cell/>
        </table:table-row>
        <table:table-row table:style-name="ro17">
          <table:table-cell office:value-type="string" calcext:value-type="string">
            <text:p>Infusion</text:p>
          </table:table-cell>
          <table:table-cell office:value-type="string" calcext:value-type="string">
            <text:p>Wave of Mutilation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Range: 0</text:p>
            <text:p>Target: Area 2$^a</text:p>
            <text:p>Effect: Choose one of the following statuses: Burning, Slowed, Blinded,</text:p>
            <text:p>Shocked. All characters in the area (including Self) receive +1$^b$</text:p>
            <text:p>of that status.  </text:p>
          </table:table-cell>
          <table:table-cell office:value-type="string" calcext:value-type="string">
            <text:p>Increase the area by half your REA</text:p>
          </table:table-cell>
          <table:table-cell office:value-type="string" calcext:value-type="string">
            <text:p>Increase the number of Status stacks on characters other than you by half your FIN</text:p>
          </table:table-cell>
          <table:table-cell/>
        </table:table-row>
        <table:table-row table:style-name="ro15">
          <table:table-cell office:value-type="string" calcext:value-type="string">
            <text:p>Infusion</text:p>
          </table:table-cell>
          <table:table-cell office:value-type="string" calcext:value-type="string">
            <text:p>Homing Beac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errain Effect</text:p>
          </table:table-cell>
          <table:table-cell office:value-type="string" calcext:value-type="string">
            <text:p>Range: 0</text:p>
            <text:p>Target: Area 3$^a$</text:p>
            <text:p>Effect: While the effect is present, you may spend 4 spaces of movement or your Action</text:p>
            <text:p>to teleport to any space in the area from anywhere on the battlefield.</text:p>
            <text:p>Your allies may teleport in this way as well (using their own movement or action)</text:p>
            <text:p>if they are adjacent to you, or may teleport from the area to any space adjacent to you.</text:p>
          </table:table-cell>
          <table:table-cell office:value-type="string" calcext:value-type="string">
            <text:p>Increase the Area by half your REA <text:s/></text:p>
          </table:table-cell>
          <table:table-cell office:value-type="string" calcext:value-type="string">
            <text:p>Teleporting costs only 2 spaces of movement <text:s/></text:p>
          </table:table-cell>
          <table:table-cell office:value-type="string" calcext:value-type="string">
            <text:p>The area is no longer considered a Terrain Effect for the purpose of limits</text:p>
            <text:p>on simultaneous active Terrain Effects  </text:p>
          </table:table-cell>
        </table:table-row>
        <table:table-row table:style-name="ro17">
          <table:table-cell office:value-type="string" calcext:value-type="string">
            <text:p>Infusion</text:p>
          </table:table-cell>
          <table:table-cell office:value-type="string" calcext:value-type="string">
            <text:p>Force Armo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succeed on a Resilience roll against an enemy attack</text:p>
            <text:p>Effect: Push the enemy up to 1$^a$ spaces away from you (each space pushed must be</text:p>
            <text:p>in the same direction and must increase the distance between you).</text:p>
            <text:p>If you Critically Succeed, push them up to 2$^a$ spaces instead.</text:p>
            <text:p>The attack otherwise resolves as normal based on the rolls involved.  </text:p>
          </table:table-cell>
          <table:table-cell office:value-type="string" calcext:value-type="string">
            <text:p>Increase the distance pushed on a Success by half your REA and the distance</text:p>
            <text:p>pushed on a Critical by your full REA  </text:p>
          </table:table-cell>
          <table:table-cell office:value-type="string" calcext:value-type="string">
            <text:p>If you have not used the effect since your last turn, you may add half your</text:p>
            <text:p>FOC to your Resilience roll  </text:p>
          </table:table-cell>
          <table:table-cell/>
        </table:table-row>
        <table:table-row table:style-name="ro17">
          <table:table-cell office:value-type="string" calcext:value-type="string">
            <text:p>Infusion</text:p>
          </table:table-cell>
          <table:table-cell office:value-type="string" calcext:value-type="string">
            <text:p>Magnetic Armo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1</text:p>
            <text:p>Trigger: An enemy attempts to exit a space in range for the first time on their turn,</text:p>
            <text:p> or an enemy ability would move an ally out of an adjacent square.</text:p>
            <text:p>Effect: The enemy attempting to move is 1$^a$ Slowed and does not move, or the ally</text:p>
            <text:p>is Immobilized until the end of the current turn.  </text:p>
          </table:table-cell>
          <table:table-cell office:value-type="string" calcext:value-type="string">
            <text:p>Increase the stacks of Slowed by half your FIN <text:s/></text:p>
          </table:table-cell>
          <table:table-cell office:value-type="string" calcext:value-type="string">
            <text:p>Deal Fatigue to the triggering enemy equal to half your POW <text:s/></text:p>
          </table:table-cell>
          <table:table-cell/>
        </table:table-row>
        <table:table-row table:style-name="ro18">
          <table:table-cell office:value-type="string" calcext:value-type="string">
            <text:p>Infusion</text:p>
          </table:table-cell>
          <table:table-cell office:value-type="string" calcext:value-type="string">
            <text:p>Transmuter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Range: 1$^a$</text:p>
            <text:p>Effect: Whenever you or one of your allies afflicts an enemy within Range with one of the</text:p>
            <text:p>following statuses: Burning, Slowed, Blinded, Shocked, </text:p>
            <text:p>you may replace that application of the status with a different status from the same list.  </text:p>
          </table:table-cell>
          <table:table-cell office:value-type="string" calcext:value-type="string">
            <text:p>Increase the range by half your REA <text:s/></text:p>
          </table:table-cell>
          <table:table-cell office:value-type="string" calcext:value-type="string">
            <text:p>If the target was already suffering from the chosen status, you may deal 1 Stress</text:p>
            <text:p>to them in addition to the other effects  </text:p>
          </table:table-cell>
          <table:table-cell/>
        </table:table-row>
        <table:table-row table:style-name="ro17">
          <table:table-cell office:value-type="string" calcext:value-type="string">
            <text:p>Infusion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ever you are suffering from Burning, Slowed, Blinded or Shocked,</text:p>
            <text:p>you may apply 1$^a$ stacks of that status as part of a successful attack. If you</text:p>
            <text:p>are suffering from more than one, you apply at most 1$^b$ of them. This is in addition</text:p>
            <text:p>to any statuses the attack applies normally (and the stacks add together if the same</text:p>
            <text:p>status applies more than once and has a parameter).  </text:p>
          </table:table-cell>
          <table:table-cell office:value-type="string" calcext:value-type="string">
            <text:p>Increase the number of Status stacks you apply by half your FIN <text:s/></text:p>
          </table:table-cell>
          <table:table-cell office:value-type="string" calcext:value-type="string">
            <text:p>Increase the maximum number of different statuses you can propagate by half your REA <text:s/></text:p>
          </table:table-cell>
          <table:table-cell/>
        </table:table-row>
        <table:table-row table:style-name="ro15">
          <table:table-cell office:value-type="string" calcext:value-type="string">
            <text:p>Archery</text:p>
          </table:table-cell>
          <table:table-cell office:value-type="string" calcext:value-type="string">
            <text:p>Piercing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, Finisher</text:p>
          </table:table-cell>
          <table:table-cell office:value-type="string" calcext:value-type="string">
            <text:p>Range: 6</text:p>
            <text:p>Target: One enemy</text:p>
            <text:p>Special: Targeting and effects from this ability do not trigger any</text:p>
            <text:p>Triggered Effects granted by enemy abilities</text:p>
            <text:p>Succeed: Deal 2 Fatigue</text:p>
            <text:p>Critical: Deal an additional 1$^a$ Fatigue</text:p>
          </table:table-cell>
          <table:table-cell office:value-type="string" calcext:value-type="string">
            <text:p>Add half your POW to the additional Fatigue you deal on a Critical <text:s/></text:p>
          </table:table-cell>
          <table:table-cell office:value-type="string" calcext:value-type="string">
            <text:p>On a Critical, you may increase your Initiative for this combat by your REF <text:s/></text:p>
          </table:table-cell>
          <table:table-cell/>
        </table:table-row>
        <table:table-row table:style-name="ro15">
          <table:table-cell office:value-type="string" calcext:value-type="string">
            <text:p>Archery</text:p>
          </table:table-cell>
          <table:table-cell office:value-type="string" calcext:value-type="string">
            <text:p>Tric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, Finisher</text:p>
          </table:table-cell>
          <table:table-cell office:value-type="string" calcext:value-type="string">
            <text:p>Range: 6</text:p>
            <text:p>Target: One enemy</text:p>
            <text:p>Succeed: Deal 2 Fatigue</text:p>
            <text:p>Critical: Repeat this action immediately, targeting an enemy that has not been targeted</text:p>
            <text:p>by this ability this turn as if you were standing in the space of the first target.</text:p>
            <text:p>You have +1$^b$ Bane on the attack for each previous target of this ability this turn.  </text:p>
          </table:table-cell>
          <table:table-cell office:value-type="string" calcext:value-type="string">
            <text:p>On a Critical, deal additional Fatigue equal to half your POW <text:s/></text:p>
          </table:table-cell>
          <table:table-cell office:value-type="string" calcext:value-type="string">
            <text:p>Reduce the number of Banes applied for previous targets by half your REA <text:s/></text:p>
          </table:table-cell>
          <table:table-cell/>
        </table:table-row>
        <table:table-row table:style-name="ro13">
          <table:table-cell office:value-type="string" calcext:value-type="string">
            <text:p>Archery</text:p>
          </table:table-cell>
          <table:table-cell office:value-type="string" calcext:value-type="string">
            <text:p>Flaming Arro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</text:p>
          </table:table-cell>
          <table:table-cell office:value-type="string" calcext:value-type="string">
            <text:p>Range: 6</text:p>
            <text:p>Target: One enemy</text:p>
            <text:p>Succeed: Deal 2 Fatigue and inflict 1$^a$ Burning </text:p>
          </table:table-cell>
          <table:table-cell office:value-type="string" calcext:value-type="string">
            <text:p>Add half your FIN to the number of Burning stacks you deal on a Success <text:s/></text:p>
          </table:table-cell>
          <table:table-cell office:value-type="string" calcext:value-type="string">
            <text:p>On a Critical, deal additional Fatigue equal to half your POW <text:s/></text:p>
          </table:table-cell>
          <table:table-cell/>
        </table:table-row>
        <table:table-row table:style-name="ro21">
          <table:table-cell office:value-type="string" calcext:value-type="string">
            <text:p>Archery</text:p>
          </table:table-cell>
          <table:table-cell office:value-type="string" calcext:value-type="string">
            <text:p>Point Blan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</text:p>
          </table:table-cell>
          <table:table-cell office:value-type="string" calcext:value-type="string">
            <text:p>Range: 2</text:p>
            <text:p>Target: One enemy</text:p>
            <text:p>Effect: Push the target up to 1$^b$ spaces (you may move them any direction provided</text:p>
            <text:p>each square of movement is in the same direction and leaves them further from you</text:p>
            <text:p>than they started)</text:p>
            <text:p>Succeed: Deal 2 Fatigue</text:p>
            <text:p>Critical: Deal an additional 1$^a$ Fatigue and push the target up to an additional 1$b$</text:p>
          </table:table-cell>
          <table:table-cell office:value-type="string" calcext:value-type="string">
            <text:p>Add half your POW to the additional Fatigue you deal on a Critical <text:s/></text:p>
          </table:table-cell>
          <table:table-cell office:value-type="string" calcext:value-type="string">
            <text:p>Add half your REA to the distance pushed and the additional distance pushed on a Critical <text:s/></text:p>
          </table:table-cell>
          <table:table-cell/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Prepared Shot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Effect: Choose one: Gain Aura 6, or Gain Aura 4 and apply 1$^b$ Mark to an enemy within 6</text:p>
            <text:p>Trigger: An enemy moves into the Aura</text:p>
            <text:p>Effect: You may make a Ranged Physical Attack against the triggering enemy,</text:p>
            <text:p>with 1$^c$ Boon if the target is Marked. </text:p>
            <text:p>If you do, end this stance and you cannot take an action during your next turn</text:p>
            <text:p>(you can still move and take a new stance).</text:p>
            <text:p>Succeed: Deal Fatigue equal to 2 plus the stacks of Mark on the target.</text:p>
            <text:p>Critical: Deal an additional 1$^a$ Fatigue </text:p>
          </table:table-cell>
          <table:table-cell office:value-type="string" calcext:value-type="string">
            <text:p>Add half your POW to the additional Fatigue you deal on a Critical <text:s/></text:p>
          </table:table-cell>
          <table:table-cell office:value-type="string" calcext:value-type="string">
            <text:p>Add half your FIN to the stacks of Mark you apply <text:s/></text:p>
          </table:table-cell>
          <table:table-cell office:value-type="string" calcext:value-type="string">
            <text:p>Add half your FIN to the number of Boons you gain against Marked targets <text:s/></text:p>
          </table:table-cell>
        </table:table-row>
        <table:table-row table:style-name="ro18">
          <table:table-cell office:value-type="string" calcext:value-type="string">
            <text:p>Archery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If you do not move during your turn your Ranged Attacks until the start of your</text:p>
            <text:p>next turn have 1$^a$ Boons. Subtract 1 Boon for each enemy in range 2 of you</text:p>
            <text:p>when making the attack (this cannot cause you to lose more Boons than you gained</text:p>
            <text:p>from this ability).  </text:p>
          </table:table-cell>
          <table:table-cell office:value-type="string" calcext:value-type="string">
            <text:p>Increase the number of Boons by half your FIN <text:s/></text:p>
          </table:table-cell>
          <table:table-cell office:value-type="string" calcext:value-type="string">
            <text:p>You only subtract Boons for nearby enemies in excess of half your FOC <text:s/></text:p>
          </table:table-cell>
          <table:table-cell/>
        </table:table-row>
        <table:table-row table:style-name="ro18">
          <table:table-cell office:value-type="string" calcext:value-type="string">
            <text:p>Archery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 may take an action during your Move instead of afterwards, provided each</text:p>
            <text:p>square moved during your turn is in the same direction. If you make an attack</text:p>
            <text:p>your remaining Movement may not take you further from the target than you were</text:p>
            <text:p>when you made the attack.</text:p>
          </table:table-cell>
          <table:table-cell table:number-columns-repeated="3"/>
        </table:table-row>
        <table:table-row table:style-name="ro25">
          <table:table-cell office:value-type="string" calcext:value-type="string">
            <text:p>Ninjutsu</text:p>
          </table:table-cell>
          <table:table-cell office:value-type="string" calcext:value-type="string">
            <text:p>Assassin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Range: 3</text:p>
            <text:p>Target: One enemy</text:p>
            <text:p>Special: You have 1$^a$ Boon on the attack if the target is Marked</text:p>
            <text:p>Succeed: Deal 2 Fatigue plus additional Fatigue equal to the number of stacks</text:p>
            <text:p>of Mark on the target. If the target becomes Incapacitated, clear all</text:p>
            <text:p>stacks of Mark and become Hidden. Otherwise, reduce the target's</text:p>
            <text:p>Mark by one.</text:p>
            <text:p>Critical: If the target becomes Incapacitated on the same turn you use this ability,</text:p>
            <text:p>apply 1$^b$ Mark to another target in range. Otherwise, the target retains</text:p>
            <text:p>all Mark instead of reducing it.  </text:p>
          </table:table-cell>
          <table:table-cell office:value-type="string" calcext:value-type="string">
            <text:p>Add half your FIN to the number of Boons you gain against Marked targets <text:s/></text:p>
          </table:table-cell>
          <table:table-cell office:value-type="string" calcext:value-type="string">
            <text:p>Add half your REA to the number of stacks of Mark you apply to a new target</text:p>
            <text:p>on a Critical against a target that becomes Incapacitated, and add +1 Mark</text:p>
            <text:p>to the target when you get a Critical but do not Incapacitate the target  </text:p>
          </table:table-cell>
          <table:table-cell/>
        </table:table-row>
        <table:table-row table:style-name="ro21">
          <table:table-cell office:value-type="string" calcext:value-type="string">
            <text:p>Ninjutsu</text:p>
          </table:table-cell>
          <table:table-cell office:value-type="string" calcext:value-type="string">
            <text:p>Poison Dag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1</text:p>
            <text:p>Target: One enemy</text:p>
            <text:p>Effect: The target is Scouted and +1$^a$ Hamstrung</text:p>
            <text:p>Succeed: The target takes 1 Fatigue and 1$^a$ Bleeding</text:p>
            <text:p>Critical: Deal an additional 1$^b$ Fatigue</text:p>
            <text:p>Effect: You may move up to half your speed (round up) (plus 0$^c$ additional spaces)</text:p>
            <text:p>after this ability resolves, hit or miss.  </text:p>
          </table:table-cell>
          <table:table-cell office:value-type="string" calcext:value-type="string">
            <text:p>Add half your FIN to the number of stacks of Hamstrung and Bleeding <text:s/></text:p>
          </table:table-cell>
          <table:table-cell office:value-type="string" calcext:value-type="string">
            <text:p>Add half your POW to the additional Fatigue you deal on a Critical <text:s/></text:p>
          </table:table-cell>
          <table:table-cell office:value-type="string" calcext:value-type="string">
            <text:p>Add half your FIN to the maximum spaces you may move after the attack <text:s/></text:p>
          </table:table-cell>
        </table:table-row>
        <table:table-row table:style-name="ro15">
          <table:table-cell office:value-type="string" calcext:value-type="string">
            <text:p>Ninjutsu</text:p>
          </table:table-cell>
          <table:table-cell office:value-type="string" calcext:value-type="string">
            <text:p>Flashbang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office:value-type="string" calcext:value-type="string">
            <text:p>Range: 3</text:p>
            <text:p>Target: Area 2$^c$</text:p>
            <text:p>Effect: Characters in the area gain +1$^b$ Blinded</text:p>
            <text:p>Succeed: Deal 2 Stress</text:p>
            <text:p>Critical: Deal an additional 1$^a$ Stress, and</text:p>
            <text:p>characters in the area are Disoriented.  </text:p>
          </table:table-cell>
          <table:table-cell office:value-type="string" calcext:value-type="string">
            <text:p>Add half your REA to the additional Stress you deal on a Critical <text:s/></text:p>
          </table:table-cell>
          <table:table-cell office:value-type="string" calcext:value-type="string">
            <text:p>Add half your FIN to the stacks of Blinded <text:s/></text:p>
          </table:table-cell>
          <table:table-cell office:value-type="string" calcext:value-type="string">
            <text:p>You may increase the area by up to half your REA (you can set the area on each use) <text:s/></text:p>
          </table:table-cell>
        </table:table-row>
        <table:table-row table:style-name="ro18">
          <table:table-cell office:value-type="string" calcext:value-type="string">
            <text:p>Ninjutsu</text:p>
          </table:table-cell>
          <table:table-cell office:value-type="string" calcext:value-type="string">
            <text:p>Quiet Mind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make an Evasion roll</text:p>
            <text:p>Effect: If you Critically Succeeded, you may remove 2$^a$ stacks of any one status</text:p>
            <text:p>from yourself after the attack resolves. Otherwise, you may treat the outcome</text:p>
            <text:p>as one category better than the roll. In either case, end this stance.  </text:p>
          </table:table-cell>
          <table:table-cell office:value-type="string" calcext:value-type="string">
            <text:p>Add half your REA to the number of stacks removed on a Critical <text:s/></text:p>
          </table:table-cell>
          <table:table-cell office:value-type="string" calcext:value-type="string">
            <text:p>You may remove 1 stack of a status when you get a normal Success (before upgrading the result)</text:p>
          </table:table-cell>
          <table:table-cell/>
        </table:table-row>
        <table:table-row table:style-name="ro17">
          <table:table-cell office:value-type="string" calcext:value-type="string">
            <text:p>Ninjutsu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3</text:p>
            <text:p>Target: One enemy</text:p>
            <text:p>Effect: The target gains +1 Mark, you become Hidden, and gain Aura 1$^b$</text:p>
            <text:p>Trigger: A enemy with Mark enters a square in the Aura</text:p>
            <text:p>Effect: The triggering enemy immediately gains +1$^a$ Mark </text:p>
          </table:table-cell>
          <table:table-cell office:value-type="string" calcext:value-type="string">
            <text:p>Add half your FIN to the number of stacks of Mark applied by the Triggered Effect <text:s/></text:p>
          </table:table-cell>
          <table:table-cell office:value-type="string" calcext:value-type="string">
            <text:p>Increase the size of the Aura by half your REA <text:s/></text:p>
          </table:table-cell>
          <table:table-cell/>
        </table:table-row>
        <table:table-row table:style-name="ro3">
          <table:table-cell office:value-type="string" calcext:value-type="string">
            <text:p>Ninjutsu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Increase your Speed by 1$^a$</text:p>
          </table:table-cell>
          <table:table-cell office:value-type="string" calcext:value-type="string">
            <text:p>Increase your Speed by an additional 1 <text:s/></text:p>
          </table:table-cell>
          <table:table-cell office:value-type="string" calcext:value-type="string">
            <text:p>If you move at least 4 on your turn, gain +1 Boon on your next attack <text:s/></text:p>
          </table:table-cell>
          <table:table-cell/>
        </table:table-row>
        <table:table-row table:style-name="ro16">
          <table:table-cell office:value-type="string" calcext:value-type="string">
            <text:p>Ninjutsu</text:p>
          </table:table-cell>
          <table:table-cell office:value-type="string" calcext:value-type="string">
            <text:p>Transpositional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During your move you may spend 1 space of movement to swap places</text:p>
            <text:p>with an ally in Range 1$^b$</text:p>
          </table:table-cell>
          <table:table-cell office:value-type="string" calcext:value-type="string">
            <text:p>You may use this effect to swap with an enemy, and when you swap</text:p>
            <text:p>with an ally it does not cost movement.  </text:p>
          </table:table-cell>
          <table:table-cell office:value-type="string" calcext:value-type="string">
            <text:p>You may exchange places with an ally within a Range up to half your</text:p>
            <text:p>REA as a Teleport using only 1 space of movement  </text:p>
          </table:table-cell>
          <table:table-cell/>
        </table:table-row>
        <table:table-row table:style-name="ro26">
          <table:table-cell office:value-type="string" calcext:value-type="string">
            <text:p>Kineticism</text:p>
          </table:table-cell>
          <table:table-cell office:value-type="string" calcext:value-type="string">
            <text:p>Two Body Probl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4</text:p>
            <text:p>Target: One character in range and a second character within 4</text:p>
            <text:p>who shares a row or column with the first target</text:p>
            <text:p>Effect: Propel one or both targets closer to each other along the line until</text:p>
            <text:p>they are adjacent or until they collide with another character or</text:p>
            <text:p>terrain +2 or more above their starting position</text:p>
            <text:p>Succeed: You may deal up to 2$^a$ Fatigue split however you wish between</text:p>
            <text:p>the targets and any other character they collided with</text:p>
            <text:p>Critical: You may cause one$^b$ of the targets to become Dazed </text:p>
          </table:table-cell>
          <table:table-cell office:value-type="string" calcext:value-type="string">
            <text:p>Add half your POW to the Fatigue you deal on a Success <text:s/></text:p>
          </table:table-cell>
          <table:table-cell office:value-type="string" calcext:value-type="string">
            <text:p>You may apply Dazed to one target on a Success or both targets on a Critical <text:s/></text:p>
          </table:table-cell>
          <table:table-cell/>
        </table:table-row>
        <table:table-row table:style-name="ro21">
          <table:table-cell office:value-type="string" calcext:value-type="string">
            <text:p>Kineticism</text:p>
          </table:table-cell>
          <table:table-cell office:value-type="string" calcext:value-type="string">
            <text:p>Vector Fie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errain Effect</text:p>
          </table:table-cell>
          <table:table-cell office:value-type="string" calcext:value-type="string">
            <text:p>Range: 4</text:p>
            <text:p>Target: Area 2$^a$</text:p>
            <text:p>Effect: Indicate a side or corner of the area. Whenever a character moves</text:p>
            <text:p>into any space in the area they are pushed one space toward</text:p>
            <text:p>the indicated side or corner unless they spend 1$^b$ additional</text:p>
            <text:p>movement to resist this effect. Movement triggered by this effect</text:p>
            <text:p>does not trigger this effect.  </text:p>
          </table:table-cell>
          <table:table-cell office:value-type="string" calcext:value-type="string">
            <text:p>Add half your REA to the size of the Area <text:s/></text:p>
          </table:table-cell>
          <table:table-cell office:value-type="string" calcext:value-type="string">
            <text:p>Add 1 to the additional movement cost <text:s/></text:p>
          </table:table-cell>
          <table:table-cell/>
        </table:table-row>
        <table:table-row table:style-name="ro13">
          <table:table-cell office:value-type="string" calcext:value-type="string">
            <text:p>Kineticism</text:p>
          </table:table-cell>
          <table:table-cell office:value-type="string" calcext:value-type="string">
            <text:p>Accele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, u, f, f</text:p>
          </table:table-cell>
          <table:table-cell office:value-type="string" calcext:value-type="string">
            <text:p>Range: 4</text:p>
            <text:p>Target: One Ally or Self</text:p>
            <text:p>Effect: Target is Hastened </text:p>
          </table:table-cell>
          <table:table-cell office:value-type="string" calcext:value-type="string">
            <text:p>You may apply the effect to a second target <text:s text:c="2"/></text:p>
          </table:table-cell>
          <table:table-cell office:value-type="string" calcext:value-type="string">
            <text:p>After using this ability, you gain the benefit of the Dodge Basic Stance</text:p>
            <text:p>until the start of your next turn (in addition to your actual Stance)  </text:p>
          </table:table-cell>
          <table:table-cell/>
        </table:table-row>
        <table:table-row table:style-name="ro15">
          <table:table-cell office:value-type="string" calcext:value-type="string">
            <text:p>Kineticism</text:p>
          </table:table-cell>
          <table:table-cell office:value-type="string" calcext:value-type="string">
            <text:p>Orthogonal Incidenc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are targeted with an ability that inflicts Fatigue or Stress</text:p>
            <text:p>by an enemy sharing a row or column with your position and at least 3 spaces away</text:p>
            <text:p>Effect: Add your Kineticism Training Level to your Defense roll and end this stance</text:p>
            <text:p>Critical: Apply the effect to a new target sharing a row or column with you</text:p>
            <text:p>which is at a right angle to the row or column you share with the</text:p>
            <text:p>triggering enemy (but reduce the Fatigue or Stress dealt by 1)$^b$</text:p>
          </table:table-cell>
          <table:table-cell office:value-type="string" calcext:value-type="string">
            <text:p>Gain an additional bonus to the Defense roll equal to half your REA <text:s/></text:p>
          </table:table-cell>
          <table:table-cell office:value-type="string" calcext:value-type="string">
            <text:p>The target takes the full impact of the effect on a Critical <text:s/></text:p>
          </table:table-cell>
          <table:table-cell/>
        </table:table-row>
        <table:table-row table:style-name="ro15">
          <table:table-cell office:value-type="string" calcext:value-type="string">
            <text:p>Kineticism</text:p>
          </table:table-cell>
          <table:table-cell office:value-type="string" calcext:value-type="string">
            <text:p>Eigencomplex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Effect: Gain Aura 1$^a$ and indicate an orientation: clockwise or counterclockwise.</text:p>
            <text:p>Whenever a character moves into any space in the aura, they are pushed one space</text:p>
            <text:p>in a cardinal direction in the indicated orientation unless they spend</text:p>
            <text:p>an extra space of movement to resist this effect. Movement triggered by this effect</text:p>
            <text:p>does not trigger this effect. You cannot be targeted by enemies in this aura</text:p>
            <text:p>unless they are orthogonally adjacent to you.  </text:p>
          </table:table-cell>
          <table:table-cell office:value-type="string" calcext:value-type="string">
            <text:p>Increase the size of the Aura by half your REA <text:s/></text:p>
          </table:table-cell>
          <table:table-cell office:value-type="string" calcext:value-type="string">
            <text:p>Ranged attacks targeting you from 3 or more spaces away are at +1 Bane</text:p>
            <text:p>while you are in this Stance  </text:p>
          </table:table-cell>
          <table:table-cell/>
        </table:table-row>
        <table:table-row table:style-name="ro13">
          <table:table-cell office:value-type="string" calcext:value-type="string">
            <text:p>Kineticism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Allies may bounce abilities off of your space as if they were originating</text:p>
            <text:p>from you. You must be in range of their ability and they must have</text:p>
            <text:p>an unobstructed path to you.  </text:p>
          </table:table-cell>
          <table:table-cell office:value-type="string" calcext:value-type="string">
            <text:p>Abilities bounced off of you may ignore Cover <text:s/></text:p>
          </table:table-cell>
          <table:table-cell office:value-type="string" calcext:value-type="string">
            <text:p>When an ability is bounced off of you you may move 1 before the attack.</text:p>
            <text:p>Use your new position to determine whether the target is in range.  </text:p>
          </table:table-cell>
          <table:table-cell/>
        </table:table-row>
        <table:table-row table:style-name="ro13">
          <table:table-cell office:value-type="string" calcext:value-type="string">
            <text:p>Kineticism</text:p>
          </table:table-cell>
          <table:table-cell office:value-type="string" calcext:value-type="string">
            <text:p>Newtonian Mechanics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ever you target a creature or area with an ability using an action,</text:p>
            <text:p>you may move yourself 1$^a$ spaces further away from that creature</text:p>
            <text:p>(or from the closest space in the area).  </text:p>
          </table:table-cell>
          <table:table-cell office:value-type="string" calcext:value-type="string">
            <text:p>Increase the distance you move by half your REA <text:s/></text:p>
          </table:table-cell>
          <table:table-cell office:value-type="string" calcext:value-type="string">
            <text:p>You may move the target 1 as well in the opposite direction you move, |</text:p>
            <text:p>after the ability resolves (in addition to any movement the ability applies normally)  </text:p>
          </table:table-cell>
          <table:table-cell/>
        </table:table-row>
        <table:table-row table:style-name="ro15">
          <table:table-cell office:value-type="string" calcext:value-type="string">
            <text:p>Animism</text:p>
          </table:table-cell>
          <table:table-cell office:value-type="string" calcext:value-type="string">
            <text:p>Ameliorate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Range: 1$^a$</text:p>
            <text:p>Target: One Ally or Self</text:p>
            <text:p>Effect: Choose 1: Reduce the target's Fatigue by 1,</text:p>
            <text:p>reduce the target's Stress by 1, or</text:p>
            <text:p>reduce the stacks of a Status by 2</text:p>
            <text:p>Overexert: Choose 2 instead, or choose the same one twice  </text:p>
          </table:table-cell>
          <table:table-cell office:value-type="string" calcext:value-type="string">
            <text:p>Increase the Range by half your REA <text:s/></text:p>
          </table:table-cell>
          <table:table-cell office:value-type="string" calcext:value-type="string">
            <text:p>When you use this ability (in either its normal or Overexert modes)</text:p>
            <text:p>you may choose an additional option not already selected  </text:p>
          </table:table-cell>
          <table:table-cell/>
        </table:table-row>
        <table:table-row table:style-name="ro15">
          <table:table-cell office:value-type="string" calcext:value-type="string">
            <text:p>Animism</text:p>
          </table:table-cell>
          <table:table-cell office:value-type="string" calcext:value-type="string">
            <text:p>Spirit Arm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Range: 2</text:p>
            <text:p>Target: One Ally or Self</text:p>
            <text:p>Effect: The target may add your Animism Training level to a Defense roll,</text:p>
            <text:p>reducing any Fatigue or Stress taken by 1. Alternatively if they</text:p>
            <text:p>fail a Panic or Incapacity Roll they may reroll. Either way, end this Buff</text:p>
            <text:p>after it is used unless you take Stress to maintain it  </text:p>
          </table:table-cell>
          <table:table-cell office:value-type="string" calcext:value-type="string">
            <text:p>The bonus granted to the roll increases by half your FOC <text:s/></text:p>
          </table:table-cell>
          <table:table-cell office:value-type="string" calcext:value-type="string">
            <text:p>The target may add your Animism Training to their reroll <text:s/></text:p>
          </table:table-cell>
          <table:table-cell/>
        </table:table-row>
        <table:table-row table:style-name="ro15">
          <table:table-cell office:value-type="string" calcext:value-type="string">
            <text:p>Animism</text:p>
          </table:table-cell>
          <table:table-cell office:value-type="string" calcext:value-type="string">
            <text:p>Command Aggress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4</text:p>
            <text:p>Effect: Position a Minion. You may have your minion make a Physical Attack</text:p>
            <text:p>against an enemy adjacent to it (resolve using your Animism)</text:p>
            <text:p>Effect: Push the target 1$^b$ spaces</text:p>
            <text:p>Success: Deal 2 Fatigue</text:p>
            <text:p>Critical: Deal an additional 1$^a$ Fatigue </text:p>
          </table:table-cell>
          <table:table-cell office:value-type="string" calcext:value-type="string">
            <text:p>Increase the additional Fatigue on a Critical by half your POW <text:s/></text:p>
          </table:table-cell>
          <table:table-cell office:value-type="string" calcext:value-type="string">
            <text:p>Increase the distance pushed by half your REA <text:s/></text:p>
          </table:table-cell>
          <table:table-cell/>
        </table:table-row>
        <table:table-row table:style-name="ro15">
          <table:table-cell office:value-type="string" calcext:value-type="string">
            <text:p>Animism</text:p>
          </table:table-cell>
          <table:table-cell office:value-type="string" calcext:value-type="string">
            <text:p>Command Protecto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2</text:p>
            <text:p>Effect: When you take or renew this stance, Position a Minion</text:p>
            <text:p>Trigger: An enemy exits a space adjacent to your minion for the first time on their turn.</text:p>
            <text:p>Effect: You may make a Physical Attack against the triggering enemy.</text:p>
            <text:p>If you do, end this stance.</text:p>
            <text:p>Success: Deal 1$^a$ Fatigue </text:p>
          </table:table-cell>
          <table:table-cell office:value-type="string" calcext:value-type="string">
            <text:p>Increase the Fatigue on a success by half your POW <text:s/></text:p>
          </table:table-cell>
          <table:table-cell office:value-type="string" calcext:value-type="string">
            <text:p>On a Critical, apply Slowed equal to half your FIN <text:s/></text:p>
          </table:table-cell>
          <table:table-cell/>
        </table:table-row>
        <table:table-row table:style-name="ro18">
          <table:table-cell office:value-type="string" calcext:value-type="string">
            <text:p>Animism</text:p>
          </table:table-cell>
          <table:table-cell office:value-type="string" calcext:value-type="string">
            <text:p>Bolste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2</text:p>
            <text:p>Effect: When you take or renew this stance, Position a Minion.</text:p>
            <text:p>Effect: The minion has Aura 1$^a$. You and your allies have</text:p>
            <text:p>+1$^b$ to all defensive rolls while in the aura.  </text:p>
          </table:table-cell>
          <table:table-cell office:value-type="string" calcext:value-type="string">
            <text:p>Increase the size of the Aura by half your REA <text:s/></text:p>
          </table:table-cell>
          <table:table-cell office:value-type="string" calcext:value-type="string">
            <text:p>Increase the bonus to defensive rolls by half your FOC <text:s/></text:p>
          </table:table-cell>
          <table:table-cell/>
        </table:table-row>
        <table:table-row table:style-name="ro21">
          <table:table-cell office:value-type="string" calcext:value-type="string">
            <text:p>Animism</text:p>
          </table:table-cell>
          <table:table-cell office:value-type="string" calcext:value-type="string">
            <text:p>Channel Will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 take the Basic Attack or Resuscitate actions or</text:p>
            <text:p>the Assist or Protect stances, you may use your Minion's space</text:p>
            <text:p>instead of your own for the purpose of determining whether a target is in Range.</text:p>
            <text:p>You may also select targets for other abilities you have as if you were</text:p>
            <text:p>in your Minion's space, but if they have a Range greater than [1],</text:p>
            <text:p>they are treated as if they had a Range of [1] instead (this does not</text:p>
            <text:p>apply to basic actions and stances).  </text:p>
          </table:table-cell>
          <table:table-cell office:value-type="string" calcext:value-type="string">
            <text:p>Increase the maximum Range of channeled non-Basic abilities by half your REA <text:s/></text:p>
          </table:table-cell>
          <table:table-cell office:value-type="string" calcext:value-type="string">
            <text:p>When you use a Basic Ability in this way, you may reduce your Stress Load by 1 <text:s/></text:p>
          </table:table-cell>
          <table:table-cell/>
        </table:table-row>
        <table:table-row table:style-name="ro16">
          <table:table-cell office:value-type="string" calcext:value-type="string">
            <text:p>Animism</text:p>
          </table:table-cell>
          <table:table-cell office:value-type="string" calcext:value-type="string">
            <text:p>Soul Bond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r minion would disappear as a result of taking Fatigue or Stress,</text:p>
            <text:p>you may prevent it from disappearing by taking Stress</text:p>
          </table:table-cell>
          <table:table-cell office:value-type="string" calcext:value-type="string">
            <text:p>If an ally adjacent to your minion would take Fatigue or Stress,</text:p>
            <text:p>you may reduce the amount they take by 1 by taking Stress </text:p>
          </table:table-cell>
          <table:table-cell office:value-type="string" calcext:value-type="string">
            <text:p>When you would take Fatigue or Stress while you have a minion in play,</text:p>
            <text:p>you may reduce the amount you take by 1 by removing your minion from play</text:p>
          </table:table-cell>
          <table:table-cell/>
        </table:table-row>
        <table:table-row table:style-name="ro20">
          <table:table-cell office:value-type="string" calcext:value-type="string">
            <text:p>Mesmerism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office:value-type="string" calcext:value-type="string">
            <text:p>Range: 4</text:p>
            <text:p>Target: One character. If the target is an ally they must be willing</text:p>
            <text:p>and the attack automatically Succeeds</text:p>
            <text:p>Effect: Force the target to move up to half their Speed to any other space</text:p>
            <text:p>of your choice within range</text:p>
            <text:p>Success: Force the target to move up to their full Speed instead</text:p>
            <text:p>Critical: If the target is an Enemy, deal $2^a$ StressOverexert: If the attack Succeeds, the target is Immobilized until the end of their turn.</text:p>
            <text:p>You may choose to use Overexert after the attack resolves.  </text:p>
          </table:table-cell>
          <table:table-cell office:value-type="string" calcext:value-type="string">
            <text:p>Add half your REA to the additional Stress you deal on a Critical <text:s/></text:p>
          </table:table-cell>
          <table:table-cell office:value-type="string" calcext:value-type="string">
            <text:p>On a Critical, you may use the Overexert effect without taking Stress</text:p>
            <text:p>in lieu of the normal Critical effect  </text:p>
          </table:table-cell>
          <table:table-cell/>
        </table:table-row>
        <table:table-row table:style-name="ro18">
          <table:table-cell office:value-type="string" calcext:value-type="string">
            <text:p>Mesmerism</text:p>
          </table:table-cell>
          <table:table-cell office:value-type="string" calcext:value-type="string">
            <text:p>Addl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office:value-type="string" calcext:value-type="string">
            <text:p>Range: 4</text:p>
            <text:p>Target: One enemy</text:p>
            <text:p>Success: The target is Disoriented and gains +1$^b$ Slowed</text:p>
            <text:p>Overexert: Deal 2$^a$ Stress </text:p>
          </table:table-cell>
          <table:table-cell office:value-type="string" calcext:value-type="string">
            <text:p>Add half your REA to the additional Stress you deal when using Overexert <text:s/></text:p>
          </table:table-cell>
          <table:table-cell office:value-type="string" calcext:value-type="string">
            <text:p>Add half your FIN to the stacks of Slowed <text:s/></text:p>
          </table:table-cell>
          <table:table-cell/>
        </table:table-row>
        <table:table-row table:style-name="ro15">
          <table:table-cell office:value-type="string" calcext:value-type="string">
            <text:p>Mesmerism</text:p>
          </table:table-cell>
          <table:table-cell office:value-type="string" calcext:value-type="string">
            <text:p>Puppe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office:value-type="string" calcext:value-type="string">
            <text:p>Range: 4</text:p>
            <text:p>Target: One character in range. If the target is an ally the attack automatically Succeeds.</text:p>
            <text:p>Success: The target makes a Basic Attack against a valid target, resolved using your Mesmerism.</text:p>
            <text:p>Overexert: You may direct the target to use a different action you have access to</text:p>
            <text:p>instead of a Basic Attack</text:p>
            <text:p>Critical: If the target is an enemy, deal 2$^a$ Stress </text:p>
          </table:table-cell>
          <table:table-cell office:value-type="string" calcext:value-type="string">
            <text:p>Add half your REA to the additional Stress you deal on a Critical against the second target <text:s/></text:p>
          </table:table-cell>
          <table:table-cell office:value-type="string" calcext:value-type="string">
            <text:p>On a Critical against the first target, you may use the Overexert effect</text:p>
            <text:p>without taking Stress. If you do, you do not get this ability's normal</text:p>
            <text:p>Critical benefit against the second target  </text:p>
          </table:table-cell>
          <table:table-cell/>
        </table:table-row>
        <table:table-row table:style-name="ro26">
          <table:table-cell office:value-type="string" calcext:value-type="string">
            <text:p>Mesmerism</text:p>
          </table:table-cell>
          <table:table-cell office:value-type="string" calcext:value-type="string">
            <text:p>The Prestig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1$^b$</text:p>
            <text:p>Trigger: You or an ally in Range are targeted by an enemy attack</text:p>
            <text:p>Effect: If there is another character in Range that isn't the attacker, you may</text:p>
            <text:p>swap places with them, causing the attack to target them instead of you</text:p>
            <text:p>or vice versa. This might cause an ability that can normally only target</text:p>
            <text:p>an enemy of the attacker to target their ally instead. If the new target</text:p>
            <text:p>is an enemy, make a Mental Attack against them. If they Succeed this effect</text:p>
            <text:p>fails but you may contest the triggering attack normally. After this effect</text:p>
            <text:p>triggers, end this stance unless you take Stress to maintain it.  </text:p>
          </table:table-cell>
          <table:table-cell office:value-type="string" calcext:value-type="string">
            <text:p>You may use the Effect even without an adjacent character, moving</text:p>
            <text:p>1 space before the attack resolves. If this results in you being</text:p>
            <text:p>out of range, the attack automatically Misses (you still take any</text:p>
            <text:p>effects that don't require a Success)  </text:p>
          </table:table-cell>
          <table:table-cell office:value-type="string" calcext:value-type="string">
            <text:p>Increase the Range to 2 <text:s/></text:p>
          </table:table-cell>
          <table:table-cell/>
        </table:table-row>
        <table:table-row table:style-name="ro18">
          <table:table-cell office:value-type="string" calcext:value-type="string">
            <text:p>Mesmerism</text:p>
          </table:table-cell>
          <table:table-cell office:value-type="string" calcext:value-type="string">
            <text:p>Mind Over Matte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Effect: If you would take Fatigue, you may choose to reduce the Fatigue</text:p>
            <text:p>you take by up to [1] and take the same amount of Stress instead.</text:p>
            <text:p>If you do, end this stance unless you take an additional [1] Stress</text:p>
            <text:p>for each previous time you have used this effect since your last turn  </text:p>
          </table:table-cell>
          <table:table-cell office:value-type="string" calcext:value-type="string">
            <text:p>Increase the maximum amount of Fatigue you can convert to Stress by half your FOC <text:s/></text:p>
          </table:table-cell>
          <table:table-cell office:value-type="string" calcext:value-type="string">
            <text:p>Reduce the total amount of additional Stress required each time you</text:p>
            <text:p>maintain this stance by 1  </text:p>
          </table:table-cell>
          <table:table-cell/>
        </table:table-row>
        <table:table-row table:style-name="ro16">
          <table:table-cell office:value-type="string" calcext:value-type="string">
            <text:p>Mesmerism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Increase your Maximum Stress Tolerance by 1$^a$ and gain</text:p>
            <text:p>a bonus on Panic Rolls of the same amount</text:p>
          </table:table-cell>
          <table:table-cell office:value-type="string" calcext:value-type="string">
            <text:p>Add an additional 1 to both <text:s/></text:p>
          </table:table-cell>
          <table:table-cell office:value-type="string" calcext:value-type="string">
            <text:p>Apply the bonus to your Resolve rolls as well <text:s/></text:p>
          </table:table-cell>
          <table:table-cell/>
        </table:table-row>
        <table:table-row table:style-name="ro13">
          <table:table-cell office:value-type="string" calcext:value-type="string">
            <text:p>Mesmerism</text:p>
          </table:table-cell>
          <table:table-cell office:value-type="string" calcext:value-type="string">
            <text:p>Disappearing Ac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ever you successfully defend against an enemy attack, become Hidden.</text:p>
          </table:table-cell>
          <table:table-cell office:value-type="string" calcext:value-type="string">
            <text:p>In addition, gain +1 Boon on your next attack <text:s/></text:p>
          </table:table-cell>
          <table:table-cell office:value-type="string" calcext:value-type="string">
            <text:p>After applying this effect the next attack against you before the start</text:p>
            <text:p>of your turn has +1 Bane, and Hidden does not end before the start</text:p>
            <text:p>of your turn unless you are Successfully attacked by an adjacent enemy</text:p>
          </table:table-cell>
          <table:table-cell/>
        </table:table-row>
        <table:table-row table:style-name="ro15">
          <table:table-cell office:value-type="string" calcext:value-type="string">
            <text:p>Elementalism</text:p>
          </table:table-cell>
          <table:table-cell office:value-type="string" calcext:value-type="string">
            <text:p>Fire Burs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</text:p>
          </table:table-cell>
          <table:table-cell office:value-type="string" calcext:value-type="string">
            <text:p>Range: 4</text:p>
            <text:p>Target: Area 2$^a$</text:p>
            <text:p>Success: Characters in the area take 1 Fatigue</text:p>
            <text:p>Critical: Deal 1 additional Fatigue and the target gains +1$^b$ Burning</text:p>
            <text:p>Overexert: Choose one: Increase the Area by 2, treat normal Successes as Criticals,</text:p>
            <text:p>or double the Critical effect  </text:p>
          </table:table-cell>
          <table:table-cell office:value-type="string" calcext:value-type="string">
            <text:p>Increase the area by half your REA <text:s/></text:p>
          </table:table-cell>
          <table:table-cell office:value-type="string" calcext:value-type="string">
            <text:p>Add +1 Burning on a Success effect, and increase the stacks on a Critical</text:p>
            <text:p>by half your POW  </text:p>
          </table:table-cell>
          <table:table-cell/>
        </table:table-row>
        <table:table-row table:style-name="ro21">
          <table:table-cell office:value-type="string" calcext:value-type="string">
            <text:p>Elementalism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errain Effect</text:p>
          </table:table-cell>
          <table:table-cell office:value-type="string" calcext:value-type="string">
            <text:p>Range: 4</text:p>
            <text:p>Target: Area 2$^a$</text:p>
            <text:p>Effect: The area is Difficult Terrain.</text:p>
            <text:p>Overexert: Whenever a character starts their turn in the area or enters it</text:p>
            <text:p>for the first time on a turn, make a Physical Attack against them,</text:p>
            <text:p>dealing Fatigue on a success. At the start of your turn</text:p>
            <text:p>you may maintain this effect by paying the Overexert cost again.  </text:p>
          </table:table-cell>
          <table:table-cell office:value-type="string" calcext:value-type="string">
            <text:p>Increase the area by half your REA <text:s/></text:p>
          </table:table-cell>
          <table:table-cell office:value-type="string" calcext:value-type="string">
            <text:p>You don't need to pay the Overexert cost to maintain the Overexert effect</text:p>
            <text:p>provided your Stress Load does not exceed your Stress Tolerance  </text:p>
          </table:table-cell>
          <table:table-cell/>
        </table:table-row>
        <table:table-row table:style-name="ro20">
          <table:table-cell office:value-type="string" calcext:value-type="string">
            <text:p>Elementalism</text:p>
          </table:table-cell>
          <table:table-cell office:value-type="string" calcext:value-type="string">
            <text:p>Unlimited Pow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office:value-type="string" calcext:value-type="string">
            <text:p>Range: Self</text:p>
            <text:p>Target: One adjacent enemy</text:p>
            <text:p>Success: Deal 2$^a$ Stress</text:p>
            <text:p>Effect: The target gains +1$^b$ Shocked</text:p>
            <text:p>Overexert: The target becomes Aura 1$^c$ and on a Success you may repeat</text:p>
            <text:p>this action immediately, except the targets are resolved as if you were</text:p>
            <text:p>the previous target, and you cannot target a character that has been</text:p>
            <text:p>targeted by this ability this turn.</text:p>
          </table:table-cell>
          <table:table-cell office:value-type="string" calcext:value-type="string">
            <text:p>Increase the Stress you deal on a Success by half your REA <text:s/></text:p>
          </table:table-cell>
          <table:table-cell office:value-type="string" calcext:value-type="string">
            <text:p>Increase the Shocked stacks by half your FIN <text:s/></text:p>
          </table:table-cell>
          <table:table-cell office:value-type="string" calcext:value-type="string">
            <text:p>Increase the Overexert Aura size by 1 <text:s/></text:p>
          </table:table-cell>
        </table:table-row>
        <table:table-row table:style-name="ro18">
          <table:table-cell office:value-type="string" calcext:value-type="string">
            <text:p>Elementalism</text:p>
          </table:table-cell>
          <table:table-cell office:value-type="string" calcext:value-type="string">
            <text:p>Earthen Hid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are targeted by a Physical Attack</text:p>
            <text:p>Effect: Add your Elementalism Training to your Resilience roll.</text:p>
            <text:p>If you roll a Critical success, you may remain in this stance.</text:p>
            <text:p>Otherwise, end this stance unless you take Stress to stay in it.  </text:p>
          </table:table-cell>
          <table:table-cell office:value-type="string" calcext:value-type="string">
            <text:p>Add half your POW to the bonus <text:s/></text:p>
          </table:table-cell>
          <table:table-cell office:value-type="string" calcext:value-type="string">
            <text:p>Reduce the threshold for a Critical Success by your FOC <text:s/></text:p>
          </table:table-cell>
          <table:table-cell/>
        </table:table-row>
        <table:table-row table:style-name="ro18">
          <table:table-cell office:value-type="string" calcext:value-type="string">
            <text:p>Elementalism</text:p>
          </table:table-cell>
          <table:table-cell office:value-type="string" calcext:value-type="string">
            <text:p>Cloak of Wind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are targeted by an Attack</text:p>
            <text:p>Effect: Add your Elementalism Training to your Evasion roll. If you roll a</text:p>
            <text:p>Critical Success, you may remain in this stance. Otherwise, end this stance</text:p>
            <text:p>unless you take Stress to stay in it.  </text:p>
          </table:table-cell>
          <table:table-cell office:value-type="string" calcext:value-type="string">
            <text:p>Add half your FIN to the bonus <text:s/></text:p>
          </table:table-cell>
          <table:table-cell office:value-type="string" calcext:value-type="string">
            <text:p>Reduce the threshold for a Critical Success by your FOC <text:s/></text:p>
          </table:table-cell>
          <table:table-cell/>
        </table:table-row>
        <table:table-row table:style-name="ro18">
          <table:table-cell office:value-type="string" calcext:value-type="string">
            <text:p>Elementalism</text:p>
          </table:table-cell>
          <table:table-cell office:value-type="string" calcext:value-type="string">
            <text:p>Living Spark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Range: 2$^a$</text:p>
            <text:p>Effect: Whenever a character in Range loses the Burning condition</text:p>
            <text:p>without using the Recover action, you may apply +1$^b$ Burning</text:p>
            <text:p>to another character within half this ability's Range (rounded up) of them.  </text:p>
          </table:table-cell>
          <table:table-cell office:value-type="string" calcext:value-type="string">
            <text:p>Add half your REA to the Range <text:s/></text:p>
          </table:table-cell>
          <table:table-cell office:value-type="string" calcext:value-type="string">
            <text:p>Increase the stacks of Burning on the new target by half your FIN <text:s/></text:p>
          </table:table-cell>
          <table:table-cell/>
        </table:table-row>
        <table:table-row table:style-name="ro13">
          <table:table-cell office:value-type="string" calcext:value-type="string">
            <text:p>Elementalism</text:p>
          </table:table-cell>
          <table:table-cell office:value-type="string" calcext:value-type="string">
            <text:p>Deep Freez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ever an enemy enters any space in a Terrain Effect you created</text:p>
            <text:p>for the first time on a turn, you may make a Mental Attack against them.</text:p>
            <text:p>On a Success they gain +1$^a$ Slowed </text:p>
          </table:table-cell>
          <table:table-cell office:value-type="string" calcext:value-type="string">
            <text:p>Add half your FIN to the stacks of Slowed <text:s/></text:p>
          </table:table-cell>
          <table:table-cell office:value-type="string" calcext:value-type="string">
            <text:p>On a Critical, deal Fatigue equal to half your POW <text:s/></text:p>
          </table:table-cell>
          <table:table-cell/>
        </table:table-row>
      </table:table>
      <table:table table:name="Nova Abilities" table:style-name="ta1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9" table:number-columns-repeated="2" table:default-cell-style-name="Default"/>
        <table:table-row table:style-name="ro3">
          <table:table-cell office:value-type="string" calcext:value-type="string">
            <table:cell-range-source table:name="CSV_all" xlink:type="simple" xlink:href="../../abilities/generated/all_nova.csv" table:filter-name="Text - txt - csv (StarCalc)" table:filter-options="44,34,12,1,,0,false,false,true,false,false,0,false,false,true" table:last-column-spanned="8" table:last-row-spanned="10"/>
            <text:p>Art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pgrade a</text:p>
          </table:table-cell>
          <table:table-cell office:value-type="string" calcext:value-type="string">
            <text:p>Upgrade b</text:p>
          </table:table-cell>
          <table:table-cell office:value-type="string" calcext:value-type="string">
            <text:p>Upgrade c</text:p>
          </table:table-cell>
        </table:table-row>
        <table:table-row table:style-name="ro21">
          <table:table-cell office:value-type="string" calcext:value-type="string">
            <text:p>Brawling</text:p>
          </table:table-cell>
          <table:table-cell office:value-type="string" calcext:value-type="string">
            <text:p>Cannonball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Potential: You are targeted with an attack</text:p>
            <text:p>Cost: 6</text:p>
            <text:p>Target: Aura 6</text:p>
            <text:p>Effect: Teleport up to your Speed, then all enemies in the Aura are pulled toward you</text:p>
            <text:p>as far as possible</text:p>
            <text:p>Success: Affected enemies are +1 Weakened and +1 Slowed</text:p>
            <text:p>Critical: Deal Fatigue</text:p>
          </table:table-cell>
          <table:table-cell office:value-type="string" calcext:value-type="string">
            <text:p>On a Critical, the target is Stunned</text:p>
          </table:table-cell>
          <table:table-cell office:value-type="string" calcext:value-type="string">
            <text:p>Deal Fatigue on a Success</text:p>
          </table:table-cell>
          <table:table-cell/>
        </table:table-row>
        <table:table-row table:style-name="ro20">
          <table:table-cell office:value-type="string" calcext:value-type="string">
            <text:p>Dueling</text:p>
          </table:table-cell>
          <table:table-cell office:value-type="string" calcext:value-type="string">
            <text:p>A Pound of Flech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Potential: You roll doubles</text:p>
            <text:p>Cost: X (Max: 6)</text:p>
            <text:p>Target: Line $\infty$</text:p>
            <text:p>Effect: Teleport to the end of the Line</text:p>
            <text:p>Success: Deal 2 Fatigue and +1 Bleed</text:p>
            <text:p>Critical: Deal an additional 1 Fatigue and +1 Hamstrung</text:p>
            <text:p>Effect: Reduce X by 1. Then if X is greater than 0, repeat this ability choosing a new target</text:p>
            <text:p>line in a direction (orthogonal or diagonal) other than the direction you came from</text:p>
          </table:table-cell>
          <table:table-cell office:value-type="string" calcext:value-type="string">
            <text:p>You can use this ability even if you have already spent Potential this combat</text:p>
          </table:table-cell>
          <table:table-cell office:value-type="string" calcext:value-type="string">
            <text:p>Reduce the cost to X-1</text:p>
          </table:table-cell>
          <table:table-cell/>
        </table:table-row>
        <table:table-row table:style-name="ro21">
          <table:table-cell office:value-type="string" calcext:value-type="string">
            <text:p>Infusion</text:p>
          </table:table-cell>
          <table:table-cell office:value-type="string" calcext:value-type="string">
            <text:p>Messenger of Wo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Potential: You inflict one or more stacks of any Status (up to once per turn)</text:p>
            <text:p>Cost: 4</text:p>
            <text:p>Target: Self</text:p>
            <text:p>Effect: Once per turn immediately before or after your Action (including this one) you can</text:p>
            <text:p>Teleport up to 3 and choose Burning, Slowed, Blinded or Shocked.</text:p>
            <text:p>Deal +1 of the chosen status as an Effect to any enemy adjacent to the space you</text:p>
            <text:p>left or arrived.</text:p>
          </table:table-cell>
          <table:table-cell office:value-type="string" calcext:value-type="string">
            <text:p>Reduce the Cost by 1</text:p>
          </table:table-cell>
          <table:table-cell office:value-type="string" calcext:value-type="string">
            <text:p>You can use the Effect before and after your Action</text:p>
          </table:table-cell>
          <table:table-cell/>
        </table:table-row>
        <table:table-row table:style-name="ro15">
          <table:table-cell office:value-type="string" calcext:value-type="string">
            <text:p>Archery</text:p>
          </table:table-cell>
          <table:table-cell office:value-type="string" calcext:value-type="string">
            <text:p>Blot Out the Su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Potential: You use an Attack against a target at its maximum Range</text:p>
            <text:p>Cost: 4</text:p>
            <text:p>Target: All Enemies</text:p>
            <text:p>Effect: Deal 1 Fatigue</text:p>
            <text:p>Success: Deal an additional 2 Fatigue and the target is +1 Slowed</text:p>
            <text:p>Critical: Target is Immobilized until the end of their turn</text:p>
          </table:table-cell>
          <table:table-cell office:value-type="string" calcext:value-type="string">
            <text:p>All targets are +1 Blinded as an Effect</text:p>
          </table:table-cell>
          <table:table-cell office:value-type="string" calcext:value-type="string">
            <text:p>Gain the effects of a Critical on a normal Success</text:p>
          </table:table-cell>
          <table:table-cell/>
        </table:table-row>
        <table:table-row table:style-name="ro26">
          <table:table-cell office:value-type="string" calcext:value-type="string">
            <text:p>Ninjutsu</text:p>
          </table:table-cell>
          <table:table-cell office:value-type="string" calcext:value-type="string">
            <text:p>Wraith on Wings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Potential: Start your turn Hidden, inflict one or more stacks</text:p>
            <text:p>of Blinded to one or more enemies,</text:p>
            <text:p> or attack an enemy that has Mark</text:p>
            <text:p>Cost: 4</text:p>
            <text:p>Effect: When you enter this Stance, apply +1 Mark to all enemies and gain</text:p>
            <text:p>the following as a Buff (which persists even when you take a new Stance):</text:p>
            <text:p>  * You ignore all effects that would reduce or impede your movement and</text:p>
            <text:p>    can move through other characters and barriers (but not stop in their space)</text:p>
            <text:p>  * You become Hidden and do not lose Hidden until combat ends</text:p>
          </table:table-cell>
          <table:table-cell office:value-type="string" calcext:value-type="string">
            <text:p>While affected by this Buff, when you move through an enemy's space for the</text:p>
            <text:p>first time on your turn, deal Stress to that enemy</text:p>
          </table:table-cell>
          <table:table-cell office:value-type="string" calcext:value-type="string">
            <text:p>While affected by this Buff, you have Aura 2. Enemies have the effect of the</text:p>
            <text:p>Blinded status while in the Aura and their Statuses do not tick down if</text:p>
            <text:p>they end their turn there. This application of Blinded does not grant Potential.</text:p>
          </table:table-cell>
          <table:table-cell/>
        </table:table-row>
        <table:table-row table:style-name="ro25">
          <table:table-cell office:value-type="string" calcext:value-type="string">
            <text:p>Kineticism</text:p>
          </table:table-cell>
          <table:table-cell office:value-type="string" calcext:value-type="string">
            <text:p>Twirling Towards Freedom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Potential: An enemy is moved as a result of one of your abilities</text:p>
            <text:p>(not including this one)</text:p>
            <text:p>Cost: 4</text:p>
            <text:p>Target: Aura $\infty$</text:p>
            <text:p>Effect: You may move each character in the Aura a number of spaces equal to</text:p>
            <text:p>their distance from you either clockwise or counterclockwise along</text:p>
            <text:p>the square of spaces that distance from you. You can choose different</text:p>
            <text:p>directions for each character. Enemies who collide with another character</text:p>
            <text:p>or with terrain which is +2 or more from their previous space stop</text:p>
            <text:p>moving and are Stunned</text:p>
          </table:table-cell>
          <table:table-cell office:value-type="string" calcext:value-type="string">
            <text:p>Enemies who collide also take Fatigue</text:p>
          </table:table-cell>
          <table:table-cell office:value-type="string" calcext:value-type="string">
            <text:p>When you move an enemy using this effect, you may move them 1 space diagonally</text:p>
            <text:p>at any point during their path such that they end up 1 space further from you</text:p>
            <text:p>than they started</text:p>
          </table:table-cell>
          <table:table-cell/>
        </table:table-row>
        <table:table-row table:style-name="ro21">
          <table:table-cell office:value-type="string" calcext:value-type="string">
            <text:p>Animism</text:p>
          </table:table-cell>
          <table:table-cell office:value-type="string" calcext:value-type="string">
            <text:p>The Unbearable Light of Being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Potential: A round ends</text:p>
            <text:p>Cost: 3</text:p>
            <text:p>Target: Self</text:p>
            <text:p>Effect: Whenever you Position a Minion, whenever one of your Minions disappears,</text:p>
            <text:p>or whenever you target an Ally with an ability, enemies adjacent to the</text:p>
            <text:p>target Ally or position take Fatigue and +1 Blinded.</text:p>
            <text:p>When you take this action, position a Minion.</text:p>
          </table:table-cell>
          <table:table-cell table:number-columns-repeated="2" office:value-type="string" calcext:value-type="string">
            <text:p>Placeholder text</text:p>
          </table:table-cell>
          <table:table-cell/>
        </table:table-row>
        <table:table-row table:style-name="ro15">
          <table:table-cell office:value-type="string" calcext:value-type="string">
            <text:p>Mesmerism</text:p>
          </table:table-cell>
          <table:table-cell office:value-type="string" calcext:value-type="string">
            <text:p>Mass Hysteria!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office:value-type="string" calcext:value-type="string">
            <text:p>Potential: You deal Stress</text:p>
            <text:p>Cost: X (Max: 6)</text:p>
            <text:p>Target: All Enemies</text:p>
            <text:p>Success: Deal the lesser of X or 2 Stress</text:p>
            <text:p>Effect: Targets must immediately make a Panic Roll regardless of their current</text:p>
            <text:p>Stress level, adding X to the number they need to roll to succeed</text:p>
          </table:table-cell>
          <table:table-cell office:value-type="string" calcext:value-type="string">
            <text:p>You can use this ability even if you have already spent Potential this combat</text:p>
          </table:table-cell>
          <table:table-cell office:value-type="string" calcext:value-type="string">
            <text:p>Reduce the cost to X-1</text:p>
          </table:table-cell>
          <table:table-cell/>
        </table:table-row>
        <table:table-row table:style-name="ro20">
          <table:table-cell office:value-type="string" calcext:value-type="string">
            <text:p>Elementalism</text:p>
          </table:table-cell>
          <table:table-cell office:value-type="string" calcext:value-type="string">
            <text:p>Smite Them in the Fields and Street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pecial Attack, Finisher</text:p>
          </table:table-cell>
          <table:table-cell office:value-type="string" calcext:value-type="string">
            <text:p>Potential: You take Stress from one of your own abilities</text:p>
            <text:p>Cost: 4</text:p>
            <text:p>Target: All Enemies</text:p>
            <text:p>Special: Targets can only defend against this attack using Evasion.</text:p>
            <text:p>They may choose not to defend and let the attack hit</text:p>
            <text:p>Effect: Targets are +1 Burning and +1 Shocked</text:p>
            <text:p>Success: Targets take 1 Fatigue and 1 Stress</text:p>
            <text:p>Critical: Targets take double the Fatigue and Stress instead</text:p>
          </table:table-cell>
          <table:table-cell office:value-type="string" calcext:value-type="string">
            <text:p>Inflict an additional +1 Burning and increase the base Fatigue by 1</text:p>
          </table:table-cell>
          <table:table-cell office:value-type="string" calcext:value-type="string">
            <text:p>Inflict an additional +1 Shocked and increase the base Stress by 1</text:p>
          </table:table-cell>
          <table:table-cell/>
        </table:table-row>
      </table:table>
      <table:named-expressions/>
      <table:database-ranges>
        <table:database-range table:name="AttributeModifiers" table:target-range-address="Build.C6:Build.C11" table:on-update-keep-styles="true" table:on-update-keep-size="false"/>
        <table:database-range table:name="__Anonymous_Sheet_DB__0" table:target-range-address="Build.I37:Build.K4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text>+</number:text>
      <number:number number:decimal-places="0" number:min-decimal-places="0" number:min-integer-digits="1"/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+</number:text>
      <number:number number:decimal-places="0" number:min-decimal-places="0" number:min-integer-digits="1"/>
    </number:number-style>
    <number:number-style style:name="N132P1" style:volatile="true">
      <number:text>-</number:text>
      <number:number number:decimal-places="0" number:min-decimal-places="0" number:min-integer-digits="1"/>
    </number:number-style>
    <number:number-style style:name="N132">
      <number:number number:decimal-places="0" number:min-decimal-places="0" number:min-integer-digits="1"/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/>
    </number:number-style>
    <number:number-style style:name="N133P1" style:volatile="true">
      <number:number number:decimal-places="0" number:min-decimal-places="0" number:min-integer-digits="1"/>
    </number:number-style>
    <number:number-style style:name="N133">
      <number:text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+</number:text>
      <number:number number:decimal-places="0" number:min-decimal-places="0" number:min-integer-digits="1"/>
    </number:number-style>
    <number:number-style style:name="N134P1" style:volatile="true">
      <number:text>-</number:text>
      <number:number number:decimal-places="0" number:min-decimal-places="0" number:min-integer-digits="1"/>
    </number:number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+</number:text>
      <number:number number:decimal-places="0" number:min-decimal-places="0" number:min-integer-digits="1"/>
    </number:number-style>
    <number:number-style style:name="N135P1" style:volatile="true">
      <number:text>-</number:text>
      <number:number number:decimal-places="0" number:min-decimal-places="0" number:min-integer-digits="1"/>
    </number:number-style>
    <number:number-style style:name="N135">
      <number:text>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+</number:text>
      <number:number number:decimal-places="0" number:min-decimal-places="0" number:min-integer-digits="1"/>
    </number:number-style>
    <number:number-style style:name="N136P1" style:volatile="true">
      <number:text>-</number:text>
      <number:number number:decimal-places="0" number:min-decimal-places="0" number:min-integer-digits="1"/>
    </number:number-style>
    <number:number-style style:name="N136">
      <number:text/>
      <number:number number:decimal-places="0" number:min-decimal-places="0" number:min-integer-digits="1"/>
      <style:map style:condition="value()&gt;0" style:apply-style-name="N136P0"/>
      <style:map style:condition="value()&lt;0" style:apply-style-name="N136P1"/>
    </number:number-style>
    <number:number-style style:name="N137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available" style:family="table-cell" style:parent-style-name="Default">
      <style:table-cell-properties fo:background-color="transparent"/>
      <style:text-properties fo:font-size="2pt"/>
    </style:style>
    <style:style style:name="Illegal" style:family="table-cell" style:parent-style-name="Default">
      <style:text-properties fo:color="#ff3d00"/>
    </style:style>
    <style:style style:name="Chameleon" style:family="table-cell" style:parent-style-name="Default">
      <style:text-properties fo:color="#9e9e9e"/>
    </style:style>
    <style:style style:name="Unspent" style:family="table-cell" style:parent-style-name="Default">
      <style:text-properties fo:color="#2e7d32"/>
    </style:style>
    <style:style style:name="Untitled1" style:family="table-cell" style:parent-style-name="Default"/>
    <style:style style:name="Ghost_20_Text" style:display-name="Ghost Text" style:family="table-cell" style:parent-style-name="Default">
      <style:text-properties fo:color="#333333" fo:font-size="2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/00/0000</text:date>, <text:time style:data-style-name="N2" text:time-value="12:52:03.2366237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4T13:49:24.024801931</meta:creation-date>
    <dc:date>2026-06-03T17:51:04.946717960</dc:date>
    <meta:editing-duration>P5DT11H57M30S</meta:editing-duration>
    <meta:editing-cycles>122</meta:editing-cycles>
    <meta:generator>LibreOffice/26.2.2.2$Linux_X86_64 LibreOffice_project/620$Build-2</meta:generator>
    <meta:document-statistic meta:table-count="7" meta:cell-count="1684" meta:object-count="0"/>
  </office:meta>
</office:document-meta>
</file>