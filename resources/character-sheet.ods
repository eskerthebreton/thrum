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84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4374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2.0728in"/>
    </style:style>
    <style:style style:name="co6" style:family="table-column">
      <style:table-column-properties fo:break-before="auto" style:column-width="1.6547in"/>
    </style:style>
    <style:style style:name="co7" style:family="table-column">
      <style:table-column-properties fo:break-before="auto" style:column-width="1.5957in"/>
    </style:style>
    <style:style style:name="co8" style:family="table-column">
      <style:table-column-properties fo:break-before="auto" style:column-width="0.4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008in"/>
    </style:style>
    <style:style style:name="co11" style:family="table-column">
      <style:table-column-properties fo:break-before="auto" style:column-width="2.189in"/>
    </style:style>
    <style:style style:name="co12" style:family="table-column">
      <style:table-column-properties fo:break-before="auto" style:column-width="1.7717in"/>
    </style:style>
    <style:style style:name="co13" style:family="table-column">
      <style:table-column-properties fo:break-before="auto" style:column-width="0.4756in"/>
    </style:style>
    <style:style style:name="co14" style:family="table-column">
      <style:table-column-properties fo:break-before="auto" style:column-width="0.2925in"/>
    </style:style>
    <style:style style:name="co15" style:family="table-column">
      <style:table-column-properties fo:break-before="auto" style:column-width="1.8217in"/>
    </style:style>
    <style:style style:name="co16" style:family="table-column">
      <style:table-column-properties fo:break-before="auto" style:column-width="1.7047in"/>
    </style:style>
    <style:style style:name="co17" style:family="table-column">
      <style:table-column-properties fo:break-before="auto" style:column-width="0.3173in"/>
    </style:style>
    <style:style style:name="co18" style:family="table-column">
      <style:table-column-properties fo:break-before="auto" style:column-width="1.3535in"/>
    </style:style>
    <style:style style:name="co19" style:family="table-column">
      <style:table-column-properties fo:break-before="auto" style:column-width="2.148in"/>
    </style:style>
    <style:style style:name="co20" style:family="table-column">
      <style:table-column-properties fo:break-before="auto" style:column-width="1.2118in"/>
    </style:style>
    <style:style style:name="co21" style:family="table-column">
      <style:table-column-properties fo:break-before="auto" style:column-width="1.0945in"/>
    </style:style>
    <style:style style:name="co22" style:family="table-column">
      <style:table-column-properties fo:break-before="auto" style:column-width="1.0528in"/>
    </style:style>
    <style:style style:name="co23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3201in"/>
    </style:style>
    <style:style style:name="co27" style:family="table-column">
      <style:table-column-properties fo:break-before="auto" style:column-width="0.3673in"/>
    </style:style>
    <style:style style:name="co28" style:family="table-column">
      <style:table-column-properties fo:break-before="auto" style:column-width="2.022in"/>
    </style:style>
    <style:style style:name="co29" style:family="table-column">
      <style:table-column-properties fo:break-before="auto" style:column-width="1.1693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2839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4.4382in"/>
    </style:style>
    <style:style style:name="co34" style:family="table-column">
      <style:table-column-properties fo:break-before="auto" style:column-width="0.4839in"/>
    </style:style>
    <style:style style:name="co35" style:family="table-column">
      <style:table-column-properties fo:break-before="auto" style:column-width="0.2165in"/>
    </style:style>
    <style:style style:name="co36" style:family="table-column">
      <style:table-column-properties fo:break-before="auto" style:column-width="1.2035in"/>
    </style:style>
    <style:style style:name="co37" style:family="table-column">
      <style:table-column-properties fo:break-before="auto" style:column-width="6.578in"/>
    </style:style>
    <style:style style:name="co38" style:family="table-column">
      <style:table-column-properties fo:break-before="auto" style:column-width="1.1445in"/>
    </style:style>
    <style:style style:name="co39" style:family="table-column">
      <style:table-column-properties fo:break-before="auto" style:column-width="2.298in"/>
    </style:style>
    <style:style style:name="co40" style:family="table-column">
      <style:table-column-properties fo:break-before="auto" style:column-width="5.1154in"/>
    </style:style>
    <style:style style:name="co41" style:family="table-column">
      <style:table-column-properties fo:break-before="auto" style:column-width="2.1898in"/>
    </style:style>
    <style:style style:name="co42" style:family="table-column">
      <style:table-column-properties fo:break-before="auto" style:column-width="1.6799in"/>
    </style:style>
    <style:style style:name="co43" style:family="table-column">
      <style:table-column-properties fo:break-before="auto" style:column-width="5.0819in"/>
    </style:style>
    <style:style style:name="co44" style:family="table-column">
      <style:table-column-properties fo:break-before="auto" style:column-width="0.1866in"/>
    </style:style>
    <style:style style:name="co45" style:family="table-column">
      <style:table-column-properties fo:break-before="auto" style:column-width="0.9571in"/>
    </style:style>
    <style:style style:name="co46" style:family="table-column">
      <style:table-column-properties fo:break-before="auto" style:column-width="1.4417in"/>
    </style:style>
    <style:style style:name="co47" style:family="table-column">
      <style:table-column-properties fo:break-before="auto" style:column-width="0.6138in"/>
    </style:style>
    <style:style style:name="co48" style:family="table-column">
      <style:table-column-properties fo:break-before="auto" style:column-width="2.2366in"/>
    </style:style>
    <style:style style:name="co49" style:family="table-column">
      <style:table-column-properties fo:break-before="auto" style:column-width="6.2772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3091in" fo:break-before="auto" style:use-optimal-row-height="false"/>
    </style:style>
    <style:style style:name="ro8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08in" fo:break-before="auto" style:use-optimal-row-height="false"/>
    </style:style>
    <style:style style:name="ro10" style:family="table-row">
      <style:table-row-properties style:row-height="0.2339in" fo:break-before="auto" style:use-optimal-row-height="false"/>
    </style:style>
    <style:style style:name="ro11" style:family="table-row">
      <style:table-row-properties style:row-height="0.2673in" fo:break-before="auto" style:use-optimal-row-height="false"/>
    </style:style>
    <style:style style:name="ro12" style:family="table-row">
      <style:table-row-properties style:row-height="0.5772in" fo:break-before="auto" style:use-optimal-row-height="false"/>
    </style:style>
    <style:style style:name="ro13" style:family="table-row">
      <style:table-row-properties style:row-height="0.4929in" fo:break-before="auto" style:use-optimal-row-height="true"/>
    </style:style>
    <style:style style:name="ro14" style:family="table-row">
      <style:table-row-properties style:row-height="0.861in" fo:break-before="auto" style:use-optimal-row-height="false"/>
    </style:style>
    <style:style style:name="ro15" style:family="table-row">
      <style:table-row-properties style:row-height="0.811in" fo:break-before="auto" style:use-optimal-row-height="true"/>
    </style:style>
    <style:style style:name="ro16" style:family="table-row">
      <style:table-row-properties style:row-height="0.3339in" fo:break-before="auto" style:use-optimal-row-height="true"/>
    </style:style>
    <style:style style:name="ro17" style:family="table-row">
      <style:table-row-properties style:row-height="0.652in" fo:break-before="auto" style:use-optimal-row-height="true"/>
    </style:style>
    <style:style style:name="ro18" style:family="table-row">
      <style:table-row-properties style:row-height="1.1291in" fo:break-before="auto" style:use-optimal-row-height="true"/>
    </style:style>
    <style:style style:name="ro19" style:family="table-row">
      <style:table-row-properties style:row-height="0.9701in" fo:break-before="auto" style:use-optimal-row-height="true"/>
    </style:style>
    <style:style style:name="ro20" style:family="table-row">
      <style:table-row-properties style:row-height="1.7654in" fo:break-before="auto" style:use-optimal-row-height="true"/>
    </style:style>
    <style:style style:name="ro21" style:family="table-row">
      <style:table-row-properties style:row-height="0.6854in" fo:break-before="auto" style:use-optimal-row-height="false"/>
    </style:style>
    <style:style style:name="ro22" style:family="table-row">
      <style:table-row-properties style:row-height="0.3764in" fo:break-before="auto" style:use-optimal-row-height="false"/>
    </style:style>
    <style:style style:name="ro23" style:family="table-row">
      <style:table-row-properties style:row-height="1.6063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ro25" style:family="table-row">
      <style:table-row-properties style:row-height="1.4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2]&lt;0)" style:apply-style-name="Illegal" style:base-cell-address="Build.A12"/>
      <style:map style:condition="is-true-formula([.$B$12]&gt;0)" style:apply-style-name="Unspent" style:base-cell-address="Build.A12"/>
      <style:map style:condition="is-true-formula([.$B$12]=0)" style:apply-style-name="Chameleon" style:base-cell-address="Build.A12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4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OR([.$B$18]&lt;0;[.$C$18]&lt;0))" style:apply-style-name="Illegal" style:base-cell-address="Build.A18"/>
      <style:map style:condition="is-true-formula(OR([.$B$18]&gt;0;[.$C$18]&lt;0))" style:apply-style-name="Unspent" style:base-cell-address="Build.A18"/>
      <style:map style:condition="is-true-formula(AND([.$B$18]=0;[.$C$18]=0))" style:apply-style-name="Chameleon" style:base-cell-address="Build.A18"/>
    </style:style>
    <style:style style:name="ce10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2]&lt;0)" style:apply-style-name="Illegal" style:base-cell-address="Build.A32"/>
      <style:map style:condition="is-true-formula([.$B$32]=0)" style:apply-style-name="Chameleon" style:base-cell-address="Build.A32"/>
      <style:map style:condition="is-true-formula([.$B$32]&gt;0)" style:apply-style-name="Unspent" style:base-cell-address="Build.A32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4)" style:apply-style-name="Unavailable" style:base-cell-address="Build.A46"/>
    </style:style>
    <style:style style:name="ce25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5)" style:apply-style-name="Unavailable" style:base-cell-address="Build.A47"/>
    </style:style>
    <style:style style:name="ce36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6)" style:apply-style-name="Unavailable" style:base-cell-address="Build.A48"/>
    </style:style>
    <style:style style:name="ce37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7)" style:apply-style-name="Unavailable" style:base-cell-address="Build.A49"/>
    </style:style>
    <style:style style:name="ce38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8)" style:apply-style-name="Unavailable" style:base-cell-address="Build.A50"/>
    </style:style>
    <style:style style:name="ce39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9)" style:apply-style-name="Unavailable" style:base-cell-address="Build.A5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32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33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34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35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46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80deea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cell-content()=0" style:apply-style-name="Chameleon" style:base-cell-address="Build.B18"/>
      <style:map style:condition="cell-content()&gt;0" style:apply-style-name="Unspent" style:base-cell-address="Build.B18"/>
      <style:map style:condition="cell-content()&lt;0" style:apply-style-name="Illegal" style:base-cell-address="Build.B18"/>
    </style:style>
    <style:style style:name="ce62" style:family="table-cell" style:parent-style-name="Default">
      <style:text-properties fo:color="#333333"/>
    </style:style>
    <style:style style:name="ce52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3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4)" style:apply-style-name="Unavailable" style:base-cell-address="Build.B46"/>
    </style:style>
    <style:style style:name="ce68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5)" style:apply-style-name="Unavailable" style:base-cell-address="Build.B47"/>
    </style:style>
    <style:style style:name="ce69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6)" style:apply-style-name="Unavailable" style:base-cell-address="Build.B48"/>
    </style:style>
    <style:style style:name="ce70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7)" style:apply-style-name="Unavailable" style:base-cell-address="Build.B49"/>
    </style:style>
    <style:style style:name="ce71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8)" style:apply-style-name="Unavailable" style:base-cell-address="Build.B50"/>
    </style:style>
    <style:style style:name="ce74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3]&lt;9)" style:apply-style-name="Unavailable" style:base-cell-address="Build.B51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65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9e9e9e"/>
      <style:text-properties fo:color="#333333"/>
    </style:style>
    <style:style style:name="ce81" style:family="table-cell" style:parent-style-name="Default" style:data-style-name="N134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9e9e9e"/>
      <style:text-properties fo:color="#333333"/>
      <style:map style:condition="is-true-formula([.$B$32]&lt;0)" style:apply-style-name="Illegal" style:base-cell-address="Build.A32"/>
      <style:map style:condition="is-true-formula([.$B$32]=0)" style:apply-style-name="Chameleon" style:base-cell-address="Build.A32"/>
      <style:map style:condition="is-true-formula([.$B$32]&gt;0)" style:apply-style-name="Unspent" style:base-cell-address="Build.A32"/>
    </style:style>
    <style:style style:name="ce55" style:family="table-cell" style:parent-style-name="Default" style:data-style-name="N0">
      <style:text-properties fo:color="#ff3d00"/>
    </style:style>
    <style:style style:name="ce56" style:family="table-cell" style:parent-style-name="Default" style:data-style-name="N0">
      <style:text-properties fo:color="#fafafa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73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9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OR([.$F$18]&lt;0;[.$G$18]&lt;0))" style:apply-style-name="Illegal" style:base-cell-address="Build.E18"/>
      <style:map style:condition="is-true-formula(OR([.$F$18]&gt;0;[.$G$18]&gt;0))" style:apply-style-name="Unspent" style:base-cell-address="Build.E18"/>
      <style:map style:condition="is-true-formula(AND([.$F$18]=0;[.$G$18]=0))" style:apply-style-name="Chameleon" style:base-cell-address="Build.E18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2]&lt;0)" style:apply-style-name="Illegal" style:base-cell-address="Build.E32"/>
      <style:map style:condition="is-true-formula([.$F$32]=0)" style:apply-style-name="Chameleon" style:base-cell-address="Build.E32"/>
      <style:map style:condition="is-true-formula([.$F$32]&gt;0)" style:apply-style-name="Unspent" style:base-cell-address="Build.E32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#REF!&lt;1)" style:apply-style-name="Accent" style:base-cell-address="Build.E46"/>
    </style:style>
    <style:style style:name="ce110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SUM(#REF!)&lt;1)" style:apply-style-name="Accent" style:base-cell-address="Build.E47"/>
    </style:style>
    <style:style style:name="ce111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SUM(#REF!)&lt;1)" style:apply-style-name="Unavailable" style:base-cell-address="Build.E48"/>
    </style:style>
    <style:style style:name="ce112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SUM(#REF!)&lt;1)" style:apply-style-name="Unavailable" style:base-cell-address="Build.E48"/>
    </style:style>
    <style:style style:name="ce97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 style:data-style-name="N0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 style:data-style-name="N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#REF!&lt;1)" style:apply-style-name="Accent" style:base-cell-address="Build.E46"/>
    </style:style>
    <style:style style:name="ce129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SUM(#REF!)&lt;1)" style:apply-style-name="Accent" style:base-cell-address="Build.E47"/>
    </style:style>
    <style:style style:name="ce130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SUM(#REF!)&lt;1)" style:apply-style-name="Unavailable" style:base-cell-address="Build.E48"/>
    </style:style>
    <style:style style:name="ce134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SUM(#REF!)&lt;1)" style:apply-style-name="Unavailable" style:base-cell-address="Build.E48"/>
    </style:style>
    <style:style style:name="ce12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134">
      <style:table-cell-properties fo:background-color="#bdbdbd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44" style:family="table-cell" style:parent-style-name="Default" style:data-style-name="N134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9e9e9e"/>
      <style:text-properties fo:color="#333333"/>
      <style:map style:condition="is-true-formula([.$F$32]&lt;0)" style:apply-style-name="Illegal" style:base-cell-address="Build.E32"/>
      <style:map style:condition="is-true-formula([.$F$32]=0)" style:apply-style-name="Chameleon" style:base-cell-address="Build.E32"/>
      <style:map style:condition="is-true-formula([.$F$32]&gt;0)" style:apply-style-name="Unspent" style:base-cell-address="Build.E32"/>
    </style:style>
    <style:style style:name="ce140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#REF!&lt;1)" style:apply-style-name="Accent" style:base-cell-address="Build.E46"/>
    </style:style>
    <style:style style:name="ce143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SUM(#REF!)&lt;1)" style:apply-style-name="Accent" style:base-cell-address="Build.E47"/>
    </style:style>
    <style:style style:name="ce144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SUM(#REF!)&lt;1)" style:apply-style-name="Unavailable" style:base-cell-address="Build.E48"/>
    </style:style>
    <style:style style:name="ce145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3]-SUM(#REF!)&lt;1)" style:apply-style-name="Unavailable" style:base-cell-address="Build.E48"/>
    </style:style>
    <style:style style:name="ce14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0">
      <style:table-cell-properties fo:background-color="#fff9c4" style:text-align-source="fix" style:repeat-content="false" fo:border="0.74pt solid #000000"/>
      <style:paragraph-properties fo:text-align="center" fo:margin-left="0in"/>
      <style:text-properties fo:color="#424242" fo:font-size="16pt" style:font-size-asian="16pt" style:font-size-complex="16pt"/>
    </style:style>
    <style:style style:name="ce16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424242" fo:font-size="16pt" style:font-size-asian="16pt" style:font-size-complex="16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24242" fo:font-size="16pt" style:font-size-asian="16pt" style:font-size-complex="16pt"/>
    </style:style>
    <style:style style:name="ce169" style:family="table-cell" style:parent-style-name="Default">
      <style:text-properties fo:color="#424242"/>
    </style:style>
    <style:style style:name="ce170" style:family="table-cell" style:parent-style-name="Default">
      <style:table-cell-properties fo:background-color="#fff9c4" style:text-align-source="fix" style:repeat-content="false" fo:border="0.74pt solid #000000"/>
      <style:paragraph-properties fo:text-align="center" fo:margin-left="0in"/>
      <style:text-properties fo:color="#424242" fo:font-size="16pt" style:font-size-asian="16pt" style:font-size-complex="16pt"/>
    </style:style>
    <style:style style:name="ce171" style:family="table-cell" style:parent-style-name="Default" style:data-style-name="N37"/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8" style:family="table-cell" style:parent-style-name="Default" style:data-style-name="N137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>
      <style:table-cell-properties fo:background-color="#bdbdbd"/>
      <style:text-properties fo:color="#333333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37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275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16" style:family="table-cell" style:parent-style-name="Default" style:data-style-name="N0">
      <style:table-cell-properties fo:background-color="#bdbdbd" style:text-align-source="fix" style:repeat-content="false" style:vertical-align="middle"/>
      <style:paragraph-properties fo:text-align="start" fo:margin-left="0in"/>
      <style:text-properties fo:color="#333333" style:font-name="Liberation Mono" fo:font-size="8pt" style:font-size-asian="8pt" style:font-size-complex="8pt"/>
    </style:style>
    <style:style style:name="ce217" style:family="table-cell" style:parent-style-name="Default">
      <style:table-cell-properties fo:background-color="#bdbdbd" style:text-align-source="fix" style:repeat-content="false" style:vertical-align="middle"/>
      <style:paragraph-properties fo:text-align="start" fo:margin-left="0in"/>
      <style:text-properties fo:color="#333333" style:font-name="Liberation Mono" fo:font-size="8pt" style:font-size-asian="8pt" style:font-size-complex="8pt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85" style:family="table-cell" style:parent-style-name="Default">
      <style:table-cell-properties fo:background-color="#e1bee7" style:text-align-source="fix" style:repeat-content="false" fo:border="0.74pt solid #333333" style:vertical-align="middle"/>
      <style:paragraph-properties fo:text-align="center"/>
    </style:style>
    <style:style style:name="ce286" style:family="table-cell" style:parent-style-name="Default">
      <style:table-cell-properties fo:background-color="#e1bee7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2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3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4" style:family="table-cell" style:parent-style-name="Default" style:data-style-name="N134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5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6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7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8" style:family="table-cell" style:parent-style-name="Default" style:data-style-name="N134">
      <style:table-cell-properties fo:background-color="#ffca28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31">
      <style:text-properties fo:color="#333333"/>
    </style:style>
    <style:style style:name="ce316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317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318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319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320" style:family="table-cell" style:parent-style-name="Default">
      <style:table-cell-properties fo:background-color="#9e9e9e" style:vertical-align="top"/>
      <style:text-properties fo:color="#333333"/>
    </style:style>
    <style:style style:name="ce308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322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9" style:family="table-cell" style:parent-style-name="Default" style:data-style-name="N0">
      <style:table-cell-properties fo:background-color="#bdbdbd" style:text-align-source="fix" style:repeat-content="false" fo:wrap-option="wrap" style:vertical-align="middle"/>
      <style:paragraph-properties fo:text-align="start" fo:margin-left="0in"/>
      <style:text-properties style:font-name="Liberation Mono"/>
    </style:style>
    <style:style style:name="ce250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style:font-name="Liberation Mono"/>
    </style:style>
    <style:style style:name="ce251" style:family="table-cell" style:parent-style-name="Default" style:data-style-name="N0">
      <style:table-cell-properties fo:background-color="#bdbdbd" style:text-align-source="value-type" style:repeat-content="false" fo:wrap-option="wrap" style:vertical-align="middle"/>
      <style:paragraph-properties fo:margin-left="0in"/>
      <style:text-properties style:font-name="Liberation Mono"/>
    </style:style>
    <style:style style:name="ce252" style:family="table-cell" style:parent-style-name="Default">
      <style:table-cell-properties fo:background-color="#bdbdbd" style:vertical-align="middle"/>
      <style:text-properties fo:color="#333333" style:font-name="Liberation Mono" fo:font-size="8pt" style:font-size-asian="8pt" style:font-size-complex="8pt"/>
    </style:style>
    <style:style style:name="ce310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324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55" style:family="table-cell" style:parent-style-name="Default">
      <style:table-cell-properties fo:background-color="#bdbdbd"/>
      <style:text-properties style:font-name="Liberation Mono"/>
    </style:style>
    <style:style style:name="ce256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57" style:family="table-cell" style:parent-style-name="Default" style:data-style-name="N0">
      <style:table-cell-properties fo:background-color="#bdbdbd" style:text-align-source="fix" style:repeat-content="false" fo:wrap-option="wrap" style:vertical-align="middle"/>
      <style:paragraph-properties fo:text-align="center"/>
      <style:text-properties fo:color="#424242" style:text-outline="false" style:text-line-through-style="none" style:text-line-through-type="none" style:font-name="Liberation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8pt" style:language-asian="zh" style:country-asian="CN" style:font-style-asian="normal" style:font-weight-asian="normal" style:font-name-complex="Liberation Mono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bdbdbd"/>
      <style:text-properties fo:color="#424242" style:font-name="Liberation Mono" fo:font-size="8pt" style:font-size-asian="8pt" style:font-size-complex="8pt"/>
    </style:style>
    <style:style style:name="ce259" style:family="table-cell" style:parent-style-name="Default" style:data-style-name="N0">
      <style:table-cell-properties fo:background-color="#bdbdbd" style:text-align-source="fix" style:repeat-content="false" fo:wrap-option="wrap" style:vertical-align="middle"/>
      <style:paragraph-properties fo:text-align="start" fo:margin-left="0in"/>
      <style:text-properties fo:color="#424242" style:text-outline="false" style:text-line-through-style="none" style:text-line-through-type="none" style:font-name="Liberation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8pt" style:language-asian="zh" style:country-asian="CN" style:font-style-asian="normal" style:font-weight-asian="normal" style:font-name-complex="Liberation Mono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ext-properties fo:font-weight="bold" style:font-weight-asian="bold" style:font-weight-complex="bold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43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Build.B6">
          <table:error-message table:message-type="stop" table:display="true"/>
        </table:content-validation>
        <table:content-validation table:name="val4" table:base-cell-address="Build.B43">
          <table:error-message table:message-type="stop" table:display="true"/>
        </table:content-validation>
        <table:content-validation table:name="val5" table:condition="of:cell-content-is-in-list([$'Combat Abilities By Art'.$B$12:.$B$83])" table:allow-empty-cell="true" table:display-list="unsorted" table:base-cell-address="Build.E46">
          <table:error-message table:message-type="stop" table:display="true"/>
        </table:content-validation>
        <table:content-validation table:name="val6" table:condition="of:cell-content-is-in-list([$'Combat Abilities By Art'.$B$12:.$B$84])" table:allow-empty-cell="true" table:display-list="unsorted" table:base-cell-address="Build.E47">
          <table:error-message table:message-type="stop" table:display="true"/>
        </table:content-validation>
        <table:content-validation table:name="val7" table:condition="of:cell-content-is-in-list([$Utility.$B$66:.$B$77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4:.$B$67])" table:allow-empty-cell="true" table:display-list="unsorted" table:base-cell-address="Combat.J4">
          <table:error-message table:message-type="stop" table:display="true"/>
        </table:content-validation>
      </table:content-validations>
      <table:table table:name="Build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office:value-type="string" calcext:value-type="string" table:number-columns-spanned="2" table:number-rows-spanned="1">
            <text:p>Cornelius Macguffin</text:p>
          </table:table-cell>
          <table:covered-table-cell table:style-name="ce142"/>
          <table:table-cell/>
          <table:table-cell table:style-name="ce73" office:value-type="string" calcext:value-type="string">
            <text:p>MAX EFFORT</text:p>
          </table:table-cell>
          <table:table-cell table:style-name="ce152" office:value-type="string" calcext:value-type="string">
            <text:p>SPEED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2"/>
          <table:table-cell table:style-name="ce117" office:value-type="float" office:value="4" calcext:value-type="float">
            <text:p>4</text:p>
          </table:table-cell>
          <table:table-cell table:style-name="ce132" table:formula="of:=4+IF(ISNA(MATCH(&quot;Fleet Footed&quot;;[.E45:.E54];0)&gt;0);0;1+IF(ISBLANK(INDEX([.H45:.H54];MATCH(&quot;Fleet Footed&quot;; [.E45:.E54]; 0);1));0;1))"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4">
          <table:table-cell table:style-name="ce107" office:value-type="string" calcext:value-type="string">
            <text:p>Attribute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98" office:value-type="string" calcext:value-type="string" table:number-columns-spanned="3" table:number-rows-spanned="1">
            <text:p>Derived Attributes</text:p>
          </table:table-cell>
          <table:covered-table-cell table:style-name="ce133"/>
          <table:covered-table-cell table:style-name="Default"/>
          <table:table-cell table:number-columns-repeated="4"/>
        </table:table-row>
        <table:table-row table:style-name="ro4">
          <table:table-cell table:style-name="ce4" office:value-type="string" calcext:value-type="string">
            <text:p>Power (POW)</text:p>
          </table:table-cell>
          <table:table-cell table:style-name="ce32" table:content-validation-name="val3" office:value-type="float" office:value="1" calcext:value-type="float">
            <text:p>1</text:p>
          </table:table-cell>
          <table:table-cell table:style-name="ce65" table:formula="of:=[.$B6]+COUNTA([.B15:.C15])" office:value-type="float" office:value="2" calcext:value-type="float">
            <text:p>+2</text:p>
          </table:table-cell>
          <table:table-cell/>
          <table:table-cell table:style-name="ce107" office:value-type="string" calcext:value-type="string">
            <text:p>Resistance</text:p>
          </table:table-cell>
          <table:table-cell table:style-name="ce98" office:value-type="string" calcext:value-type="string">
            <text:p>Max Fatigue Tol</text:p>
          </table:table-cell>
          <table:table-cell table:style-name="ce107" office:value-type="string" calcext:value-type="string">
            <text:p>Incapacity Roll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Endurance (END)</text:p>
          </table:table-cell>
          <table:table-cell table:style-name="ce32" table:content-validation-name="val3"/>
          <table:table-cell table:style-name="ce65" table:formula="of:=[.$B7]+COUNTA([.F15:.G15])" office:value-type="float" office:value="0" calcext:value-type="float">
            <text:p/>
          </table:table-cell>
          <table:table-cell/>
          <table:table-cell table:style-name="ce75" table:formula="of:=[$Build.$C$7]" office:value-type="float" office:value="0" calcext:value-type="float">
            <text:p/>
          </table:table-cell>
          <table:table-cell table:style-name="ce101" table:formula="of:=3+[$Build.C7]+IF(ISNA(MATCH(&quot;Indefatigable&quot;;[.E45:.E54];0)&gt;0);0;1+IF(ISBLANK(INDEX([.H45:.H54];MATCH(&quot;Indefatigable&quot;; [.E45:.E54]; 0);1));0;FLOOR(0.5*[.$C$7])))" office:value-type="float" office:value="3" calcext:value-type="float">
            <text:p>3</text:p>
          </table:table-cell>
          <table:table-cell table:style-name="ce75" table:formula="of:=[$Build.$C$7]" office:value-type="float" office:value="0" calcext:value-type="float">
            <text:p/>
          </table:table-cell>
          <table:table-cell table:number-columns-repeated="4"/>
        </table:table-row>
        <table:table-row table:style-name="ro4">
          <table:table-cell table:style-name="ce5" office:value-type="string" calcext:value-type="string">
            <text:p>Finesse (FIN)</text:p>
          </table:table-cell>
          <table:table-cell table:style-name="ce33" table:content-validation-name="val3"/>
          <table:table-cell table:style-name="ce65" table:formula="of:=[.$B8]+COUNTA([.B16:.C16])" office:value-type="float" office:value="0" calcext:value-type="float">
            <text:p/>
          </table:table-cell>
          <table:table-cell/>
          <table:table-cell table:style-name="ce107" office:value-type="string" calcext:value-type="string">
            <text:p>Evasion</text:p>
          </table:table-cell>
          <table:table-cell table:style-name="ce98" office:value-type="string" calcext:value-type="string">
            <text:p>Initiative</text:p>
          </table:table-cell>
          <table:table-cell table:style-name="ce107"/>
          <table:table-cell table:number-columns-repeated="4"/>
        </table:table-row>
        <table:table-row table:style-name="ro5">
          <table:table-cell table:style-name="ce5" office:value-type="string" calcext:value-type="string">
            <text:p>Reflex (REF)</text:p>
          </table:table-cell>
          <table:table-cell table:style-name="ce33" table:content-validation-name="val3" office:value-type="float" office:value="1" calcext:value-type="float">
            <text:p>1</text:p>
          </table:table-cell>
          <table:table-cell table:style-name="ce65" table:formula="of:=[.$B9]+COUNTA([.F16:.G16])" office:value-type="float" office:value="2" calcext:value-type="float">
            <text:p>+2</text:p>
          </table:table-cell>
          <table:table-cell/>
          <table:table-cell table:style-name="ce76" table:formula="of:=[$Build.$C$9]" office:value-type="float" office:value="2" calcext:value-type="float">
            <text:p>+2</text:p>
          </table:table-cell>
          <table:table-cell table:style-name="ce76" table:formula="of:=[$Build.$C$9]" office:value-type="float" office:value="2" calcext:value-type="float">
            <text:p>+2</text:p>
          </table:table-cell>
          <table:table-cell table:style-name="ce155"/>
          <table:table-cell table:number-columns-repeated="4"/>
        </table:table-row>
        <table:table-row table:style-name="ro4">
          <table:table-cell table:style-name="ce6" office:value-type="string" calcext:value-type="string">
            <text:p>Reasoning (REA)</text:p>
          </table:table-cell>
          <table:table-cell table:style-name="ce34" table:content-validation-name="val3"/>
          <table:table-cell table:style-name="ce65" table:formula="of:=[.$B10]+COUNTA([.B17:.C17])" office:value-type="float" office:value="0" calcext:value-type="float">
            <text:p/>
          </table:table-cell>
          <table:table-cell/>
          <table:table-cell table:style-name="ce107" office:value-type="string" calcext:value-type="string">
            <text:p>Resolve</text:p>
          </table:table-cell>
          <table:table-cell table:style-name="ce98" office:value-type="string" calcext:value-type="string">
            <text:p>Max Stress Tol</text:p>
          </table:table-cell>
          <table:table-cell table:style-name="ce107" office:value-type="string" calcext:value-type="string">
            <text:p>Panic Rolls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Focus (FOC)</text:p>
          </table:table-cell>
          <table:table-cell table:style-name="ce35" table:content-validation-name="val3"/>
          <table:table-cell table:style-name="ce65" table:formula="of:=[.$B11]+COUNTA([.F17:.G17])" office:value-type="float" office:value="0" calcext:value-type="float">
            <text:p/>
          </table:table-cell>
          <table:table-cell/>
          <table:table-cell table:style-name="ce77" table:formula="of:=[$Build.$C$11]+IF(ISNA(MATCH(&quot;Composed&quot;;[.E46:.E55];0));0;IF(ISBLANK(INDEX([.I45:.I54];MATCH(&quot;Composed&quot;; [.E45:.E54]; 0);1));0;1))" office:value-type="float" office:value="0" calcext:value-type="float">
            <text:p/>
          </table:table-cell>
          <table:table-cell table:style-name="ce102" table:formula="of:=2+[$Build.C11]+IF(ISNA(MATCH(&quot;Composed&quot;;[.E45:.E54];0)&gt;0);0;1+IF(ISBLANK(INDEX([.H45:.H54];MATCH(&quot;Composed&quot;; [.E45:.E54]; 0);1));0;1))" office:value-type="float" office:value="2" calcext:value-type="float">
            <text:p>2</text:p>
          </table:table-cell>
          <table:table-cell table:style-name="ce77" table:formula="of:=[$Build.$C$11]+IF(ISNA(MATCH(&quot;Composed&quot;;[.E46:.E55];0));0;1+IF(ISBLANK(INDEX([.H45:.H54];MATCH(&quot;Composed&quot;; [.E45:.E54]; 0);1));0;1))" office:value-type="float" office:value="0" calcext:value-type="float">
            <text:p/>
          </table:table-cell>
          <table:table-cell table:number-columns-repeated="4"/>
        </table:table-row>
        <table:table-row table:style-name="ro4">
          <table:table-cell table:style-name="ce12" table:formula="of:=IF([.B12]&gt;0;&quot;Unallocated&quot;;IF([.B12]&lt;0;&quot;Overallocated&quot;;&quot;&quot;))">
            <text:p/>
          </table:table-cell>
          <table:table-cell table:style-name="ce12" table:formula="of:=FLOOR((1+[.$B$3])/4)+2-SUM([.B6:.B11])" office:value-type="float" office:value="0" calcext:value-type="float">
            <text:p>0</text:p>
          </table:table-cell>
          <table:table-cell table:style-name="ce66"/>
          <table:table-cell/>
          <table:table-cell table:style-name="ce66" table:number-columns-repeated="3"/>
          <table:table-cell table:number-columns-repeated="4"/>
        </table:table-row>
        <table:table-row table:style-name="ro4">
          <table:table-cell table:style-name="ce115" table:number-columns-repeated="5"/>
          <table:table-cell table:number-columns-repeated="6"/>
        </table:table-row>
        <table:table-row table:style-name="ro4">
          <table:table-cell table:style-name="ce14" office:value-type="string" calcext:value-type="string">
            <text:p>Narrative Archetypes</text:p>
          </table:table-cell>
          <table:table-cell table:style-name="ce107" office:value-type="string" calcext:value-type="string">
            <text:p>Basic Trait</text:p>
          </table:table-cell>
          <table:table-cell table:style-name="ce107" office:value-type="string" calcext:value-type="string">
            <text:p>Upgraded Trait</text:p>
          </table:table-cell>
          <table:table-cell table:style-name="ce115"/>
          <table:table-cell table:style-name="ce14" office:value-type="string" calcext:value-type="string">
            <text:p>Combat Archetypes</text:p>
          </table:table-cell>
          <table:table-cell table:style-name="ce107" office:value-type="string" calcext:value-type="string">
            <text:p>Basic Trait</text:p>
          </table:table-cell>
          <table:table-cell table:style-name="ce107" office:value-type="string" calcext:value-type="string">
            <text:p>Upgraded Trait</text:p>
          </table:table-cell>
          <table:table-cell table:number-columns-repeated="4"/>
        </table:table-row>
        <table:table-row table:style-name="ro4">
          <table:table-cell table:style-name="ce107" table:formula="of:=[$'Archetype Traits'.$A2]" office:value-type="string" office:string-value="The Hero" calcext:value-type="string">
            <text:p>The Hero</text:p>
          </table:table-cell>
          <table:table-cell table:style-name="ce46" office:value-type="string" calcext:value-type="string">
            <text:p>x</text:p>
          </table:table-cell>
          <table:table-cell table:style-name="ce46"/>
          <table:table-cell table:style-name="ce115"/>
          <table:table-cell table:style-name="ce107" table:formula="of:=[$'Archetype Traits'.$A5]" office:value-type="string" office:string-value="The Loomer" calcext:value-type="string">
            <text:p>The Loomer</text:p>
          </table:table-cell>
          <table:table-cell table:style-name="ce46" table:number-columns-repeated="2"/>
          <table:table-cell table:number-columns-repeated="4"/>
        </table:table-row>
        <table:table-row table:style-name="ro4">
          <table:table-cell table:style-name="ce107" table:formula="of:=[$'Archetype Traits'.A3]" office:value-type="string" office:string-value="The Artist" calcext:value-type="string">
            <text:p>The Artist</text:p>
          </table:table-cell>
          <table:table-cell table:style-name="ce47" table:number-columns-repeated="2"/>
          <table:table-cell table:style-name="ce115"/>
          <table:table-cell table:style-name="ce107" table:formula="of:=[$'Archetype Traits'.A6]" office:value-type="string" office:string-value="The Weaver" calcext:value-type="string">
            <text:p>The Weaver</text:p>
          </table:table-cell>
          <table:table-cell table:style-name="ce47" office:value-type="string" calcext:value-type="string">
            <text:p>x</text:p>
          </table:table-cell>
          <table:table-cell table:style-name="ce47"/>
          <table:table-cell table:number-columns-repeated="4"/>
        </table:table-row>
        <table:table-row table:style-name="ro4">
          <table:table-cell table:style-name="ce107" table:formula="of:=[$'Archetype Traits'.A4]" office:value-type="string" office:string-value="The Sage" calcext:value-type="string">
            <text:p>The Sage</text:p>
          </table:table-cell>
          <table:table-cell table:style-name="ce48" table:number-columns-repeated="2"/>
          <table:table-cell table:style-name="ce115"/>
          <table:table-cell table:style-name="ce107" table:formula="of:=[$'Archetype Traits'.A7]" office:value-type="string" office:string-value="The Quill" calcext:value-type="string">
            <text:p>The Quill</text:p>
          </table:table-cell>
          <table:table-cell table:style-name="ce48" table:number-columns-repeated="2"/>
          <table:table-cell table:number-columns-repeated="4"/>
        </table:table-row>
        <table:table-row table:style-name="ro4">
          <table:table-cell table:style-name="ce16" table:formula="of:=IF([.B18]&gt;0;&quot;Unallocated&quot;;IF([.B18]&lt;0;&quot;Overallocated&quot;;&quot;&quot;))">
            <text:p/>
          </table:table-cell>
          <table:table-cell table:style-name="ce49" table:formula="of:=1+IF([.$B$3]&gt;=5;1;0)-COUNTA([.B15:.C17])" office:value-type="float" office:value="0" calcext:value-type="float">
            <text:p>0</text:p>
          </table:table-cell>
          <table:table-cell table:style-name="ce49"/>
          <table:table-cell table:style-name="ce115"/>
          <table:table-cell table:style-name="ce99" table:formula="of:=IF([.F18]&gt;0;&quot;Unallocated&quot;;IF([.F18]&lt;0;&quot;Overallocated&quot;;&quot;&quot;))">
            <text:p/>
          </table:table-cell>
          <table:table-cell table:style-name="ce49" table:formula="of:=1+IF([.$B$3]&gt;=5;1;0)-COUNTA([.F15:.G17])" office:value-type="float" office:value="0" calcext:value-type="float">
            <text:p>0</text:p>
          </table:table-cell>
          <table:table-cell table:style-name="ce49"/>
          <table:table-cell table:number-columns-repeated="4"/>
        </table:table-row>
        <table:table-row table:style-name="ro4">
          <table:table-cell table:style-name="ce115" table:number-columns-repeated="5"/>
          <table:table-cell table:number-columns-repeated="6"/>
        </table:table-row>
        <table:table-row table:style-name="ro6">
          <table:table-cell table:style-name="ce10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 table:style-name="ce2"/>
          <table:table-cell table:style-name="ce10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7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 Points</text:p>
          </table:table-cell>
          <table:table-cell table:style-name="ce107" office:value-type="string" calcext:value-type="string">
            <text:p>MODIFIER</text:p>
          </table:table-cell>
          <table:table-cell table:style-name="ce2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 Points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8" table:visibility="collapse">
          <table:table-cell table:style-name="ce107" table:number-columns-repeated="3"/>
          <table:table-cell table:style-name="ce2"/>
          <table:table-cell table:style-name="ce107" table:number-columns-repeated="3"/>
          <table:table-cell table:number-columns-repeated="4"/>
        </table:table-row>
        <table:table-row table:style-name="ro7">
          <table:table-cell table:style-name="ce117" office:value-type="string" calcext:value-type="string">
            <text:p>Struction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FLOOR(([.$C$6]+[.$C$7]+[.B23]+COUNTA([.B15:.C15]))/2)" office:value-type="float" office:value="1" calcext:value-type="float">
            <text:p>+1</text:p>
          </table:table-cell>
          <table:table-cell table:style-name="ce2"/>
          <table:table-cell table:style-name="ce157" office:value-type="string" calcext:value-type="string">
            <text:p>Braw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3]&gt;0;FLOOR(([$Build.$C$6]+[$Build.F23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Craft</text:p>
          </table:table-cell>
          <table:table-cell table:style-name="ce52" table:content-validation-name="val3"/>
          <table:table-cell table:style-name="ce81" table:formula="of:=FLOOR(([.$C$8]+[.$C$7]+[.B24]+COUNTA([.B16:.C16]))/2)" office:value-type="float" office:value="0" calcext:value-type="float">
            <text:p/>
          </table:table-cell>
          <table:table-cell table:style-name="ce2"/>
          <table:table-cell table:style-name="ce157" office:value-type="string" calcext:value-type="string">
            <text:p>Due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4]&gt;0;FLOOR(([$Build.$C$8]+[$Build.F24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Researc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FLOOR(([.$C$10]+[.$C$7]+[.B25]+COUNTA([.B17:.C17]))/2)" office:value-type="float" office:value="0" calcext:value-type="float">
            <text:p/>
          </table:table-cell>
          <table:table-cell table:style-name="ce2"/>
          <table:table-cell table:style-name="ce157" office:value-type="string" calcext:value-type="string">
            <text:p>Infusion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5]&gt;0;FLOOR(([$Build.$C$10]+[$Build.F25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Athletics</text:p>
          </table:table-cell>
          <table:table-cell table:style-name="ce52" table:content-validation-name="val3" office:value-type="float" office:value="2" calcext:value-type="float">
            <text:p>2</text:p>
          </table:table-cell>
          <table:table-cell table:style-name="ce81" table:formula="of:=FLOOR(([.$C$6]+[.$C$9]+[.B26]+COUNTA([.B15:.C15]))/2)" office:value-type="float" office:value="3" calcext:value-type="float">
            <text:p>+3</text:p>
          </table:table-cell>
          <table:table-cell table:style-name="ce2"/>
          <table:table-cell table:style-name="ce157" office:value-type="string" calcext:value-type="string">
            <text:p>Archery</text:p>
          </table:table-cell>
          <table:table-cell table:style-name="ce183" table:content-validation-name="val3" office:value-type="float" office:value="3" calcext:value-type="float">
            <text:p>3</text:p>
          </table:table-cell>
          <table:table-cell table:style-name="ce244" table:formula="of:=IF([.F26]&gt;0;FLOOR(([$Build.$C$6]+[$Build.F26])/2)+FLOOR(([.$B$3]+4)/4);0)" office:value-type="float" office:value="3" calcext:value-type="float">
            <text:p>+3</text:p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Stealth</text:p>
          </table:table-cell>
          <table:table-cell table:style-name="ce52" table:content-validation-name="val3" office:value-type="float" office:value="1" calcext:value-type="float">
            <text:p>1</text:p>
          </table:table-cell>
          <table:table-cell table:style-name="ce81" table:formula="of:=FLOOR(([.$C$8]+[.$C$9]+[.B27]+COUNTA([.B16:.C16]))/2)" office:value-type="float" office:value="1" calcext:value-type="float">
            <text:p>+1</text:p>
          </table:table-cell>
          <table:table-cell table:style-name="ce2"/>
          <table:table-cell table:style-name="ce157" office:value-type="string" calcext:value-type="string">
            <text:p>Ninjutsu</text:p>
          </table:table-cell>
          <table:table-cell table:style-name="ce183" table:content-validation-name="val3" office:value-type="float" office:value="1" calcext:value-type="float">
            <text:p>1</text:p>
          </table:table-cell>
          <table:table-cell table:style-name="ce244" table:formula="of:=IF([.F27]&gt;0;FLOOR(([$Build.$C$8]+[$Build.F27])/2)+FLOOR(([.$B$3]+4)/4);0)" office:value-type="float" office:value="1" calcext:value-type="float">
            <text:p>+1</text:p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Problem Solving</text:p>
          </table:table-cell>
          <table:table-cell table:style-name="ce52" table:content-validation-name="val3"/>
          <table:table-cell table:style-name="ce81" table:formula="of:=FLOOR(([.$C$10]+[.$C$9]+[.B28]+COUNTA([.B17:.C17]))/2)" office:value-type="float" office:value="1" calcext:value-type="float">
            <text:p>+1</text:p>
          </table:table-cell>
          <table:table-cell table:style-name="ce2"/>
          <table:table-cell table:style-name="ce157" office:value-type="string" calcext:value-type="string">
            <text:p>Kineticism</text:p>
          </table:table-cell>
          <table:table-cell table:style-name="ce183" table:content-validation-name="val3"/>
          <table:table-cell table:style-name="ce244" table:formula="of:=IF([.F28]&gt;0;FLOOR(([$Build.$C$10]+[$Build.F28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Leadership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FLOOR(([.$C$6]+[.$C$11]+[.B29]+COUNTA([.B15:.C15]))/2)" office:value-type="float" office:value="1" calcext:value-type="float">
            <text:p>+1</text:p>
          </table:table-cell>
          <table:table-cell table:style-name="ce2"/>
          <table:table-cell table:style-name="ce157" office:value-type="string" calcext:value-type="string">
            <text:p>Anim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9]&gt;0;FLOOR(([$Build.$C$6]+[$Build.F29])/2)+FLOOR(([.$B$3]+4)/4);0)" office:value-type="float" office:value="0" calcext:value-type="float">
            <text:p/>
          </table:table-cell>
          <table:table-cell table:style-name="Unspent"/>
          <table:table-cell/>
          <table:table-cell table:style-name="Unspent"/>
          <table:table-cell/>
        </table:table-row>
        <table:table-row table:style-name="ro7">
          <table:table-cell table:style-name="ce117" office:value-type="string" calcext:value-type="string">
            <text:p>Influence</text:p>
          </table:table-cell>
          <table:table-cell table:style-name="ce52" table:content-validation-name="val3"/>
          <table:table-cell table:style-name="ce81" table:formula="of:=FLOOR(([.$C$8]+[.$C$11]+[.B30]+COUNTA([.B16:.C16]))/2)" office:value-type="float" office:value="0" calcext:value-type="float">
            <text:p/>
          </table:table-cell>
          <table:table-cell table:style-name="ce2"/>
          <table:table-cell table:style-name="ce157" office:value-type="string" calcext:value-type="string">
            <text:p>Mesmer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30]&gt;0;FLOOR(([$Build.$C$8]+[$Build.F30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Reconnaissance</text:p>
          </table:table-cell>
          <table:table-cell table:style-name="ce52" table:content-validation-name="val3" office:value-type="float" office:value="1" calcext:value-type="float">
            <text:p>1</text:p>
          </table:table-cell>
          <table:table-cell table:style-name="ce81" table:formula="of:=FLOOR(([.$C$10]+[.$C$11]+[.B31]+COUNTA([.B17:.C17]))/2)" office:value-type="float" office:value="0" calcext:value-type="float">
            <text:p/>
          </table:table-cell>
          <table:table-cell table:style-name="ce2"/>
          <table:table-cell table:style-name="ce157" office:value-type="string" calcext:value-type="string">
            <text:p>Elemental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31]&gt;0;FLOOR(([$Build.$C$10]+[$Build.F31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4">
          <table:table-cell table:style-name="ce20" table:formula="of:=IF([.B32]&gt;0;&quot;Unallocated&quot;;IF([.B32]&lt;0;&quot;Overallocated&quot;;&quot;&quot;))">
            <text:p/>
          </table:table-cell>
          <table:table-cell table:style-name="ce20" table:formula="of:=FLOOR((1+[.$B$3]-2)/2)+FLOOR([.$B$3]/12)+4-SUM([.B23:.B31])" office:value-type="float" office:value="0" calcext:value-type="float">
            <text:p>0</text:p>
          </table:table-cell>
          <table:table-cell table:style-name="ce85"/>
          <table:table-cell table:style-name="ce2"/>
          <table:table-cell table:style-name="ce104" table:formula="of:=IF([.F32]&gt;0;&quot;Unallocated&quot;;IF([.F32]&lt;0;&quot;Overallocated&quot;;&quot;&quot;))">
            <text:p/>
          </table:table-cell>
          <table:table-cell table:style-name="ce104" table:formula="of:=FLOOR(([.$B$3]/2)+4)-SUM([.F23:.F31])" office:value-type="float" office:value="0" calcext:value-type="float">
            <text:p>0</text:p>
          </table:table-cell>
          <table:table-cell table:style-name="ce139"/>
          <table:table-cell table:number-columns-repeated="4"/>
        </table:table-row>
        <table:table-row table:style-name="ro4">
          <table:table-cell table:style-name="ce117" office:value-type="string" calcext:value-type="string">
            <text:p>ABILITY POINTS</text:p>
          </table:table-cell>
          <table:table-cell table:style-name="ce117" table:formula="of:=SUM([.B23:.B31])+[.B32]" office:value-type="float" office:value="4" calcext:value-type="float">
            <text:p>4</text:p>
          </table:table-cell>
          <table:table-cell/>
          <table:table-cell table:style-name="ce2"/>
          <table:table-cell table:style-name="ce158" office:value-type="string" calcext:value-type="string">
            <text:p>ABILITY POINTS</text:p>
          </table:table-cell>
          <table:table-cell table:style-name="ce158" table:formula="of:=SUM([.F23:.F31])+[.F32]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6">
          <table:table-cell table:style-name="ce10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 table:style-name="ce2"/>
          <table:table-cell table:style-name="ce10" office:value-type="string" calcext:value-type="string" table:number-columns-spanned="3" table:number-rows-spanned="1">
            <text:p>COMBAT ABILITIES</text:p>
          </table:table-cell>
          <table:covered-table-cell table:number-columns-repeated="2" table:style-name="ce62"/>
          <table:table-cell table:style-name="ce10" office:value-type="string" calcext:value-type="string" table:number-columns-spanned="3" table:number-rows-spanned="1">
            <text:p>Upgrades</text:p>
          </table:table-cell>
          <table:covered-table-cell table:number-columns-repeated="2" table:style-name="ce62"/>
          <table:table-cell/>
        </table:table-row>
        <table:table-row table:style-name="ro4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2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b</text:p>
          </table:table-cell>
          <table:table-cell table:style-name="ce107" office:value-type="string" calcext:value-type="string">
            <text:p>c</text:p>
          </table:table-cell>
          <table:table-cell/>
        </table:table-row>
        <table:table-row table:style-name="ro4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/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9" table:content-validation-name="val1" office:value-type="string" calcext:value-type="string">
            <text:p>Prodigious Leap</text:p>
          </table:table-cell>
          <table:table-cell table:style-name="ce53" table:content-validation-name="val4" table:formula="of:=IFERROR(INDEX(COM.MICROSOFT.FILTER(['Utility Abilities By Art'.$A$2:.$A$70]; ['Utility Abilities By Art'.$B$2:.$B$70]=[.A43]);1);&quot;&quot;)" office:value-type="string" office:string-value="Athletics" calcext:value-type="string">
            <text:p>Athletics</text:p>
          </table:table-cell>
          <table:table-cell table:style-name="ce53" table:content-validation-name="val4" table:formula="of:=IFERROR(COM.MICROSOFT.FILTER(['Utility Abilities By Art'.$C$2:.$C$70]; ['Utility Abilities By Art'.$B$2:.$B$70]=[.A43]);&quot;&quot;)" office:value-type="string" office:string-value="Proactive" calcext:value-type="string">
            <text:p>Proactive</text:p>
          </table:table-cell>
          <table:table-cell table:style-name="ce55" table:formula="of:=IFERROR(IF(INDEX(COM.MICROSOFT.FILTER([.$B$23:.$B$31];[.$A$23:.$A$31]=[.B43]);1)&lt;1;&quot;Illegal!*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9" table:content-validation-name="val1" office:value-type="string" calcext:value-type="string">
            <text:p>I Am No One</text:p>
          </table:table-cell>
          <table:table-cell table:style-name="ce53" table:content-validation-name="val4" table:formula="of:=IFERROR(INDEX(COM.MICROSOFT.FILTER(['Utility Abilities By Art'.$A$2:.$A$70]; ['Utility Abilities By Art'.$B$2:.$B$70]=[.A44]);1);&quot;&quot;)" office:value-type="string" office:string-value="Stealth" calcext:value-type="string">
            <text:p>Stealth</text:p>
          </table:table-cell>
          <table:table-cell table:style-name="ce53" table:content-validation-name="val4" table:formula="of:=IFERROR(COM.MICROSOFT.FILTER(['Utility Abilities By Art'.$C$2:.$C$70]; ['Utility Abilities By Art'.$B$2:.$B$70]=[.A44]);&quot;&quot;)" office:value-type="string" office:string-value="Passive" calcext:value-type="string">
            <text:p>Passive</text:p>
          </table:table-cell>
          <table:table-cell table:style-name="ce55" table:formula="of:=IFERROR(IF(INDEX(COM.MICROSOFT.FILTER([.$B$23:.$B$31];[.$A$23:.$A$31]=[.B44]);1)&lt;1;&quot;Illegal!*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9" table:content-validation-name="val1" office:value-type="string" calcext:value-type="string">
            <text:p>Eagle-Eye</text:p>
          </table:table-cell>
          <table:table-cell table:style-name="ce53" table:content-validation-name="val4" table:formula="of:=IFERROR(INDEX(COM.MICROSOFT.FILTER(['Utility Abilities By Art'.$A$2:.$A$70]; ['Utility Abilities By Art'.$B$2:.$B$70]=[.A45]);1);&quot;&quot;)" office:value-type="string" office:string-value="Reconnaissance" calcext:value-type="string">
            <text:p>Reconnaissance</text:p>
          </table:table-cell>
          <table:table-cell table:style-name="ce53" table:content-validation-name="val4" table:formula="of:=IFERROR(COM.MICROSOFT.FILTER(['Utility Abilities By Art'.$C$2:.$C$70]; ['Utility Abilities By Art'.$B$2:.$B$70]=[.A45]);&quot;&quot;)" office:value-type="string" office:string-value="Passive" calcext:value-type="string">
            <text:p>Passive</text:p>
          </table:table-cell>
          <table:table-cell table:style-name="ce55" table:formula="of:=IFERROR(IF(INDEX(COM.MICROSOFT.FILTER([.$B$23:.$B$31];[.$A$23:.$A$31]=[.B45]);1)&lt;1;&quot;Illegal!*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6">
          <table:table-cell table:style-name="ce23" table:content-validation-name="val1" office:value-type="string" calcext:value-type="string">
            <text:p>Clairvoyant Synethsesia</text:p>
          </table:table-cell>
          <table:table-cell table:style-name="ce64" table:content-validation-name="val4" table:formula="of:=IFERROR(COM.MICROSOFT.FILTER(['Utility Abilities By Art'.$A$2:.$A$70]; ['Utility Abilities By Art'.$B$2:.$B$70]=[.A46]);&quot;&quot;)" office:value-type="string" office:string-value="Reconnaissance" calcext:value-type="string">
            <text:p>Reconnaissance</text:p>
          </table:table-cell>
          <table:table-cell table:style-name="ce64" table:content-validation-name="val4" table:formula="of:=IFERROR(COM.MICROSOFT.FILTER(['Utility Abilities By Art'.$C$2:.$C$70]; ['Utility Abilities By Art'.$B$2:.$B$70]=[.A46]);&quot;&quot;)" office:value-type="string" office:string-value="Proactive" calcext:value-type="string">
            <text:p>Proactive</text:p>
          </table:table-cell>
          <table:table-cell table:style-name="ce55" table:formula="of:=IFERROR(IF(INDEX(COM.MICROSOFT.FILTER([.$B$23:.$B$31];[.$A$23:.$A$31]=[.B46]);1)&lt;1;&quot;Illegal!*&quot;;&quot;&quot;);&quot;&quot;)">
            <text:p/>
          </table:table-cell>
          <table:table-cell table:style-name="ce121" table:content-validation-name="val5" office:value-type="string" calcext:value-type="string">
            <text:p>Piercing Shot</text:p>
          </table:table-cell>
          <table:table-cell table:style-name="ce126" table:content-validation-name="val4" table:formula="of:=IFERROR(IFNA(INDEX(COM.MICROSOFT.FILTER(['Combat Abilities Master List'.$B$11:.$B$73]; ['Combat Abilities Master List'.$C$11:.$C$73]=[.E46]);1);&quot;&quot;);&quot;&quot;)" office:value-type="string" office:string-value="Archery" calcext:value-type="string">
            <text:p>Archery</text:p>
          </table:table-cell>
          <table:table-cell table:style-name="ce140" table:formula="of:=IFERROR(IFNA(INDEX(COM.MICROSOFT.FILTER(['Combat Abilities Master List'.$D$11:.$D$73]; ['Combat Abilities Master List'.$C$11:.$C$73]=[.E46]);1);&quot;&quot;);&quot;&quot;)" office:value-type="string" office:string-value="Action" calcext:value-type="string">
            <text:p>Action</text:p>
          </table:table-cell>
          <table:table-cell table:style-name="ce166"/>
          <table:table-cell table:style-name="ce170" table:number-columns-repeated="2"/>
          <table:table-cell table:style-name="ce171"/>
        </table:table-row>
        <table:table-row table:style-name="ro6">
          <table:table-cell table:style-name="ce25" table:content-validation-name="val1"/>
          <table:table-cell table:style-name="ce68" table:content-validation-name="val4" table:formula="of:=IFERROR(COM.MICROSOFT.FILTER(['Utility Abilities By Art'.$A$2:.$A$70]; ['Utility Abilities By Art'.$B$2:.$B$70]=[.A47]);&quot;&quot;)">
            <text:p/>
          </table:table-cell>
          <table:table-cell table:style-name="ce68" table:content-validation-name="val4" table:formula="of:=IFERROR(COM.MICROSOFT.FILTER(['Utility Abilities By Art'.$C$2:.$C$70]; ['Utility Abilities By Art'.$B$2:.$B$70]=[.A47]);&quot;&quot;)">
            <text:p/>
          </table:table-cell>
          <table:table-cell table:style-name="ce55" table:formula="of:=IFERROR(IF(INDEX(COM.MICROSOFT.FILTER([.$B$23:.$B$31];[.$A$23:.$A$31]=[.B47]);1)&lt;1;&quot;Illegal!*&quot;;&quot;&quot;);&quot;&quot;)">
            <text:p/>
          </table:table-cell>
          <table:table-cell table:style-name="ce110" table:content-validation-name="val6" office:value-type="string" calcext:value-type="string">
            <text:p>Prepared Shot</text:p>
          </table:table-cell>
          <table:table-cell table:style-name="ce129" table:content-validation-name="val4" table:formula="of:=IFERROR(IFNA(INDEX(COM.MICROSOFT.FILTER(['Combat Abilities By Art'.$A$2:.$A$82]; ['Combat Abilities By Art'.$B$2:.$B$82]=[.E47]);1);&quot;&quot;);&quot;&quot;)" office:value-type="string" office:string-value="Archery" calcext:value-type="string">
            <text:p>Archery</text:p>
          </table:table-cell>
          <table:table-cell table:style-name="ce143" table:formula="of:=IFERROR(IFNA(INDEX(COM.MICROSOFT.FILTER(['Combat Abilities By Art'.$C$2:.$C$82]; ['Combat Abilities By Art'.$B$2:.$B$82]=[.E47]);1);&quot;&quot;);&quot;&quot;)" office:value-type="string" office:string-value="Stance" calcext:value-type="string">
            <text:p>Stance</text:p>
          </table:table-cell>
          <table:table-cell table:style-name="ce166"/>
          <table:table-cell table:style-name="ce170" table:number-columns-repeated="2"/>
          <table:table-cell/>
        </table:table-row>
        <table:table-row table:style-name="ro6">
          <table:table-cell table:style-name="ce36" table:content-validation-name="val1"/>
          <table:table-cell table:style-name="ce69" table:content-validation-name="val4" table:formula="of:=IFERROR(COM.MICROSOFT.FILTER(['Utility Abilities By Art'.$A$2:.$A$70]; ['Utility Abilities By Art'.$B$2:.$B$70]=[.A48]);&quot;&quot;)">
            <text:p/>
          </table:table-cell>
          <table:table-cell table:style-name="ce69" table:content-validation-name="val4" table:formula="of:=IFERROR(COM.MICROSOFT.FILTER(['Utility Abilities By Art'.$C$2:.$C$70]; ['Utility Abilities By Art'.$B$2:.$B$70]=[.A48]);&quot;&quot;)">
            <text:p/>
          </table:table-cell>
          <table:table-cell table:style-name="ce55" table:formula="of:=IFERROR(IF(INDEX(COM.MICROSOFT.FILTER([.$B$23:.$B$31];[.$A$23:.$A$31]=[.B48]);1)&lt;1;&quot;Illegal!*&quot;;&quot;&quot;);&quot;&quot;)">
            <text:p/>
          </table:table-cell>
          <table:table-cell table:style-name="ce111" table:content-validation-name="val6" office:value-type="string" calcext:value-type="string">
            <text:p>Study</text:p>
          </table:table-cell>
          <table:table-cell table:style-name="ce130" table:content-validation-name="val4" table:formula="of:=IFERROR(IFNA(INDEX(COM.MICROSOFT.FILTER(['Combat Abilities By Art'.$A$2:.$A$82]; ['Combat Abilities By Art'.$B$2:.$B$82]=[.E48]);1);&quot;&quot;);&quot;&quot;)" office:value-type="string" office:string-value="Ninjutsu" calcext:value-type="string">
            <text:p>Ninjutsu</text:p>
          </table:table-cell>
          <table:table-cell table:style-name="ce144" table:formula="of:=IFERROR(IFNA(INDEX(COM.MICROSOFT.FILTER(['Combat Abilities By Art'.$C$2:.$C$82]; ['Combat Abilities By Art'.$B$2:.$B$82]=[.E48]);1);&quot;&quot;);&quot;&quot;)" office:value-type="string" office:string-value="Stance" calcext:value-type="string">
            <text:p>Stance</text:p>
          </table:table-cell>
          <table:table-cell table:style-name="ce166"/>
          <table:table-cell table:style-name="ce170" table:number-columns-repeated="2"/>
          <table:table-cell/>
        </table:table-row>
        <table:table-row table:style-name="ro6">
          <table:table-cell table:style-name="ce37" table:content-validation-name="val1"/>
          <table:table-cell table:style-name="ce70" table:content-validation-name="val4" table:formula="of:=IFERROR(COM.MICROSOFT.FILTER(['Utility Abilities By Art'.$A$2:.$A$70]; ['Utility Abilities By Art'.$B$2:.$B$70]=[.A49]);&quot;&quot;)">
            <text:p/>
          </table:table-cell>
          <table:table-cell table:style-name="ce70" table:content-validation-name="val4" table:formula="of:=IFERROR(COM.MICROSOFT.FILTER(['Utility Abilities By Art'.$C$2:.$C$70]; ['Utility Abilities By Art'.$B$2:.$B$70]=[.A49]);&quot;&quot;)">
            <text:p/>
          </table:table-cell>
          <table:table-cell table:style-name="ce55" table:formula="of:=IFERROR(IF(INDEX(COM.MICROSOFT.FILTER([.$B$23:.$B$31];[.$A$23:.$A$31]=[.B49]);1)&lt;1;&quot;Illegal!*&quot;;&quot;&quot;);&quot;&quot;)">
            <text:p/>
          </table:table-cell>
          <table:table-cell table:style-name="ce112" table:content-validation-name="val6" office:value-type="string" calcext:value-type="string">
            <text:p>Quiet Mind</text:p>
          </table:table-cell>
          <table:table-cell table:style-name="ce134" table:content-validation-name="val4" table:formula="of:=IFERROR(IFNA(INDEX(COM.MICROSOFT.FILTER(['Combat Abilities By Art'.$A$2:.$A$82]; ['Combat Abilities By Art'.$B$2:.$B$82]=[.E49]);1);&quot;&quot;);&quot;&quot;)" office:value-type="string" office:string-value="Ninjutsu" calcext:value-type="string">
            <text:p>Ninjutsu</text:p>
          </table:table-cell>
          <table:table-cell table:style-name="ce145" table:formula="of:=IFERROR(IFNA(INDEX(COM.MICROSOFT.FILTER(['Combat Abilities By Art'.$C$2:.$C$82]; ['Combat Abilities By Art'.$B$2:.$B$82]=[.E49]);1);&quot;&quot;);&quot;&quot;)" office:value-type="string" office:string-value="Stance" calcext:value-type="string">
            <text:p>Stance</text:p>
          </table:table-cell>
          <table:table-cell table:style-name="ce166"/>
          <table:table-cell table:style-name="ce170" table:number-columns-repeated="2"/>
          <table:table-cell/>
        </table:table-row>
        <table:table-row table:style-name="ro6">
          <table:table-cell table:style-name="ce38" table:content-validation-name="val1"/>
          <table:table-cell table:style-name="ce71" table:content-validation-name="val4" table:formula="of:=IFERROR(COM.MICROSOFT.FILTER(['Utility Abilities By Art'.$A$2:.$A$70]; ['Utility Abilities By Art'.$B$2:.$B$70]=[.A50]);&quot;&quot;)">
            <text:p/>
          </table:table-cell>
          <table:table-cell table:style-name="ce71" table:content-validation-name="val4" table:formula="of:=IFERROR(COM.MICROSOFT.FILTER(['Utility Abilities By Art'.$C$2:.$C$70]; ['Utility Abilities By Art'.$B$2:.$B$70]=[.A50]);&quot;&quot;)">
            <text:p/>
          </table:table-cell>
          <table:table-cell table:style-name="ce55" table:formula="of:=IFERROR(IF(INDEX(COM.MICROSOFT.FILTER([.$B$23:.$B$31];[.$A$23:.$A$31]=[.B50]);1)&lt;1;&quot;Illegal!*&quot;;&quot;&quot;);&quot;&quot;)">
            <text:p/>
          </table:table-cell>
          <table:table-cell table:style-name="ce112" table:content-validation-name="val6"/>
          <table:table-cell table:style-name="ce134" table:content-validation-name="val4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145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166"/>
          <table:table-cell table:style-name="ce170" table:number-columns-repeated="2"/>
          <table:table-cell/>
        </table:table-row>
        <table:table-row table:style-name="ro6">
          <table:table-cell table:style-name="ce39" table:content-validation-name="val1"/>
          <table:table-cell table:style-name="ce74" table:content-validation-name="val4" table:formula="of:=IFERROR(COM.MICROSOFT.FILTER(['Utility Abilities By Art'.$A$2:.$A$70]; ['Utility Abilities By Art'.$B$2:.$B$70]=[.A51]);&quot;&quot;)">
            <text:p/>
          </table:table-cell>
          <table:table-cell table:style-name="ce74" table:content-validation-name="val4" table:formula="of:=IFERROR(COM.MICROSOFT.FILTER(['Utility Abilities By Art'.$C$2:.$C$70]; ['Utility Abilities By Art'.$B$2:.$B$70]=[.A51]);&quot;&quot;)">
            <text:p/>
          </table:table-cell>
          <table:table-cell table:style-name="ce55" table:formula="of:=IFERROR(IF(INDEX(COM.MICROSOFT.FILTER([.$B$23:.$B$31];[.$A$23:.$A$31]=[.B51]);1)&lt;1;&quot;Illegal!*&quot;;&quot;&quot;);&quot;&quot;)">
            <text:p/>
          </table:table-cell>
          <table:table-cell table:style-name="ce112" table:content-validation-name="val6"/>
          <table:table-cell table:style-name="ce134" table:content-validation-name="val4" table:formula="of:=IFERROR(IFNA(INDEX(COM.MICROSOFT.FILTER(['Combat Abilities By Art'.$A$2:.$A$82]; ['Combat Abilities By Art'.$B$2:.$B$82]=[.E51]);1);&quot;&quot;);&quot;&quot;)">
            <text:p/>
          </table:table-cell>
          <table:table-cell table:style-name="ce145" table:formula="of:=IFERROR(IFNA(INDEX(COM.MICROSOFT.FILTER(['Combat Abilities By Art'.$C$2:.$C$82]; ['Combat Abilities By Art'.$B$2:.$B$82]=[.E51]);1);&quot;&quot;);&quot;&quot;)">
            <text:p/>
          </table:table-cell>
          <table:table-cell table:style-name="ce166"/>
          <table:table-cell table:style-name="ce170" table:number-columns-repeated="2"/>
          <table:table-cell/>
        </table:table-row>
        <table:table-row table:style-name="ro6">
          <table:table-cell table:style-name="Default"/>
          <table:table-cell/>
          <table:table-cell table:style-name="Default"/>
          <table:table-cell table:style-name="ce56" table:formula="of:=IFERROR(IF(IFNA(INDEX(COM.MICROSOFT.FILTER([.$B$23:.$B$31]; [.$A$23:.$A$31]=[.B52]);1);0)&lt;1;&quot;Illegal!&quot;;&quot;&quot;);&quot;&quot;)">
            <text:p/>
          </table:table-cell>
          <table:table-cell table:style-name="ce112" table:content-validation-name="val6"/>
          <table:table-cell table:style-name="ce134" table:content-validation-name="val4" table:formula="of:=IFERROR(IFNA(INDEX(COM.MICROSOFT.FILTER(['Combat Abilities By Art'.$A$2:.$A$82]; ['Combat Abilities By Art'.$B$2:.$B$82]=[.E52]);1);&quot;&quot;);&quot;&quot;)">
            <text:p/>
          </table:table-cell>
          <table:table-cell table:style-name="ce145" table:formula="of:=IFERROR(IFNA(INDEX(COM.MICROSOFT.FILTER(['Combat Abilities By Art'.$C$2:.$C$82]; ['Combat Abilities By Art'.$B$2:.$B$82]=[.E52]);1);&quot;&quot;);&quot;&quot;)">
            <text:p/>
          </table:table-cell>
          <table:table-cell table:style-name="ce166"/>
          <table:table-cell table:style-name="ce170" table:number-columns-repeated="2"/>
          <table:table-cell/>
        </table:table-row>
        <table:table-row table:style-name="ro6">
          <table:table-cell table:style-name="ce24"/>
          <table:table-cell table:content-validation-name="val4"/>
          <table:table-cell table:style-name="Default" table:content-validation-name="val4"/>
          <table:table-cell/>
          <table:table-cell table:style-name="ce112" table:content-validation-name="val6"/>
          <table:table-cell table:style-name="ce134" table:content-validation-name="val4" table:formula="of:=IFERROR(IFNA(INDEX(COM.MICROSOFT.FILTER(['Combat Abilities By Art'.$A$2:.$A$82]; ['Combat Abilities By Art'.$B$2:.$B$82]=[.E53]);1);&quot;&quot;);&quot;&quot;)">
            <text:p/>
          </table:table-cell>
          <table:table-cell table:style-name="ce145" table:formula="of:=IFERROR(IFNA(INDEX(COM.MICROSOFT.FILTER(['Combat Abilities By Art'.$C$2:.$C$82]; ['Combat Abilities By Art'.$B$2:.$B$82]=[.E53]);1);&quot;&quot;);&quot;&quot;)">
            <text:p/>
          </table:table-cell>
          <table:table-cell table:style-name="ce166"/>
          <table:table-cell table:style-name="ce170" table:number-columns-repeated="2"/>
          <table:table-cell/>
        </table:table-row>
        <table:table-row table:style-name="ro6">
          <table:table-cell table:style-name="ce24"/>
          <table:table-cell table:content-validation-name="val4"/>
          <table:table-cell table:style-name="Default" table:content-validation-name="val4"/>
          <table:table-cell/>
          <table:table-cell table:style-name="ce97" table:content-validation-name="val6"/>
          <table:table-cell table:style-name="ce128" table:content-validation-name="val4" table:formula="of:=IFERROR(IFNA(INDEX(COM.MICROSOFT.FILTER(['Combat Abilities By Art'.$A$2:.$A$82]; ['Combat Abilities By Art'.$B$2:.$B$82]=[.E54]);1);&quot;&quot;);&quot;&quot;)">
            <text:p/>
          </table:table-cell>
          <table:table-cell table:style-name="ce148" table:formula="of:=IFERROR(IFNA(INDEX(COM.MICROSOFT.FILTER(['Combat Abilities By Art'.$C$2:.$C$82]; ['Combat Abilities By Art'.$B$2:.$B$82]=[.E54]);1);&quot;&quot;);&quot;&quot;)">
            <text:p/>
          </table:table-cell>
          <table:table-cell table:style-name="ce166"/>
          <table:table-cell table:style-name="ce170" table:number-columns-repeated="2"/>
          <table:table-cell/>
        </table:table-row>
        <table:table-row table:style-name="ro6">
          <table:table-cell table:style-name="ce24"/>
          <table:table-cell/>
          <table:table-cell table:style-name="Default" table:content-validation-name="val4"/>
          <table:table-cell/>
          <table:table-cell table:style-name="Default" table:number-columns-repeated="3"/>
          <table:table-cell table:style-name="ce167"/>
          <table:table-cell table:style-name="ce168" table:number-columns-repeated="2"/>
          <table:table-cell/>
        </table:table-row>
        <table:table-row table:style-name="ro6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style-name="ce168" table:number-columns-repeated="3"/>
          <table:table-cell/>
        </table:table-row>
        <table:table-row table:style-name="ro6">
          <table:table-cell table:style-name="Default"/>
          <table:table-cell/>
          <table:table-cell table:style-name="ce24" table:number-columns-repeated="2"/>
          <table:table-cell table:style-name="ce72" table:number-columns-repeated="2"/>
          <table:table-cell table:style-name="Default"/>
          <table:table-cell table:style-name="ce168" table:number-columns-repeated="3"/>
          <table:table-cell/>
        </table:table-row>
        <table:table-row table:style-name="ro6">
          <table:table-cell table:style-name="ce24" table:number-columns-repeated="3"/>
          <table:table-cell table:style-name="ce72" table:number-columns-repeated="3"/>
          <table:table-cell/>
          <table:table-cell table:style-name="ce168" table:number-columns-repeated="3"/>
          <table:table-cell/>
        </table:table-row>
        <table:table-row table:style-name="ro6">
          <table:table-cell table:style-name="ce24" table:number-columns-repeated="3"/>
          <table:table-cell table:style-name="ce2"/>
          <table:table-cell table:number-columns-repeated="3"/>
          <table:table-cell table:style-name="ce168" table:number-columns-repeated="3"/>
          <table:table-cell/>
        </table:table-row>
        <table:table-row table:style-name="ro6" table:number-rows-repeated="10"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168" table:number-columns-repeated="3"/>
          <table:table-cell/>
        </table:table-row>
        <table:table-row table:style-name="ro6" table:number-rows-repeated="9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style-name="ce168" table:number-columns-repeated="3"/>
          <table:table-cell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style-name="ce169" table:number-columns-repeated="3"/>
          <table:table-cell/>
        </table:table-row>
        <calcext:conditional-formats>
          <calcext:conditional-format calcext:target-range-address="Build.A47:Build.A47">
            <calcext:condition calcext:apply-style-name="Unavailable" calcext:value="formula-is([.$B$33]&lt;5)" calcext:base-cell-address="Build.A47"/>
          </calcext:conditional-format>
          <calcext:conditional-format calcext:target-range-address="Build.A48:Build.A48">
            <calcext:condition calcext:apply-style-name="Unavailable" calcext:value="formula-is([.$B$33]&lt;6)" calcext:base-cell-address="Build.A48"/>
          </calcext:conditional-format>
          <calcext:conditional-format calcext:target-range-address="Build.A49:Build.A49">
            <calcext:condition calcext:apply-style-name="Unavailable" calcext:value="formula-is([.$B$33]&lt;7)" calcext:base-cell-address="Build.A49"/>
          </calcext:conditional-format>
          <calcext:conditional-format calcext:target-range-address="Build.A50:Build.A50">
            <calcext:condition calcext:apply-style-name="Unavailable" calcext:value="formula-is([.$B$33]&lt;8)" calcext:base-cell-address="Build.A50"/>
          </calcext:conditional-format>
          <calcext:conditional-format calcext:target-range-address="Build.A51:Build.A51">
            <calcext:condition calcext:apply-style-name="Unavailable" calcext:value="formula-is([.$B$33]&lt;9)" calcext:base-cell-address="Build.A51"/>
          </calcext:conditional-format>
          <calcext:conditional-format calcext:target-range-address="Build.A46:Build.A46">
            <calcext:condition calcext:apply-style-name="Unavailable" calcext:value="formula-is([.$B$33]&lt;4)" calcext:base-cell-address="Build.A46"/>
          </calcext:conditional-format>
          <calcext:conditional-format calcext:target-range-address="Build.A32:Build.C32">
            <calcext:condition calcext:apply-style-name="Illegal" calcext:value="formula-is([.$B$32]&lt;0)" calcext:base-cell-address="Build.A32"/>
            <calcext:condition calcext:apply-style-name="Chameleon" calcext:value="formula-is([.$B$32]=0)" calcext:base-cell-address="Build.A32"/>
            <calcext:condition calcext:apply-style-name="Unspent" calcext:value="formula-is([.$B$32]&gt;0)" calcext:base-cell-address="Build.A32"/>
          </calcext:conditional-format>
          <calcext:conditional-format calcext:target-range-address="Build.E32:Build.G32">
            <calcext:condition calcext:apply-style-name="Illegal" calcext:value="formula-is([.$F$32]&lt;0)" calcext:base-cell-address="Build.E32"/>
            <calcext:condition calcext:apply-style-name="Chameleon" calcext:value="formula-is([.$F$32]=0)" calcext:base-cell-address="Build.E32"/>
            <calcext:condition calcext:apply-style-name="Unspent" calcext:value="formula-is([.$F$32]&gt;0)" calcext:base-cell-address="Build.E32"/>
          </calcext:conditional-format>
          <calcext:conditional-format calcext:target-range-address="Build.B47:Build.C47">
            <calcext:condition calcext:apply-style-name="Unavailable" calcext:value="formula-is([.$B$33]&lt;5)" calcext:base-cell-address="Build.B47"/>
          </calcext:conditional-format>
          <calcext:conditional-format calcext:target-range-address="Build.B48:Build.C48">
            <calcext:condition calcext:apply-style-name="Unavailable" calcext:value="formula-is([.$B$33]&lt;6)" calcext:base-cell-address="Build.B48"/>
          </calcext:conditional-format>
          <calcext:conditional-format calcext:target-range-address="Build.B49:Build.C49">
            <calcext:condition calcext:apply-style-name="Unavailable" calcext:value="formula-is([.$B$33]&lt;7)" calcext:base-cell-address="Build.B49"/>
          </calcext:conditional-format>
          <calcext:conditional-format calcext:target-range-address="Build.B50:Build.C50">
            <calcext:condition calcext:apply-style-name="Unavailable" calcext:value="formula-is([.$B$33]&lt;8)" calcext:base-cell-address="Build.B50"/>
          </calcext:conditional-format>
          <calcext:conditional-format calcext:target-range-address="Build.B51:Build.C51">
            <calcext:condition calcext:apply-style-name="Unavailable" calcext:value="formula-is([.$B$33]&lt;9)" calcext:base-cell-address="Build.B51"/>
          </calcext:conditional-format>
          <calcext:conditional-format calcext:target-range-address="Build.B46:Build.C46">
            <calcext:condition calcext:apply-style-name="Unavailable" calcext:value="formula-is([.$B$33]&lt;4)" calcext:base-cell-address="Build.B46"/>
          </calcext:conditional-format>
          <calcext:conditional-format calcext:target-range-address="Build.E48:Build.G53">
            <calcext:condition calcext:apply-style-name="Unavailable" calcext:value="formula-is([.$F$33]-SUM(#REF!)&lt;1)" calcext:base-cell-address="Build.E48"/>
          </calcext:conditional-format>
          <calcext:conditional-format calcext:target-range-address="Build.E47:Build.G47">
            <calcext:condition calcext:apply-style-name="Accent" calcext:value="formula-is([.$F$33]-SUM(#REF!)&lt;1)" calcext:base-cell-address="Build.E47"/>
          </calcext:conditional-format>
          <calcext:conditional-format calcext:target-range-address="Build.E46:Build.G46">
            <calcext:condition calcext:apply-style-name="Accent" calcext:value="formula-is([.$F$33]-#REF!&lt;1)" calcext:base-cell-address="Build.E46"/>
          </calcext:conditional-format>
          <calcext:conditional-format calcext:target-range-address="Build.A12:Build.B12">
            <calcext:condition calcext:apply-style-name="Illegal" calcext:value="formula-is([.$B$12]&lt;0)" calcext:base-cell-address="Build.A12"/>
            <calcext:condition calcext:apply-style-name="Unspent" calcext:value="formula-is([.$B$12]&gt;0)" calcext:base-cell-address="Build.A12"/>
            <calcext:condition calcext:apply-style-name="Chameleon" calcext:value="formula-is([.$B$12]=0)" calcext:base-cell-address="Build.A12"/>
          </calcext:conditional-format>
          <calcext:conditional-format calcext:target-range-address="Build.A18:Build.A18">
            <calcext:condition calcext:apply-style-name="Illegal" calcext:value="formula-is(OR([.$B$18]&lt;0;[.$C$18]&lt;0))" calcext:base-cell-address="Build.A18"/>
            <calcext:condition calcext:apply-style-name="Unspent" calcext:value="formula-is(OR([.$B$18]&gt;0;[.$C$18]&lt;0))" calcext:base-cell-address="Build.A18"/>
            <calcext:condition calcext:apply-style-name="Chameleon" calcext:value="formula-is(AND([.$B$18]=0;[.$C$18]=0))" calcext:base-cell-address="Build.A18"/>
          </calcext:conditional-format>
          <calcext:conditional-format calcext:target-range-address="Build.B18:Build.C18 Build.F18:Build.G18">
            <calcext:condition calcext:apply-style-name="Chameleon" calcext:value="=0" calcext:base-cell-address="Build.B18"/>
            <calcext:condition calcext:apply-style-name="Unspent" calcext:value="&gt;0" calcext:base-cell-address="Build.B18"/>
            <calcext:condition calcext:apply-style-name="Illegal" calcext:value="&lt;0" calcext:base-cell-address="Build.B18"/>
          </calcext:conditional-format>
          <calcext:conditional-format calcext:target-range-address="Build.E18:Build.E18">
            <calcext:condition calcext:apply-style-name="Illegal" calcext:value="formula-is(OR([.$F$18]&lt;0;[.$G$18]&lt;0))" calcext:base-cell-address="Build.E18"/>
            <calcext:condition calcext:apply-style-name="Unspent" calcext:value="formula-is(OR([.$F$18]&gt;0;[.$G$18]&gt;0))" calcext:base-cell-address="Build.E18"/>
            <calcext:condition calcext:apply-style-name="Chameleon" calcext:value="formula-is(AND([.$F$18]=0;[.$G$18]=0))" calcext:base-cell-address="Build.E18"/>
          </calcext:conditional-format>
        </calcext:conditional-formats>
      </table:table>
      <table:table table:name="Utility" table:style-name="ta1">
        <office:forms form:automatic-focus="false" form:apply-design-mode="false"/>
        <table:table-column table:style-name="co10" table:visibility="collapse" table:default-cell-style-name="ce88"/>
        <table:table-column table:style-name="co11" table:default-cell-style-name="ce188"/>
        <table:table-column table:style-name="co12" table:default-cell-style-name="ce188"/>
        <table:table-column table:style-name="co13" table:default-cell-style-name="Default"/>
        <table:table-column table:style-name="co14" table:default-cell-style-name="ce198"/>
        <table:table-column table:style-name="co15" table:default-cell-style-name="ce201"/>
        <table:table-column table:style-name="co16" table:default-cell-style-name="ce217"/>
        <table:table-column table:style-name="co17" table:default-cell-style-name="ce217"/>
        <table:table-column table:style-name="co18" table:default-cell-style-name="ce217"/>
        <table:table-column table:style-name="co19" table:default-cell-style-name="ce217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268" table:formula="of:=[$Build.B1]" office:value-type="string" office:string-value="Cornelius Macguffin" calcext:value-type="string" table:number-columns-spanned="5" table:number-rows-spanned="1">
            <text:p>Cornelius Macguffin</text:p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4">
          <table:table-cell table:style-name="Default" table:number-columns-repeated="3"/>
          <table:table-cell/>
          <table:table-cell table:style-name="ce98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84" table:content-validation-name="val7" office:value-type="string" calcext:value-type="string" table:number-columns-spanned="1" table:number-rows-spanned="2">
            <text:p>Meditate</text:p>
          </table:table-cell>
          <table:table-cell table:style-name="ce285" table:number-columns-spanned="1" table:number-rows-spanned="2"/>
          <table:table-cell table:number-columns-repeated="6"/>
        </table:table-row>
        <table:table-row table:style-name="ro4">
          <table:table-cell table:style-name="Default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180"/>
          <table:table-cell/>
          <table:table-cell table:style-name="ce275" table:content-validation-name="val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style-name="Default"/>
          <table:covered-table-cell table:style-name="ce286"/>
          <table:table-cell table:number-columns-repeated="6"/>
        </table:table-row>
        <table:table-row table:style-name="ro6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Default" table:number-columns-repeated="6"/>
          <table:table-cell table:number-columns-repeated="6"/>
        </table:table-row>
        <table:table-row table:style-name="ro6">
          <table:table-cell table:style-name="Default"/>
          <table:table-cell table:style-name="ce4" table:formula="of:=[$Build.A6]" office:value-type="string" office:string-value="Power (POW)" calcext:value-type="string">
            <text:p>Power (POW)</text:p>
          </table:table-cell>
          <table:table-cell table:style-name="ce65" table:formula="of:=[$Build.C6]" office:value-type="float" office:value="2" calcext:value-type="float">
            <text:p>+2</text:p>
          </table:table-cell>
          <table:table-cell/>
          <table:table-cell table:style-name="ce197"/>
          <table:table-cell table:style-name="ce10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4">
          <table:table-cell table:style-name="Default"/>
          <table:table-cell table:style-name="ce4" table:formula="of:=[$Build.A7]" office:value-type="string" office:string-value="Endurance (END)" calcext:value-type="string">
            <text:p>Endurance (END)</text:p>
          </table:table-cell>
          <table:table-cell table:style-name="ce65" table:formula="of:=[$Build.C7]"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([$Build.$A$37:.$C$51];3;-1);[.E8];1); &quot;&quot;)" office:value-type="string" office:string-value="Intercede" calcext:value-type="string">
            <text:p>Intercede</text:p>
          </table:table-cell>
          <table:table-cell table:style-name="ce216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/>
          <table:table-cell table:style-name="ce5" table:formula="of:=[$Build.A8]" office:value-type="string" office:string-value="Finesse (FIN)" calcext:value-type="string">
            <text:p>Finesse (FIN)</text:p>
          </table:table-cell>
          <table:table-cell table:style-name="ce137" table:formula="of:=[$Build.C8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5" table:formula="of:=[$Build.A9]" office:value-type="string" office:string-value="Reflex (REF)" calcext:value-type="string">
            <text:p>Reflex (REF)</text:p>
          </table:table-cell>
          <table:table-cell table:style-name="ce137" table:formula="of:=[$Build.C9]" office:value-type="float" office:value="2" calcext:value-type="float">
            <text:p>+2</text:p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6" table:formula="of:=[$Build.A10]" office:value-type="string" office:string-value="Reasoning (REA)" calcext:value-type="string">
            <text:p>Reasoning (REA)</text:p>
          </table:table-cell>
          <table:table-cell table:style-name="ce138" table:formula="of:=[$Build.C10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9">
          <table:table-cell table:style-name="Default"/>
          <table:table-cell table:style-name="ce6" table:formula="of:=[$Build.A11]" office:value-type="string" office:string-value="Focus (FOC)" calcext:value-type="string">
            <text:p>Focus (FOC)</text:p>
          </table:table-cell>
          <table:table-cell table:style-name="ce138" table:formula="of:=[$Build.C11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([$Build.$A$37:.$C$51];3;-1);[.E13];1); &quot;&quot;)" office:value-type="string" office:string-value="Double or Nothing" calcext:value-type="string">
            <text:p>Double or Nothing</text:p>
          </table:table-cell>
          <table:table-cell table:style-name="ce216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3]" office:value-type="string" office:string-value="Struction" calcext:value-type="string">
            <text:p>Struction</text:p>
          </table:table-cell>
          <table:table-cell table:style-name="ce81" table:formula="of:=[$Build.C23]" office:value-type="float" office:value="1" calcext:value-type="float">
            <text:p>+1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4]" office:value-type="string" office:string-value="Craft" calcext:value-type="string">
            <text:p>Craft</text:p>
          </table:table-cell>
          <table:table-cell table:style-name="ce81" table:formula="of:=[$Build.C24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5]" office:value-type="string" office:string-value="Research" calcext:value-type="string">
            <text:p>Research</text:p>
          </table:table-cell>
          <table:table-cell table:style-name="ce81" table:formula="of:=[$Build.C25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([$Build.$A$37:.$C$51];3;-1);[.E18];1); &quot;&quot;)" office:value-type="string" office:string-value="Push" calcext:value-type="string">
            <text:p>Push</text:p>
          </table:table-cell>
          <table:table-cell table:style-name="ce216" table:formula="of:=IFERROR(IFNA(INDEX(COM.MICROSOFT.FILTER([$'Utility Abilities By Art'.$D$2:.$D$70];['Utility Abilities By Art'.$B$2:.$B$70]=[.F18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6]" office:value-type="string" office:string-value="Athletics" calcext:value-type="string">
            <text:p>Athletics</text:p>
          </table:table-cell>
          <table:table-cell table:style-name="ce81" table:formula="of:=[$Build.C26]" office:value-type="float" office:value="3" calcext:value-type="float">
            <text:p>+3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7]" office:value-type="string" office:string-value="Stealth" calcext:value-type="string">
            <text:p>Stealth</text:p>
          </table:table-cell>
          <table:table-cell table:style-name="ce81" table:formula="of:=[$Build.C27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8]" office:value-type="string" office:string-value="Problem Solving" calcext:value-type="string">
            <text:p>Problem Solving</text:p>
          </table:table-cell>
          <table:table-cell table:style-name="ce81" table:formula="of:=[$Build.C28]" office:value-type="float" office:value="1" calcext:value-type="float">
            <text:p>+1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9]" office:value-type="string" office:string-value="Leadership" calcext:value-type="string">
            <text:p>Leadership</text:p>
          </table:table-cell>
          <table:table-cell table:style-name="ce81" table:formula="of:=[$Build.C29]" office:value-type="float" office:value="1" calcext:value-type="float">
            <text:p>+1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30]" office:value-type="string" office:string-value="Influence" calcext:value-type="string">
            <text:p>Influence</text:p>
          </table:table-cell>
          <table:table-cell table:style-name="ce81" table:formula="of:=[$Build.C30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([$Build.$A$37:.$C$51];3;-1);[.E23];1); &quot;&quot;)" office:value-type="string" office:string-value="Help" calcext:value-type="string">
            <text:p>Help</text:p>
          </table:table-cell>
          <table:table-cell table:style-name="ce216" table:formula="of:=IFERROR(IFNA(INDEX(COM.MICROSOFT.FILTER([$'Utility Abilities By Art'.$D$2:.$D$70];['Utility Abilities By Art'.$B$2:.$B$70]=[.F23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10">
          <table:table-cell table:style-name="Default"/>
          <table:table-cell table:style-name="ce117" table:formula="of:=[$Build.A31]" office:value-type="string" office:string-value="Reconnaissance" calcext:value-type="string">
            <text:p>Reconnaissance</text:p>
          </table:table-cell>
          <table:table-cell table:style-name="ce81" table:formula="of:=[$Build.C31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([$Build.$A$37:.$C$51];3;-1);[.E28];1); &quot;&quot;)" office:value-type="string" office:string-value="Prodigious Leap" calcext:value-type="string">
            <text:p>Prodigious Leap</text:p>
          </table:table-cell>
          <table:table-cell table:style-name="ce216" table:formula="of:=IFERROR(IFNA(INDEX(COM.MICROSOFT.FILTER([$'Utility Abilities By Art'.$D$2:.$D$70];['Utility Abilities By Art'.$B$2:.$B$70]=[.F28]);1);&quot;&quot;);&quot;&quot;)" office:value-type="string" office:string-value="Circumstance: You make an Athletics Gambit to achieve a difficult jump, up to &#10;twice as far as a typical person could reliably achieve&#10;Effort Cost: 1&#10;Effect: You automatically succeed" calcext:value-type="string" table:number-columns-spanned="4" table:number-rows-spanned="5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7:.$B$51];[Build.$C$37:.$C$51]=&quot;Reactive&quot;); [.A28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7:.$B$51];[Build.$C$37:.$C$51]=&quot;Reactive&quot;); [.A2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Athletics" calcext:value-type="string">
            <text:p>Athletics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Reactive&quot;);[.A30]);&quot;&quot;);&quot;&quot;)">
            <text:p/>
          </table:table-cell>
          <table:table-cell table:formula="of:=IFERROR(IFNA(INDEX(COM.MICROSOFT.FILTER([Build.$B$37:.$B$51];[Build.$C$37:.$C$51]=&quot;Reactive&quot;); [.A30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Reactive&quot;);[.A31]);&quot;&quot;);&quot;&quot;)">
            <text:p/>
          </table:table-cell>
          <table:table-cell table:formula="of:=IFERROR(IFNA(INDEX(COM.MICROSOFT.FILTER([Build.$B$37:.$B$51];[Build.$C$37:.$C$51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Reactive&quot;);[.A32]);&quot;&quot;);&quot;&quot;)">
            <text:p/>
          </table:table-cell>
          <table:table-cell table:formula="of:=IFERROR(IFNA(INDEX(COM.MICROSOFT.FILTER([Build.$B$37:.$B$51];[Build.$C$37:.$C$51]=&quot;Reactive&quot;); [.A32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([$Build.$A$37:.$C$51];3;-1);[.E33];1); &quot;&quot;)" office:value-type="string" office:string-value="Clairvoyant Synethsesia" calcext:value-type="string">
            <text:p>Clairvoyant Synethsesia</text:p>
          </table:table-cell>
          <table:table-cell table:style-name="ce216" table:formula="of:=IFERROR(IFNA(INDEX(COM.MICROSOFT.FILTER([$'Utility Abilities By Art'.$D$2:.$D$70];['Utility Abilities By Art'.$B$2:.$B$70]=[.F33]);1);&quot;&quot;);&quot;&quot;)" office:value-type="string" office:string-value="Circumstance: You attempt a gambit to see, hear, or smell something in a nearby&#10;location&#10;Effort Cost: 1 Effect: If the Gambit succeeds, you obtain information from all of&#10;your senses as though you were up close" calcext:value-type="string" table:number-columns-spanned="4" table:number-rows-spanned="5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Reactive&quot;);[.A33]);&quot;&quot;);&quot;&quot;)">
            <text:p/>
          </table:table-cell>
          <table:table-cell table:formula="of:=IFERROR(IFNA(INDEX(COM.MICROSOFT.FILTER([Build.$B$37:.$B$51];[Build.$C$37:.$C$51]=&quot;Reactive&quot;); [.A3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Reactive&quot;);[.A34]);&quot;&quot;);&quot;&quot;)">
            <text:p/>
          </table:table-cell>
          <table:table-cell table:formula="of:=IFERROR(IFNA(INDEX(COM.MICROSOFT.FILTER([Build.$B$37:.$B$51];[Build.$C$37:.$C$51]=&quot;Reactive&quot;); [.A3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Reconnaissance" calcext:value-type="string">
            <text:p>Reconnaissanc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Reactive&quot;);[.A35]);&quot;&quot;);&quot;&quot;)">
            <text:p/>
          </table:table-cell>
          <table:table-cell table:formula="of:=IFERROR(IFNA(INDEX(COM.MICROSOFT.FILTER([Build.$B$37:.$B$51];[Build.$C$37:.$C$51]=&quot;Reactive&quot;); [.A35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ERROR(IFNA(INDEX(COM.MICROSOFT.FILTER([Build.$A$37:.$A$51]; [Build.$C$37:.$C$51]=&quot;Reactive&quot;);[.A36]);&quot;&quot;);&quot;&quot;)">
            <text:p/>
          </table:table-cell>
          <table:table-cell table:formula="of:=IFERROR(IFNA(INDEX(COM.MICROSOFT.FILTER([Build.$B$37:.$B$51];[Build.$C$37:.$C$51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ERROR(IFNA(INDEX(COM.MICROSOFT.FILTER([Build.$A$37:.$A$51]; [Build.$C$37:.$C$51]=&quot;Reactive&quot;);[.A37]);&quot;&quot;);&quot;&quot;)">
            <text:p/>
          </table:table-cell>
          <table:table-cell table:formula="of:=IFERROR(IFNA(INDEX(COM.MICROSOFT.FILTER([Build.$B$37:.$B$51];[Build.$C$37:.$C$51]=&quot;Reactive&quot;); [.A37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([$Build.$A$37:.$C$51];3;-1);[.E38];1); &quot;&quot;)" office:value-type="string" office:string-value="I Am No One" calcext:value-type="string">
            <text:p>I Am No One</text:p>
          </table:table-cell>
          <table:table-cell table:style-name="ce216" table:formula="of:=IFERROR(IFNA(INDEX(COM.MICROSOFT.FILTER([$'Utility Abilities By Art'.$D$2:.$D$70];['Utility Abilities By Art'.$B$2:.$B$70]=[.F38]);1);&quot;&quot;);&quot;&quot;)" office:value-type="string" office:string-value="Effect: You have +1 Boon on Stealth Gambits you make in any scene where&#10;the party is outnumbered by nonhostile NPCs" calcext:value-type="string" table:number-columns-spanned="4" table:number-rows-spanned="5">
            <text:p>Effect: You have +1 Boon on Stealth Gambits you make in any scene where</text:p>
            <text:p>the party is outnumbered by nonhostile NPCs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Reactive&quot;);[.A38]);&quot;&quot;);&quot;&quot;)">
            <text:p/>
          </table:table-cell>
          <table:table-cell table:formula="of:=IFERROR(IFNA(INDEX(COM.MICROSOFT.FILTER([Build.$B$37:.$B$51];[Build.$C$37:.$C$51]=&quot;Reactive&quot;); [.A3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formula="of:=IFERROR(IFNA(COM.MICROSOFT.FILTER(['Utility Abilities By Art'.$A$2:.$A$70]; ['Utility Abilities By Art'.$B$2:.$B$70]=[.F38]);&quot;&quot;);&quot;&quot;)" office:value-type="string" office:string-value="Stealth" calcext:value-type="string">
            <text:p>Stealth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98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7:.$B$51];[Build.$C$37:.$C$51]=&quot;Proactive&quot;); [.A41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7:.$B$51];[Build.$C$37:.$C$51]=&quot;Proactive&quot;); [.A42]);&quot;&quot;);&quot;&quot;)" office:value-type="string" office:string-value="Basic" calcext:value-type="string">
            <text:p>Basic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([$Build.$A$37:.$C$51];3;-1);[.E43];1); &quot;&quot;)" office:value-type="string" office:string-value="Eagle-Eye" calcext:value-type="string">
            <text:p>Eagle-Eye</text:p>
          </table:table-cell>
          <table:table-cell table:style-name="ce216" table:formula="of:=IFERROR(IFNA(INDEX(COM.MICROSOFT.FILTER([$'Utility Abilities By Art'.$D$2:.$D$70];['Utility Abilities By Art'.$B$2:.$B$70]=[.F43]);1);&quot;&quot;);&quot;&quot;)" office:value-type="string" office:string-value="Effect: Whenever you are outdoors and you make a Reconnassaince Gambit&#10;to observe something in the distance, choose one of the following:&#10;* The Opposition is treated as if you were half the distance away&#10;* It becomes Powerful " calcext:value-type="string" table:number-columns-spanned="4" table:number-rows-spanned="5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Proactive&quot;);[.A43]);&quot;&quot;);&quot;&quot;)" office:value-type="string" office:string-value="Prodigious Leap" calcext:value-type="string">
            <text:p>Prodigious Leap</text:p>
          </table:table-cell>
          <table:table-cell table:formula="of:=IFERROR(IFNA(INDEX(COM.MICROSOFT.FILTER([Build.$B$37:.$B$51];[Build.$C$37:.$C$51]=&quot;Proactive&quot;); [.A43]);&quot;&quot;);&quot;&quot;)" office:value-type="string" office:string-value="Athletics" calcext:value-type="string">
            <text:p>Athletics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Proactive&quot;);[.A44]);&quot;&quot;);&quot;&quot;)" office:value-type="string" office:string-value="Clairvoyant Synethsesia" calcext:value-type="string">
            <text:p>Clairvoyant Synethsesia</text:p>
          </table:table-cell>
          <table:table-cell table:formula="of:=IFERROR(IFNA(INDEX(COM.MICROSOFT.FILTER([Build.$B$37:.$B$51];[Build.$C$37:.$C$51]=&quot;Proactive&quot;); [.A44]);&quot;&quot;);&quot;&quot;)" office:value-type="string" office:string-value="Reconnaissance" calcext:value-type="string">
            <text:p>Reconnaissance</text:p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 office:value-type="string" office:string-value="Reconnaissance" calcext:value-type="string">
            <text:p>Reconnaissanc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Proactive&quot;);[.A45]);&quot;&quot;);&quot;&quot;)">
            <text:p/>
          </table:table-cell>
          <table:table-cell table:formula="of:=IFERROR(IFNA(INDEX(COM.MICROSOFT.FILTER([Build.$B$37:.$B$51];[Build.$C$37:.$C$51]=&quot;Proactive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Proactive&quot;);[.A46]);&quot;&quot;);&quot;&quot;)">
            <text:p/>
          </table:table-cell>
          <table:table-cell table:formula="of:=IFERROR(IFNA(INDEX(COM.MICROSOFT.FILTER([Build.$B$37:.$B$51];[Build.$C$37:.$C$51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Proactive&quot;);[.A47]);&quot;&quot;);&quot;&quot;)">
            <text:p/>
          </table:table-cell>
          <table:table-cell table:formula="of:=IFERROR(IFNA(INDEX(COM.MICROSOFT.FILTER([Build.$B$37:.$B$51];[Build.$C$37:.$C$51]=&quot;Proactive&quot;); [.A47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([$Build.$A$37:.$C$51];3;-1);[.E48];1); &quot;&quot;)" office:value-type="string" office:string-value="Practice" calcext:value-type="string">
            <text:p>Practice</text:p>
          </table:table-cell>
          <table:table-cell table:style-name="ce216" table:formula="of:=IFERROR(IFNA(INDEX(COM.MICROSOFT.FILTER([$'Utility Abilities By Art'.$D$2:.$D$70];['Utility Abilities By Art'.$B$2:.$B$70]=[.F4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Proactive&quot;);[.A48]);&quot;&quot;);&quot;&quot;)">
            <text:p/>
          </table:table-cell>
          <table:table-cell table:formula="of:=IFERROR(IFNA(INDEX(COM.MICROSOFT.FILTER([Build.$B$37:.$B$51];[Build.$C$37:.$C$51]=&quot;Proactive&quot;); [.A4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ERROR(IFNA(INDEX(COM.MICROSOFT.FILTER([Build.$A$37:.$A$51]; [Build.$C$37:.$C$51]=&quot;Proactive&quot;);[.A49]);&quot;&quot;);&quot;&quot;)">
            <text:p/>
          </table:table-cell>
          <table:table-cell table:formula="of:=IFERROR(IFNA(INDEX(COM.MICROSOFT.FILTER([Build.$B$37:.$B$51];[Build.$C$37:.$C$51]=&quot;Proactive&quot;); [.A4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ERROR(IFNA(INDEX(COM.MICROSOFT.FILTER([Build.$A$37:.$A$51]; [Build.$C$37:.$C$51]=&quot;Proactive&quot;);[.A50]);&quot;&quot;);&quot;&quot;)">
            <text:p/>
          </table:table-cell>
          <table:table-cell table:formula="of:=IFERROR(IFNA(INDEX(COM.MICROSOFT.FILTER([Build.$B$37:.$B$51];[Build.$C$37:.$C$51]=&quot;Proactive&quot;); [.A5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Proactive&quot;);[.A51]);&quot;&quot;);&quot;&quot;)">
            <text:p/>
          </table:table-cell>
          <table:table-cell table:formula="of:=IFERROR(IFNA(INDEX(COM.MICROSOFT.FILTER([Build.$B$37:.$B$51];[Build.$C$37:.$C$51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([$Build.$A$37:.$C$51];3;-1);[.E53];1); &quot;&quot;)" office:value-type="string" office:string-value="Meditate" calcext:value-type="string">
            <text:p>Meditate</text:p>
          </table:table-cell>
          <table:table-cell table:style-name="ce216" table:formula="of:=IFERROR(IFNA(INDEX(COM.MICROSOFT.FILTER([$'Utility Abilities By Art'.$D$2:.$D$70];['Utility Abilities By Art'.$B$2:.$B$70]=[.F5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Passive&quot;);[.A54]);&quot;&quot;);&quot;&quot;)" office:value-type="string" office:string-value="I Am No One" calcext:value-type="string">
            <text:p>I Am No One</text:p>
          </table:table-cell>
          <table:table-cell table:formula="of:=IFERROR(IFNA(INDEX(COM.MICROSOFT.FILTER([Build.$B$37:.$B$51];[Build.$C$37:.$C$51]=&quot;Passive&quot;); [.A54]);&quot;&quot;);&quot;&quot;)" office:value-type="string" office:string-value="Stealth" calcext:value-type="string">
            <text:p>Stealth</text:p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Passive&quot;);[.A55]);&quot;&quot;);&quot;&quot;)" office:value-type="string" office:string-value="Eagle-Eye" calcext:value-type="string">
            <text:p>Eagle-Eye</text:p>
          </table:table-cell>
          <table:table-cell table:formula="of:=IFERROR(IFNA(INDEX(COM.MICROSOFT.FILTER([Build.$B$37:.$B$51];[Build.$C$37:.$C$51]=&quot;Passive&quot;); [.A55]);&quot;&quot;);&quot;&quot;)" office:value-type="string" office:string-value="Reconnaissance" calcext:value-type="string">
            <text:p>Reconnaissance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Passive&quot;);[.A56]);&quot;&quot;);&quot;&quot;)">
            <text:p/>
          </table:table-cell>
          <table:table-cell table:formula="of:=IFERROR(IFNA(INDEX(COM.MICROSOFT.FILTER([Build.$B$37:.$B$51];[Build.$C$37:.$C$51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Passive&quot;);[.A57]);&quot;&quot;);&quot;&quot;)">
            <text:p/>
          </table:table-cell>
          <table:table-cell table:formula="of:=IFERROR(IFNA(INDEX(COM.MICROSOFT.FILTER([Build.$B$37:.$B$51];[Build.$C$37:.$C$51]=&quot;Passive&quot;); [.A57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([$Build.$A$37:.$C$51];3;-1);[.E58];1); &quot;&quot;)">
            <text:p/>
          </table:table-cell>
          <table:table-cell table:style-name="ce216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Passive&quot;);[.A58]);&quot;&quot;);&quot;&quot;)">
            <text:p/>
          </table:table-cell>
          <table:table-cell table:formula="of:=IFERROR(IFNA(INDEX(COM.MICROSOFT.FILTER([Build.$B$37:.$B$51];[Build.$C$37:.$C$51]=&quot;Passive&quot;); [.A5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Passive&quot;);[.A59]);&quot;&quot;);&quot;&quot;)">
            <text:p/>
          </table:table-cell>
          <table:table-cell table:formula="of:=IFERROR(IFNA(INDEX(COM.MICROSOFT.FILTER([Build.$B$37:.$B$51];[Build.$C$37:.$C$51]=&quot;Passive&quot;); [.A5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Passive&quot;);[.A60]);&quot;&quot;);&quot;&quot;)">
            <text:p/>
          </table:table-cell>
          <table:table-cell table:formula="of:=IFERROR(IFNA(INDEX(COM.MICROSOFT.FILTER([Build.$B$37:.$B$51];[Build.$C$37:.$C$51]=&quot;Passiv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Passive&quot;);[.A61]);&quot;&quot;);&quot;&quot;)">
            <text:p/>
          </table:table-cell>
          <table:table-cell table:formula="of:=IFERROR(IFNA(INDEX(COM.MICROSOFT.FILTER([Build.$B$37:.$B$51];[Build.$C$37:.$C$51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Passive&quot;);[.A62]);&quot;&quot;);&quot;&quot;)">
            <text:p/>
          </table:table-cell>
          <table:table-cell table:formula="of:=IFERROR(IFNA(INDEX(COM.MICROSOFT.FILTER([Build.$B$37:.$B$51];[Build.$C$37:.$C$51]=&quot;Passive&quot;); [.A62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([$Build.$A$37:.$C$51];3;-1);[.E63];1); &quot;&quot;)">
            <text:p/>
          </table:table-cell>
          <table:table-cell table:style-name="ce216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7:.$B$51];[Build.$C$37:.$C$51]=&quot;Downtime&quot;); [.A65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7:.$B$51];[Build.$C$37:.$C$51]=&quot;Downtime&quot;); [.A66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Downtime&quot;);[.A67]);&quot;&quot;);&quot;&quot;)">
            <text:p/>
          </table:table-cell>
          <table:table-cell table:formula="of:=IFERROR(IFNA(INDEX(COM.MICROSOFT.FILTER([Build.$B$37:.$B$51];[Build.$C$37:.$C$51]=&quot;Downtime&quot;); [.A67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([$Build.$A$37:.$C$51];3;-1);[.E68];1); &quot;&quot;)">
            <text:p/>
          </table:table-cell>
          <table:table-cell table:style-name="ce216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Downtime&quot;);[.A68]);&quot;&quot;);&quot;&quot;)">
            <text:p/>
          </table:table-cell>
          <table:table-cell table:formula="of:=IFERROR(IFNA(INDEX(COM.MICROSOFT.FILTER([Build.$B$37:.$B$51];[Build.$C$37:.$C$51]=&quot;Downtime&quot;); [.A6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Downtime&quot;);[.A69]);&quot;&quot;);&quot;&quot;)">
            <text:p/>
          </table:table-cell>
          <table:table-cell table:formula="of:=IFERROR(IFNA(INDEX(COM.MICROSOFT.FILTER([Build.$B$37:.$B$51];[Build.$C$37:.$C$51]=&quot;Downtime&quot;); [.A6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Downtime&quot;);[.A70]);&quot;&quot;);&quot;&quot;)">
            <text:p/>
          </table:table-cell>
          <table:table-cell table:formula="of:=IFERROR(IFNA(INDEX(COM.MICROSOFT.FILTER([Build.$B$37:.$B$51];[Build.$C$37:.$C$51]=&quot;Downtim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Downtime&quot;);[.A71]);&quot;&quot;);&quot;&quot;)">
            <text:p/>
          </table:table-cell>
          <table:table-cell table:formula="of:=IFERROR(IFNA(INDEX(COM.MICROSOFT.FILTER([Build.$B$37:.$B$51];[Build.$C$37:.$C$51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Downtime&quot;);[.A72]);&quot;&quot;);&quot;&quot;)">
            <text:p/>
          </table:table-cell>
          <table:table-cell table:formula="of:=IFERROR(IFNA(INDEX(COM.MICROSOFT.FILTER([Build.$B$37:.$B$51];[Build.$C$37:.$C$51]=&quot;Downtime&quot;); [.A72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([$Build.$A$37:.$C$51];3;-1);[.E73];1); &quot;&quot;)">
            <text:p/>
          </table:table-cell>
          <table:table-cell table:style-name="ce216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ERROR(IFNA(INDEX(COM.MICROSOFT.FILTER([Build.$A$37:.$A$51]; [Build.$C$37:.$C$51]=&quot;Downtime&quot;);[.A73]);&quot;&quot;);&quot;&quot;)">
            <text:p/>
          </table:table-cell>
          <table:table-cell table:formula="of:=IFERROR(IFNA(INDEX(COM.MICROSOFT.FILTER([Build.$B$37:.$B$51];[Build.$C$37:.$C$51]=&quot;Downtime&quot;); [.A7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ERROR(IFNA(INDEX(COM.MICROSOFT.FILTER([Build.$A$37:.$A$51]; [Build.$C$37:.$C$51]=&quot;Downtime&quot;);[.A74]);&quot;&quot;);&quot;&quot;)">
            <text:p/>
          </table:table-cell>
          <table:table-cell table:formula="of:=IFERROR(IFNA(INDEX(COM.MICROSOFT.FILTER([Build.$B$37:.$B$51];[Build.$C$37:.$C$51]=&quot;Downtime&quot;); [.A7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Downtime&quot;);[.A75]);&quot;&quot;);&quot;&quot;)">
            <text:p/>
          </table:table-cell>
          <table:table-cell table:formula="of:=IFERROR(IFNA(INDEX(COM.MICROSOFT.FILTER([Build.$B$37:.$B$51];[Build.$C$37:.$C$51]=&quot;Downtim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([$Build.$A$37:.$C$51];3;-1);[.E78];1); &quot;&quot;)">
            <text:p/>
          </table:table-cell>
          <table:table-cell table:style-name="ce216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office:forms form:automatic-focus="false" form:apply-design-mode="false"/>
        <table:table-column table:style-name="co24" table:visibility="collapse" table:default-cell-style-name="Default"/>
        <table:table-column table:style-name="co25" table:default-cell-style-name="ce193"/>
        <table:table-column table:style-name="co26" table:default-cell-style-name="ce193"/>
        <table:table-column table:style-name="co27" table:default-cell-style-name="ce2"/>
        <table:table-column table:style-name="co27" table:default-cell-style-name="ce316"/>
        <table:table-column table:style-name="co28" table:default-cell-style-name="ce319"/>
        <table:table-column table:style-name="co29" table:default-cell-style-name="ce252"/>
        <table:table-column table:style-name="co30" table:default-cell-style-name="ce252"/>
        <table:table-column table:style-name="co31" table:default-cell-style-name="ce252"/>
        <table:table-column table:style-name="co32" table:default-cell-style-name="ce252"/>
        <table:table-column table:style-name="co33" table:default-cell-style-name="ce258"/>
        <table:table-column table:style-name="co24" table:default-cell-style-name="ce2"/>
        <table:table-column table:style-name="co9" table:default-cell-style-name="ce2"/>
        <table:table-column table:style-name="co34" table:default-cell-style-name="ce2"/>
        <table:table-column table:style-name="co35" table:default-cell-style-name="ce2"/>
        <table:table-column table:style-name="co9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268" table:formula="of:=[$Build.B1]" office:value-type="string" office:string-value="Cornelius Macguffin" calcext:value-type="string" table:number-columns-spanned="5" table:number-rows-spanned="1">
            <text:p>Cornelius Macguffin</text:p>
          </table:table-cell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2"/>
          <table:table-cell table:style-name="Default"/>
          <table:table-cell table:style-name="ce205" office:value-type="string" calcext:value-type="string">
            <text:p>Wounds</text:p>
          </table:table-cell>
          <table:table-cell table:number-columns-repeated="5"/>
        </table:table-row>
        <table:table-row table:style-name="ro4">
          <table:table-cell/>
          <table:table-cell table:style-name="ce2" table:number-columns-repeated="2"/>
          <table:table-cell/>
          <table:table-cell table:style-name="ce115"/>
          <table:table-cell table:style-name="ce2" table:number-columns-repeated="4"/>
          <table:table-cell table:style-name="Default"/>
          <table:table-cell table:style-name="ce256" table:content-validation-name="val4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Default"/>
          <table:table-cell table:style-name="ce205" office:value-type="string" calcext:value-type="string">
            <text:p>Active Stance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Default"/>
          <table:table-cell table:style-name="ce256" table:content-validation-name="val8"/>
          <table:table-cell table:number-columns-repeated="5"/>
        </table:table-row>
        <table:table-row table:style-name="ro4">
          <table:table-cell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180"/>
          <table:table-cell/>
          <table:table-cell table:style-name="ce98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Default"/>
          <table:table-cell table:style-name="ce205" office:value-type="string" calcext:value-type="string">
            <text:p>Active Buff</text:p>
          </table:table-cell>
          <table:table-cell table:number-columns-repeated="5"/>
        </table:table-row>
        <table:table-row table:style-name="ro6">
          <table:table-cell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ce98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Default"/>
          <table:table-cell table:style-name="ce256" table:content-validation-name="val4"/>
          <table:table-cell table:number-columns-repeated="5"/>
        </table:table-row>
        <table:table-row table:style-name="ro4">
          <table:table-cell/>
          <table:table-cell table:style-name="ce4" table:formula="of:=[$Build.A6]" office:value-type="string" office:string-value="Power (POW)" calcext:value-type="string">
            <text:p>Power (POW)</text:p>
          </table:table-cell>
          <table:table-cell table:style-name="ce230" table:formula="of:=[$Build.C6]" office:value-type="float" office:value="2" calcext:value-type="float">
            <text:p>+2</text:p>
          </table:table-cell>
          <table:table-cell/>
          <table:table-cell table:style-name="ce98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322" table:formula="of:=[.G8]-[.G6]" office:value-type="float" office:value="3" calcext:value-type="float">
            <text:p>3</text:p>
          </table:table-cell>
          <table:table-cell table:style-name="ce324" table:formula="of:=[.H8]-[.H6]" office:value-type="float" office:value="2" calcext:value-type="float">
            <text:p>2</text:p>
          </table:table-cell>
          <table:table-cell table:style-name="ce2"/>
          <table:table-cell table:style-name="Default"/>
          <table:table-cell table:style-name="ce205" office:value-type="string" calcext:value-type="string">
            <text:p>Active Terrain Effect</text:p>
          </table:table-cell>
          <table:table-cell table:number-columns-repeated="5"/>
        </table:table-row>
        <table:table-row table:style-name="ro4">
          <table:table-cell/>
          <table:table-cell table:style-name="ce4" table:formula="of:=[$Build.A7]" office:value-type="string" office:string-value="Endurance (END)" calcext:value-type="string">
            <text:p>Endurance (END)</text:p>
          </table:table-cell>
          <table:table-cell table:style-name="ce230" table:formula="of:=[$Build.C7]" office:value-type="float" office:value="0" calcext:value-type="float">
            <text:p/>
          </table:table-cell>
          <table:table-cell/>
          <table:table-cell table:style-name="ce98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4" table:formula="of:=[$Build.F7]" office:value-type="float" office:value="3" calcext:value-type="float">
            <text:p>3</text:p>
          </table:table-cell>
          <table:table-cell table:style-name="ce6" table:formula="of:=[$Build.F11]" office:value-type="float" office:value="2" calcext:value-type="float">
            <text:p>2</text:p>
          </table:table-cell>
          <table:table-cell table:style-name="ce2"/>
          <table:table-cell table:style-name="Default"/>
          <table:table-cell table:style-name="ce256" table:content-validation-name="val4"/>
          <table:table-cell table:number-columns-repeated="5"/>
        </table:table-row>
        <table:table-row table:style-name="ro4">
          <table:table-cell/>
          <table:table-cell table:style-name="ce5" table:formula="of:=[$Build.A8]" office:value-type="string" office:string-value="Finesse (FIN)" calcext:value-type="string">
            <text:p>Finesse (FIN)</text:p>
          </table:table-cell>
          <table:table-cell table:style-name="ce231" table:formula="of:=[$Build.C8]" office:value-type="float" office:value="0" calcext:value-type="float">
            <text:p/>
          </table:table-cell>
          <table:table-cell/>
          <table:table-cell table:style-name="Default" table:number-columns-repeated="6"/>
          <table:table-cell table:style-name="ce2"/>
          <table:table-cell table:number-columns-repeated="5"/>
        </table:table-row>
        <table:table-row table:style-name="ro11">
          <table:table-cell/>
          <table:table-cell table:style-name="ce5" table:formula="of:=[$Build.A9]" office:value-type="string" office:string-value="Reflex (REF)" calcext:value-type="string">
            <text:p>Reflex (REF)</text:p>
          </table:table-cell>
          <table:table-cell table:style-name="ce231" table:formula="of:=[$Build.C9]" office:value-type="float" office:value="2" calcext:value-type="float">
            <text:p>+2</text:p>
          </table:table-cell>
          <table:table-cell/>
          <table:table-cell table:style-name="Default"/>
          <table:table-cell table:style-name="ce80" office:value-type="string" calcext:value-type="string" table:number-columns-spanned="5" table:number-rows-spanned="1">
            <text:p>ARCHETYPE TRAITS</text:p>
          </table:table-cell>
          <table:covered-table-cell table:style-name="ce72"/>
          <table:covered-table-cell table:style-name="ce2"/>
          <table:covered-table-cell table:number-columns-repeated="2" table:style-name="Default"/>
          <table:table-cell table:style-name="ce2"/>
          <table:table-cell table:number-columns-repeated="5"/>
        </table:table-row>
        <table:table-row table:style-name="ro11">
          <table:table-cell/>
          <table:table-cell table:style-name="ce6" table:formula="of:=[$Build.A10]" office:value-type="string" office:string-value="Reasoning (REA)" calcext:value-type="string">
            <text:p>Reasoning (REA)</text:p>
          </table:table-cell>
          <table:table-cell table:style-name="ce232" table:formula="of:=[$Build.C10]" office:value-type="float" office:value="0" calcext:value-type="float">
            <text:p/>
          </table:table-cell>
          <table:table-cell/>
          <table:table-cell table:style-name="Default"/>
          <table:table-cell table:style-name="ce80" table:formula="of:=IFERROR(IFNA(INDEX(COM.MICROSOFT.FILTER([$Build.$E15:.$E17];NOT(ISBLANK([$Build.$F15:.$F17])));1);&quot;&quot;);&quot;&quot;)" office:value-type="string" office:string-value="The Weaver" calcext:value-type="string" table:number-columns-spanned="1" table:number-rows-spanned="2">
            <text:p>The Weaver</text:p>
          </table:table-cell>
          <table:table-cell table:style-name="ce249" table:formula="of:=IFERROR(IFNA(INDEX(COM.MICROSOFT.FILTER([$'Archetype Traits'.$D$5:.$D$7];[$'Archetype Traits'.$A$5:.$A$7]=[.F11]);1);&quot;&quot;);&quot;&quot;)" office:value-type="string" office:string-value="Ignore the first effect from terrain or an ability that would reduce your Movement on each of your turns" calcext:value-type="string" table:number-columns-spanned="4" table:number-rows-spanned="2">
            <text:p>Ignore the first effect from terrain or an ability that would reduce your Movement on each of your turns</text:p>
          </table:table-cell>
          <table:covered-table-cell table:number-columns-repeated="3" table:style-name="ce255"/>
          <table:table-cell table:style-name="ce2"/>
          <table:table-cell table:number-columns-repeated="5"/>
        </table:table-row>
        <table:table-row table:style-name="ro11">
          <table:table-cell/>
          <table:table-cell table:style-name="ce6" table:formula="of:=[$Build.A11]" office:value-type="string" office:string-value="Focus (FOC)" calcext:value-type="string">
            <text:p>Focus (FOC)</text:p>
          </table:table-cell>
          <table:table-cell table:style-name="ce232" table:formula="of:=[$Build.C11]" office:value-type="float" office:value="0" calcext:value-type="float">
            <text:p/>
          </table:table-cell>
          <table:table-cell/>
          <table:table-cell table:style-name="Default"/>
          <table:covered-table-cell table:style-name="ce80"/>
          <table:covered-table-cell table:style-name="ce250"/>
          <table:covered-table-cell table:number-columns-repeated="3" table:style-name="ce255"/>
          <table:table-cell table:style-name="ce2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table:style-name="Default"/>
          <table:table-cell table:style-name="ce80" table:formula="of:=IFERROR(IFNA(INDEX(COM.MICROSOFT.FILTER([$Build.$E17:.$E19];[$Build.$F17:.$F19]&gt;0);1);&quot;&quot;);&quot;&quot;)" table:number-columns-spanned="1" table:number-rows-spanned="2">
            <text:p/>
          </table:table-cell>
          <table:table-cell table:style-name="ce251" table:formula="of:=IFERROR(IFNA(INDEX(COM.MICROSOFT.FILTER([$'Archetype Traits'.D5:.D7];[$'Archetype Traits'.A5:.A7]=[.F13]);1);&quot;&quot;);&quot;&quot;)" table:number-columns-spanned="4" table:number-rows-spanned="2">
            <text:p/>
          </table:table-cell>
          <table:covered-table-cell table:number-columns-repeated="3" table:style-name="ce255"/>
          <table:table-cell table:style-name="ce2"/>
          <table:table-cell table:number-columns-repeated="5"/>
        </table:table-row>
        <table:table-row table:style-name="ro11">
          <table:table-cell/>
          <table:table-cell table:style-name="ce207" office:value-type="string" calcext:value-type="string">
            <text:p>SPEED</text:p>
          </table:table-cell>
          <table:table-cell table:style-name="ce233" table:formula="of:=[Build.$F$2]" office:value-type="float" office:value="4" calcext:value-type="float">
            <text:p>4</text:p>
          </table:table-cell>
          <table:table-cell/>
          <table:table-cell table:style-name="Default"/>
          <table:covered-table-cell table:style-name="ce80"/>
          <table:covered-table-cell table:style-name="ce250"/>
          <table:covered-table-cell table:number-columns-repeated="3" table:style-name="ce255"/>
          <table:table-cell table:style-name="ce2"/>
          <table:table-cell table:number-columns-repeated="5"/>
        </table:table-row>
        <table:table-row table:style-name="ro11">
          <table:table-cell/>
          <table:table-cell table:style-name="ce207" office:value-type="string" calcext:value-type="string">
            <text:p>INITIATIVE</text:p>
          </table:table-cell>
          <table:table-cell table:style-name="ce234" table:formula="of:=[$Build.$C$9]" office:value-type="float" office:value="2" calcext:value-type="float">
            <text:p>+2</text:p>
          </table:table-cell>
          <table:table-cell/>
          <table:table-cell table:style-name="ce2" table:number-columns-repeated="7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table:style-name="ce180"/>
          <table:table-cell table:style-name="ce10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style-name="ce10" office:value-type="string" calcext:value-type="string">
            <text:p>Upgrades</text:p>
          </table:table-cell>
          <table:table-cell table:number-columns-repeated="5"/>
        </table:table-row>
        <table:table-row table:style-name="ro11">
          <table:table-cell/>
          <table:table-cell table:style-name="ce80" office:value-type="string" calcext:value-type="string" table:number-columns-spanned="2" table:number-rows-spanned="1">
            <text:p>DEFENSES</text:p>
          </table:table-cell>
          <table:covered-table-cell table:style-name="ce2"/>
          <table:table-cell table:style-name="ce213"/>
          <table:table-cell office:value-type="float" office:value="1" calcext:value-type="float">
            <text:p>1</text:p>
          </table:table-cell>
          <table:table-cell table:style-name="ce317" table:formula="of:=IFNA(INDEX(COM.MICROSOFT.SORT([$Build.$E$37:.$G$55];3;-1);[.E17];1); &quot;&quot;)" office:value-type="string" office:string-value="Brace" calcext:value-type="string">
            <text:p>Brace</text:p>
          </table:table-cell>
          <table:table-cell table:style-name="ce216" table:formula="of:=IFERROR(IFNA(INDEX(COM.MICROSOFT.FILTER([$'Combat Abilities Master List'.$F$2:.$F$73];['Combat Abilities Master List'.$C$2:.$C$73]=[.F17]);1);&quot;&quot;);&quot;&quot;)" office:value-type="string" office:string-value="Effect: Gain **+1 Boon** on **Resilience** rolls  &#10;" calcext:value-type="string" table:number-columns-spanned="4" table:number-rows-spanned="7">
            <text:p>Effect: Gain **+1 Boon** on **Resilience** rolls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17]); COM.MICROSOFT.FILTER([$'Combat Abilities Master List'.G:.I]; [$'Combat Abilities Master List'.C:.C] = [.F17]); &quot;&quot;))" table:number-columns-spanned="1" table:number-rows-spanned="7">
            <text:p/>
          </table:table-cell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Resistance</text:p>
          </table:table-cell>
          <table:table-cell table:style-name="ce235" table:formula="of:=[$Build.$C$7]" office:value-type="float" office:value="0" calcext:value-type="float">
            <text:p/>
          </table:table-cell>
          <table:table-cell table:style-name="ce213"/>
          <table:table-cell/>
          <table:table-cell table:style-name="ce318" table:formula="of:=IFERROR(IFNA(COM.MICROSOFT.FILTER(['Combat Abilities By Art'.$C$2:.$C$68];['Combat Abilities By Art'.$B$2:.$B$68]=[.F17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Evasion</text:p>
          </table:table-cell>
          <table:table-cell table:style-name="ce236" table:formula="of:=[$Build.$C$9]" office:value-type="float" office:value="2" calcext:value-type="float">
            <text:p>+2</text:p>
          </table:table-cell>
          <table:table-cell table:style-name="ce213"/>
          <table:table-cell/>
          <table:table-cell table:formula="of:=IFERROR(IFNA(COM.MICROSOFT.FILTER(['Combat Abilities By Art'.$D$2:.$D$68]; ['Combat Abilities By Art'.$B$2:.$B$68]=[.F1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Resolve</text:p>
          </table:table-cell>
          <table:table-cell table:style-name="ce237" table:formula="of:=[$Build.$C$11]" office:value-type="float" office:value="0" calcext:value-type="float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F1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Incapacity Rolls</text:p>
          </table:table-cell>
          <table:table-cell table:style-name="ce235" table:formula="of:=[$Build.G7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Panic Rolls</text:p>
          </table:table-cell>
          <table:table-cell table:style-name="ce237" table:formula="of:=[$Build.G11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20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" office:value-type="string" calcext:value-type="string" table:number-columns-spanned="2" table:number-rows-spanned="1">
            <text:p>COMBAT ARTS</text:p>
          </table:table-cell>
          <table:covered-table-cell table:style-name="ce2"/>
          <table:table-cell/>
          <table:table-cell office:value-type="float" office:value="2" calcext:value-type="float">
            <text:p>2</text:p>
          </table:table-cell>
          <table:table-cell table:style-name="ce317" table:formula="of:=IFNA(INDEX(COM.MICROSOFT.SORT([$Build.$E$37:.$G$55];3;-1);[.E24];1); &quot;&quot;)" office:value-type="string" office:string-value="Dodge" calcext:value-type="string">
            <text:p>Dodge</text:p>
          </table:table-cell>
          <table:table-cell table:style-name="ce216" table:formula="of:=IFERROR(IFNA(INDEX(COM.MICROSOFT.FILTER([$'Combat Abilities Master List'.$F$2:.$F$73];['Combat Abilities Master List'.$C$2:.$C$73]=[.F24]);1);&quot;&quot;);&quot;&quot;)" office:value-type="string" office:string-value="Effect: Gain **+1 Boon** on **Evasion** rolls  &#10;" calcext:value-type="string" table:number-columns-spanned="4" table:number-rows-spanned="5">
            <text:p>Effect: Gain **+1 Boon** on **Evasion** rolls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24]); COM.MICROSOFT.FILTER([$'Combat Abilities Master List'.G:.I]; [$'Combat Abilities Master List'.C:.C] = [.F24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ART</text:p>
          </table:table-cell>
          <table:table-cell table:style-name="ce98" office:value-type="string" calcext:value-type="string">
            <text:p>MODIFIER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24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3]" office:value-type="string" office:string-value="Brawling" calcext:value-type="string">
            <text:p>Brawling</text:p>
          </table:table-cell>
          <table:table-cell table:style-name="ce238" table:formula="of:=[$Build.G23]" office:value-type="float" office:value="0" calcext:value-type="float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24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4]" office:value-type="string" office:string-value="Dueling" calcext:value-type="string">
            <text:p>Dueling</text:p>
          </table:table-cell>
          <table:table-cell table:style-name="ce238" table:formula="of:=[$Build.G24]" office:value-type="float" office:value="0" calcext:value-type="float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F24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5]" office:value-type="string" office:string-value="Infusion" calcext:value-type="string">
            <text:p>Infusion</text:p>
          </table:table-cell>
          <table:table-cell table:style-name="ce238" table:formula="of:=[$Build.G25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6]" office:value-type="string" office:string-value="Archery" calcext:value-type="string">
            <text:p>Archery</text:p>
          </table:table-cell>
          <table:table-cell table:style-name="ce238" table:formula="of:=[$Build.G26]" office:value-type="float" office:value="3" calcext:value-type="float">
            <text:p>+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17" table:formula="of:=IFNA(INDEX(COM.MICROSOFT.SORT([$Build.$E$37:.$G$55];3;-1);[.E29];1); &quot;&quot;)" office:value-type="string" office:string-value="Concentrate" calcext:value-type="string">
            <text:p>Concentrate</text:p>
          </table:table-cell>
          <table:table-cell table:style-name="ce216" table:formula="of:=IFERROR(IFNA(INDEX(COM.MICROSOFT.FILTER([$'Combat Abilities Master List'.$F$2:.$F$73];['Combat Abilities Master List'.$C$2:.$C$73]=[.F29]);1);&quot;&quot;);&quot;&quot;)" office:value-type="string" office:string-value="Effect: Gain **+1 Boon** on **Resolve** rolls  &#10;" calcext:value-type="string" table:number-columns-spanned="4" table:number-rows-spanned="5">
            <text:p>Effect: Gain **+1 Boon** on **Resolve** rolls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29]); COM.MICROSOFT.FILTER([$'Combat Abilities Master List'.G:.I]; [$'Combat Abilities Master List'.C:.C] = [.F29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157" table:formula="of:=[$Build.E27]" office:value-type="string" office:string-value="Ninjutsu" calcext:value-type="string">
            <text:p>Ninjutsu</text:p>
          </table:table-cell>
          <table:table-cell table:style-name="ce238" table:formula="of:=[$Build.G27]" office:value-type="float" office:value="1" calcext:value-type="float">
            <text:p>+1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29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8]" office:value-type="string" office:string-value="Kineticism" calcext:value-type="string">
            <text:p>Kineticism</text:p>
          </table:table-cell>
          <table:table-cell table:style-name="ce238" table:formula="of:=[$Build.G28]" office:value-type="float" office:value="0" calcext:value-type="float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29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9]" office:value-type="string" office:string-value="Animism" calcext:value-type="string">
            <text:p>Animism</text:p>
          </table:table-cell>
          <table:table-cell table:style-name="ce238" table:formula="of:=[$Build.G29]" office:value-type="float" office:value="0" calcext:value-type="float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F29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30]" office:value-type="string" office:string-value="Mesmerism" calcext:value-type="string">
            <text:p>Mesmerism</text:p>
          </table:table-cell>
          <table:table-cell table:style-name="ce238" table:formula="of:=[$Build.G30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31]" office:value-type="string" office:string-value="Elementalism" calcext:value-type="string">
            <text:p>Elementalism</text:p>
          </table:table-cell>
          <table:table-cell table:style-name="ce238" table:formula="of:=[$Build.G31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317" table:formula="of:=IFNA(INDEX(COM.MICROSOFT.SORT([$Build.$E$37:.$G$55];3;-1);[.E34];1); &quot;&quot;)" office:value-type="string" office:string-value="Assist" calcext:value-type="string">
            <text:p>Assist</text:p>
          </table:table-cell>
          <table:table-cell table:style-name="ce216" table:formula="of:=IFERROR(IFNA(INDEX(COM.MICROSOFT.FILTER([$'Combat Abilities Master List'.$F$2:.$F$73];['Combat Abilities Master List'.$C$2:.$C$73]=[.F34]);1);&quot;&quot;);&quot;&quot;)" office:value-type="string" office:string-value="Range: 1&#10;Trigger: An Ally targets an Enemy within range&#10;Effect: You may impose **+1 Bane** on the Enemy's defensive roll.&#10;If you do, end this stance.  &#10;" calcext:value-type="string" table:number-columns-spanned="4" table:number-rows-spanned="5">
            <text:p>Range: 1</text:p>
            <text:p>Trigger: An Ally targets an Enemy within range</text:p>
            <text:p>Effect: You may impose **+1 Bane** on the Enemy's defensive roll.</text:p>
            <text:p>If you do, end this stance.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34]); COM.MICROSOFT.FILTER([$'Combat Abilities Master List'.G:.I]; [$'Combat Abilities Master List'.C:.C] = [.F34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C$2:.$C$68];['Combat Abilities By Art'.$B$2:.$B$68]=[.F34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172"/>
          <table:table-cell table:style-name="ce10" office:value-type="string" calcext:value-type="string" table:number-columns-spanned="2" table:number-rows-spanned="1">
            <text:p>ACTIONS</text:p>
          </table:table-cell>
          <table:covered-table-cell table:style-name="ce191"/>
          <table:table-cell table:number-columns-repeated="2"/>
          <table:table-cell table:formula="of:=IFERROR(IFNA(COM.MICROSOFT.FILTER(['Combat Abilities By Art'.$D$2:.$D$68]; ['Combat Abilities By Art'.$B$2:.$B$68]=[.F34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Default"/>
          <table:table-cell/>
          <table:table-cell table:formula="of:=IFERROR(IFNA(COM.MICROSOFT.FILTER(['Combat Abilities By Art'.$A$2:.$A$68]; ['Combat Abilities By Art'.$B$2:.$B$68]=[.F34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7:.$E$55]; [Build.$G$37:.$G$55]=&quot;Action&quot;);[.A37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7:.$F$55];[Build.$G$37:.$G$55]=&quot;Action&quot;); [.A37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7:.$E$55]; [Build.$G$37:.$G$55]=&quot;Action&quot;);[.A38]);&quot;&quot;);&quot;&quot;)" office:value-type="string" office:string-value="Dash" calcext:value-type="string">
            <text:p>Dash</text:p>
          </table:table-cell>
          <table:table-cell table:formula="of:=IFERROR(IFNA(INDEX(COM.MICROSOFT.FILTER([Build.$F$37:.$F$55];[Build.$G$37:.$G$55]=&quot;Action&quot;); [.A38]);&quot;&quot;);&quot;&quot;)" office:value-type="string" office:string-value="Basic" calcext:value-type="string">
            <text:p>Basic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7" table:formula="of:=IFNA(INDEX(COM.MICROSOFT.SORT([$Build.$E$37:.$G$55];3;-1);[.E39];1); &quot;&quot;)" office:value-type="string" office:string-value="Protect" calcext:value-type="string">
            <text:p>Protect</text:p>
          </table:table-cell>
          <table:table-cell table:style-name="ce216" table:formula="of:=IFERROR(IFNA(INDEX(COM.MICROSOFT.FILTER([$'Combat Abilities Master List'.$F$2:.$F$73];['Combat Abilities Master List'.$C$2:.$C$73]=[.F39]);1);&quot;&quot;);&quot;&quot;)" office:value-type="string" office:string-value="Range: 1&#10;Trigger: An Ally within range is targeted by an enemy&#10;Effect: You may grant the Ally +1 Boon on their Defensive roll.&#10;If you do, end this stance.  &#10;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</text:p>
            <text:p>If you do, end this stance.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39]); COM.MICROSOFT.FILTER([$'Combat Abilities Master List'.G:.I]; [$'Combat Abilities Master List'.C:.C] = [.F39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7:.$E$55]; [Build.$G$37:.$G$55]=&quot;Action&quot;);[.A39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7:.$F$55];[Build.$G$37:.$G$55]=&quot;Action&quot;); [.A3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39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7:.$E$55]; [Build.$G$37:.$G$55]=&quot;Action&quot;);[.A40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7:.$F$55];[Build.$G$37:.$G$55]=&quot;Action&quot;); [.A40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D$2:.$D$68]; ['Combat Abilities By Art'.$B$2:.$B$68]=[.F39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7:.$E$55]; [Build.$G$37:.$G$55]=&quot;Action&quot;);[.A41]);&quot;&quot;);&quot;&quot;)" office:value-type="string" office:string-value="Piercing Shot" calcext:value-type="string">
            <text:p>Piercing Shot</text:p>
          </table:table-cell>
          <table:table-cell table:formula="of:=IFERROR(IFNA(INDEX(COM.MICROSOFT.FILTER([Build.$F$37:.$F$55];[Build.$G$37:.$G$55]=&quot;Action&quot;); [.A41]);&quot;&quot;);&quot;&quot;)" office:value-type="string" office:string-value="Archery" calcext:value-type="string">
            <text:p>Archery</text:p>
          </table:table-cell>
          <table:table-cell table:number-columns-repeated="2"/>
          <table:table-cell table:formula="of:=IFERROR(IFNA(COM.MICROSOFT.FILTER(['Combat Abilities By Art'.$A$2:.$A$68]; ['Combat Abilities By Art'.$B$2:.$B$68]=[.F39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7:.$E$55]; [Build.$G$37:.$G$55]=&quot;Action&quot;);[.A42]);&quot;&quot;);&quot;&quot;)">
            <text:p/>
          </table:table-cell>
          <table:table-cell table:formula="of:=IFERROR(IFNA(INDEX(COM.MICROSOFT.FILTER([Build.$F$37:.$F$55];[Build.$G$37:.$G$55]=&quot;Action&quot;); [.A42]);&quot;&quot;);&quot;&quot;)">
            <text:p/>
          </table:table-cell>
          <table:table-cell table:number-columns-repeated="2"/>
          <table:table-cell table:style-name="ce318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7:.$E$55]; [Build.$G$37:.$G$55]=&quot;Action&quot;);[.A43]);&quot;&quot;);&quot;&quot;)">
            <text:p/>
          </table:table-cell>
          <table:table-cell table:formula="of:=IFERROR(IFNA(INDEX(COM.MICROSOFT.FILTER([Build.$F$37:.$F$55];[Build.$G$37:.$G$55]=&quot;Action&quot;); [.A43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317" table:formula="of:=IFNA(INDEX(COM.MICROSOFT.SORT([$Build.$E$37:.$G$55];3;-1);[.E44];1); &quot;&quot;)" office:value-type="string" office:string-value="Prepared Shot" calcext:value-type="string">
            <text:p>Prepared Shot</text:p>
          </table:table-cell>
          <table:table-cell table:style-name="ce216" table:formula="of:=IFERROR(IFNA(INDEX(COM.MICROSOFT.FILTER([$'Combat Abilities Master List'.$F$2:.$F$73];['Combat Abilities Master List'.$C$2:.$C$73]=[.F44]);1);&quot;&quot;);&quot;&quot;)" office:value-type="string" office:string-value="Effect: Choose one: Gain Aura 6, or Gain Aura 4 and apply **1**$^b$ **Mark** to an enemy within 6&#10;Trigger: An enemy moves into the Aura&#10;Effect: You may make a Ranged Physical Attack against the triggering enemy,&#10;with **1**$^c$ **Boon** if the target is **Marked**. &#10;If you do, end this stance and you cannot take an action during your next turn&#10;(you can still move and take a new stance).&#10;Succeed: Deal **Fatigue** equal to 2 plus the stacks of Mark on the target.&#10;Critical: Deal an additional **1**$^a$ **Fatigue**  &#10;" calcext:value-type="string" table:number-columns-spanned="4" table:number-rows-spanned="5">
            <text:p>Effect: Choose one: Gain Aura 6, or Gain Aura 4 and apply **1**$^b$ **Mark** to an enemy within 6</text:p>
            <text:p>Trigger: An enemy moves into the Aura</text:p>
            <text:p>Effect: You may make a Ranged Physical Attack against the triggering enemy,</text:p>
            <text:p>with **1**$^c$ **Boon** if the target is **Marked**. </text:p>
            <text:p>If you do, end this stance and you cannot take an action during your next turn</text:p>
            <text:p>(you can still move and take a new stance).</text:p>
            <text:p>Succeed: Deal **Fatigue** equal to 2 plus the stacks of Mark on the target.</text:p>
            <text:p>Critical: Deal an additional **1**$^a$ **Fatigue**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44]); COM.MICROSOFT.FILTER([$'Combat Abilities Master List'.G:.I]; [$'Combat Abilities Master List'.C:.C] = [.F44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7:.$E$55]; [Build.$G$37:.$G$55]=&quot;Action&quot;);[.A44]);&quot;&quot;);&quot;&quot;)">
            <text:p/>
          </table:table-cell>
          <table:table-cell table:formula="of:=IFERROR(IFNA(INDEX(COM.MICROSOFT.FILTER([Build.$F$37:.$F$55];[Build.$G$37:.$G$55]=&quot;Action&quot;); [.A44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44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7:.$E$55]; [Build.$G$37:.$G$55]=&quot;Action&quot;);[.A45]);&quot;&quot;);&quot;&quot;)">
            <text:p/>
          </table:table-cell>
          <table:table-cell table:formula="of:=IFERROR(IFNA(INDEX(COM.MICROSOFT.FILTER([Build.$F$37:.$F$55];[Build.$G$37:.$G$55]=&quot;Action&quot;); [.A45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44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7:.$E$55]; [Build.$G$37:.$G$55]=&quot;Action&quot;);[.A46]);&quot;&quot;);&quot;&quot;)">
            <text:p/>
          </table:table-cell>
          <table:table-cell table:formula="of:=IFERROR(IFNA(INDEX(COM.MICROSOFT.FILTER([Build.$F$37:.$F$55];[Build.$G$37:.$G$55]=&quot;Action&quot;); [.A46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F44]);&quot;&quot;);&quot;&quot;)" office:value-type="string" office:string-value="Archery" calcext:value-type="string">
            <text:p>Archery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7:.$E$55]; [Build.$G$37:.$G$55]=&quot;Action&quot;);[.A47]);&quot;&quot;);&quot;&quot;)">
            <text:p/>
          </table:table-cell>
          <table:table-cell table:formula="of:=IFERROR(IFNA(INDEX(COM.MICROSOFT.FILTER([Build.$F$37:.$F$55];[Build.$G$37:.$G$55]=&quot;Action&quot;); [.A47]);&quot;&quot;);&quot;&quot;)">
            <text:p/>
          </table:table-cell>
          <table:table-cell table:number-columns-repeated="2"/>
          <table:table-cell table:style-name="ce318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7:.$E$55]; [Build.$G$37:.$G$55]=&quot;Action&quot;);[.A48]);&quot;&quot;);&quot;&quot;)">
            <text:p/>
          </table:table-cell>
          <table:table-cell table:formula="of:=IFERROR(IFNA(INDEX(COM.MICROSOFT.FILTER([Build.$F$37:.$F$55];[Build.$G$37:.$G$55]=&quot;Action&quot;); [.A48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317" table:formula="of:=IFNA(INDEX(COM.MICROSOFT.SORT([$Build.$E$37:.$G$55];3;-1);[.E49];1); &quot;&quot;)" office:value-type="string" office:string-value="Study" calcext:value-type="string">
            <text:p>Study</text:p>
          </table:table-cell>
          <table:table-cell table:style-name="ce216" table:formula="of:=IFERROR(IFNA(INDEX(COM.MICROSOFT.FILTER([$'Combat Abilities Master List'.$F$2:.$F$73];['Combat Abilities Master List'.$C$2:.$C$73]=[.F49]);1);&quot;&quot;);&quot;&quot;)" office:value-type="string" office:string-value="Range: 3&#10;Target: One enemy&#10;Effect: The target gains **+1 Mark**, you become **Hidden**, and gain **Aura** **1**$^b$&#10;Trigger: A enemy with Mark enters a square in the Aura  &#10;Effect: The triggering enemy immediately gains +**1**$^a$ **Mark**  &#10;" calcext:value-type="string" table:number-columns-spanned="4" table:number-rows-spanned="5">
            <text:p>Range: 3</text:p>
            <text:p>Target: One enemy</text:p>
            <text:p>Effect: The target gains **+1 Mark**, you become **Hidden**, and gain **Aura** **1**$^b$</text:p>
            <text:p>Trigger: A enemy with Mark enters a square in the Aura  </text:p>
            <text:p>Effect: The triggering enemy immediately gains +**1**$^a$ **Mark**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49]); COM.MICROSOFT.FILTER([$'Combat Abilities Master List'.G:.I]; [$'Combat Abilities Master List'.C:.C] = [.F49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7:.$E$55]; [Build.$G$37:.$G$55]=&quot;Action&quot;);[.A49]);&quot;&quot;);&quot;&quot;)">
            <text:p/>
          </table:table-cell>
          <table:table-cell table:formula="of:=IFERROR(IFNA(INDEX(COM.MICROSOFT.FILTER([Build.$F$37:.$F$55];[Build.$G$37:.$G$55]=&quot;Action&quot;); [.A49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49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formula="of:=IFERROR(IFNA(INDEX(COM.MICROSOFT.FILTER([Build.$E$37:.$E$55]; [Build.$G$37:.$G$55]=&quot;Action&quot;);[.A50]);&quot;&quot;);&quot;&quot;)">
            <text:p/>
          </table:table-cell>
          <table:table-cell table:formula="of:=IFERROR(IFNA(INDEX(COM.MICROSOFT.FILTER([Build.$F$37:.$F$55];[Build.$G$37:.$G$55]=&quot;Action&quot;); [.A50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49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172"/>
          <table:table-cell table:style-name="ce10" office:value-type="string" calcext:value-type="string" table:number-columns-spanned="2" table:number-rows-spanned="1">
            <text:p>STANCES</text:p>
          </table:table-cell>
          <table:covered-table-cell table:style-name="ce192"/>
          <table:table-cell table:number-columns-repeated="2"/>
          <table:table-cell table:formula="of:=IFERROR(IFNA(COM.MICROSOFT.FILTER(['Combat Abilities By Art'.$A$2:.$A$68]; ['Combat Abilities By Art'.$B$2:.$B$68]=[.F49]);&quot;&quot;);&quot;&quot;)" office:value-type="string" office:string-value="Ninjutsu" calcext:value-type="string">
            <text:p>Ninjutsu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98" office:value-type="string" calcext:value-type="string">
            <text:p>Art</text:p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7:.$E$55]; [Build.$G$37:.$G$55]=&quot;Stance&quot;);[.A53]);&quot;&quot;);&quot;&quot;)" office:value-type="string" office:string-value="Brace" calcext:value-type="string">
            <text:p>Brace</text:p>
          </table:table-cell>
          <table:table-cell table:formula="of:=IFERROR(IFNA(INDEX(COM.MICROSOFT.FILTER([Build.$F$37:.$F$55];[Build.$G$37:.$G$55]=&quot;Stance&quot;); [.A53]);&quot;&quot;);&quot;&quot;)" office:value-type="string" office:string-value="Basic" calcext:value-type="string">
            <text:p>Basic</text:p>
          </table:table-cell>
          <table:table-cell/>
          <table:table-cell office:value-type="float" office:value="8" calcext:value-type="float">
            <text:p>8</text:p>
          </table:table-cell>
          <table:table-cell table:style-name="ce317" table:formula="of:=IFNA(INDEX(COM.MICROSOFT.SORT([$Build.$E$37:.$G$55];3;-1);[.E54];1); &quot;&quot;)" office:value-type="string" office:string-value="Quiet Mind" calcext:value-type="string">
            <text:p>Quiet Mind</text:p>
          </table:table-cell>
          <table:table-cell table:style-name="ce216" table:formula="of:=IFERROR(IFNA(INDEX(COM.MICROSOFT.FILTER([$'Combat Abilities Master List'.$F$2:.$F$73];['Combat Abilities Master List'.$C$2:.$C$73]=[.F54]);1);&quot;&quot;);&quot;&quot;)" office:value-type="string" office:string-value="Trigger: You make an **Evasion** roll&#10;Effect: If you Critically Succeeded, you may remove **2**$^a$ stacks of any one status&#10;from yourself after the attack resolves. Otherwise, you may treat the outcome&#10;as one category better than the roll. In either case, end this stance.  &#10;" calcext:value-type="string" table:number-columns-spanned="4" table:number-rows-spanned="5">
            <text:p>Trigger: You make an **Evasion** roll</text:p>
            <text:p>Effect: If you Critically Succeeded, you may remove **2**$^a$ stacks of any one status</text:p>
            <text:p>from yourself after the attack resolves. Otherwise, you may treat the outcome</text:p>
            <text:p>as one category better than the roll. In either case, end this stance.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54]); COM.MICROSOFT.FILTER([$'Combat Abilities Master List'.G:.I]; [$'Combat Abilities Master List'.C:.C] = [.F54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7:.$E$55]; [Build.$G$37:.$G$55]=&quot;Stance&quot;);[.A54]);&quot;&quot;);&quot;&quot;)" office:value-type="string" office:string-value="Dodge" calcext:value-type="string">
            <text:p>Dodge</text:p>
          </table:table-cell>
          <table:table-cell table:formula="of:=IFERROR(IFNA(INDEX(COM.MICROSOFT.FILTER([Build.$F$37:.$F$55];[Build.$G$37:.$G$55]=&quot;Stance&quot;); [.A54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54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7:.$E$55]; [Build.$G$37:.$G$55]=&quot;Stance&quot;);[.A55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7:.$F$55];[Build.$G$37:.$G$55]=&quot;Stance&quot;); [.A55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D$2:.$D$68]; ['Combat Abilities By Art'.$B$2:.$B$68]=[.F54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7:.$E$55]; [Build.$G$37:.$G$55]=&quot;Stance&quot;);[.A56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7:.$F$55];[Build.$G$37:.$G$55]=&quot;Stance&quot;); [.A56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A$2:.$A$68]; ['Combat Abilities By Art'.$B$2:.$B$68]=[.F54]);&quot;&quot;);&quot;&quot;)" office:value-type="string" office:string-value="Ninjutsu" calcext:value-type="string">
            <text:p>Ninjutsu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7:.$E$55]; [Build.$G$37:.$G$55]=&quot;Stance&quot;);[.A57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7:.$F$55];[Build.$G$37:.$G$55]=&quot;Stance&quot;); [.A57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7:.$E$55]; [Build.$G$37:.$G$55]=&quot;Stance&quot;);[.A58]);&quot;&quot;);&quot;&quot;)" office:value-type="string" office:string-value="Prepared Shot" calcext:value-type="string">
            <text:p>Prepared Shot</text:p>
          </table:table-cell>
          <table:table-cell table:formula="of:=IFERROR(IFNA(INDEX(COM.MICROSOFT.FILTER([Build.$F$37:.$F$55];[Build.$G$37:.$G$55]=&quot;Stance&quot;); [.A58]);&quot;&quot;);&quot;&quot;)" office:value-type="string" office:string-value="Archery" calcext:value-type="string">
            <text:p>Archery</text:p>
          </table:table-cell>
          <table:table-cell/>
          <table:table-cell office:value-type="float" office:value="9" calcext:value-type="float">
            <text:p>9</text:p>
          </table:table-cell>
          <table:table-cell table:style-name="ce317" table:formula="of:=IFNA(INDEX(COM.MICROSOFT.SORT([$Build.$E$37:.$G$55];3;-1);[.E59];1); &quot;&quot;)" office:value-type="string" office:string-value="Basic Attack" calcext:value-type="string">
            <text:p>Basic Attack</text:p>
          </table:table-cell>
          <table:table-cell table:style-name="ce216" table:formula="of:=IFERROR(IFNA(INDEX(COM.MICROSOFT.FILTER([$'Combat Abilities Master List'.$F$2:.$F$73];['Combat Abilities Master List'.$C$2:.$C$73]=[.F59]);1);&quot;&quot;);&quot;&quot;)" office:value-type="string" office:string-value="Range: 3&#10;Target: One enemy&#10;Effect: Roll an attack using your highest Combat Art modifier  &#10;Success: Deal **2 Fatigue**  &#10;" calcext:value-type="string" table:number-columns-spanned="4" table:number-rows-spanned="5">
            <text:p>Range: 3</text:p>
            <text:p>Target: One enemy</text:p>
            <text:p>Effect: Roll an attack using your highest Combat Art modifier  </text:p>
            <text:p>Success: Deal **2 Fatigue**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59]); COM.MICROSOFT.FILTER([$'Combat Abilities Master List'.G:.I]; [$'Combat Abilities Master List'.C:.C] = [.F59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7:.$E$55]; [Build.$G$37:.$G$55]=&quot;Stance&quot;);[.A59]);&quot;&quot;);&quot;&quot;)" office:value-type="string" office:string-value="Study" calcext:value-type="string">
            <text:p>Study</text:p>
          </table:table-cell>
          <table:table-cell table:formula="of:=IFERROR(IFNA(INDEX(COM.MICROSOFT.FILTER([Build.$F$37:.$F$55];[Build.$G$37:.$G$55]=&quot;Stance&quot;); [.A59]);&quot;&quot;);&quot;&quot;)" office:value-type="string" office:string-value="Ninjutsu" calcext:value-type="string">
            <text:p>Ninjutsu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59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7:.$E$55]; [Build.$G$37:.$G$55]=&quot;Stance&quot;);[.A60]);&quot;&quot;);&quot;&quot;)" office:value-type="string" office:string-value="Quiet Mind" calcext:value-type="string">
            <text:p>Quiet Mind</text:p>
          </table:table-cell>
          <table:table-cell table:formula="of:=IFERROR(IFNA(INDEX(COM.MICROSOFT.FILTER([Build.$F$37:.$F$55];[Build.$G$37:.$G$55]=&quot;Stance&quot;); [.A60]);&quot;&quot;);&quot;&quot;)" office:value-type="string" office:string-value="Ninjutsu" calcext:value-type="string">
            <text:p>Ninjutsu</text:p>
          </table:table-cell>
          <table:table-cell table:number-columns-repeated="2"/>
          <table:table-cell table:formula="of:=IFERROR(IFNA(COM.MICROSOFT.FILTER(['Combat Abilities By Art'.$D$2:.$D$68]; ['Combat Abilities By Art'.$B$2:.$B$68]=[.F59]);&quot;&quot;);&quot;&quot;)" office:value-type="string" office:string-value="Physical Attack, Ranged" calcext:value-type="string">
            <text:p>Physical Attack, Ranged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7:.$E$55]; [Build.$G$37:.$G$55]=&quot;Stance&quot;);[.A61]);&quot;&quot;);&quot;&quot;)">
            <text:p/>
          </table:table-cell>
          <table:table-cell table:formula="of:=IFERROR(IFNA(INDEX(COM.MICROSOFT.FILTER([Build.$F$37:.$F$55];[Build.$G$37:.$G$55]=&quot;Stance&quot;); [.A61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F59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7:.$E$55]; [Build.$G$37:.$G$55]=&quot;Stance&quot;);[.A62]);&quot;&quot;);&quot;&quot;)">
            <text:p/>
          </table:table-cell>
          <table:table-cell table:formula="of:=IFERROR(IFNA(INDEX(COM.MICROSOFT.FILTER([Build.$F$37:.$F$55];[Build.$G$37:.$G$55]=&quot;Stance&quot;); [.A62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7:.$E$55]; [Build.$G$37:.$G$55]=&quot;Stance&quot;);[.A63]);&quot;&quot;);&quot;&quot;)">
            <text:p/>
          </table:table-cell>
          <table:table-cell table:formula="of:=IFERROR(IFNA(INDEX(COM.MICROSOFT.FILTER([Build.$F$37:.$F$55];[Build.$G$37:.$G$55]=&quot;Stance&quot;); [.A63]);&quot;&quot;);&quot;&quot;)"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style-name="ce317" table:formula="of:=IFNA(INDEX(COM.MICROSOFT.SORT([$Build.$E$37:.$G$55];3;-1);[.E64];1); &quot;&quot;)" office:value-type="string" office:string-value="Dash" calcext:value-type="string">
            <text:p>Dash</text:p>
          </table:table-cell>
          <table:table-cell table:style-name="ce216" table:formula="of:=IFERROR(IFNA(INDEX(COM.MICROSOFT.FILTER([$'Combat Abilities Master List'.$F$2:.$F$73];['Combat Abilities Master List'.$C$2:.$C$73]=[.F64]);1);&quot;&quot;);&quot;&quot;)" office:value-type="string" office:string-value="Effect: Move a number of spaces up to your speed  &#10;" calcext:value-type="string" table:number-columns-spanned="4" table:number-rows-spanned="5">
            <text:p>Effect: Move a number of spaces up to your speed  </text:p>
            <text:p/>
          </table:table-cell>
          <table:covered-table-cell table:number-columns-repeated="3"/>
          <table:table-cell table:style-name="ce259" table:formula="of:=COM.MICROSOFT.TEXTJOIN(CHAR(10); 1; IF(COM.MICROSOFT.FILTER([$Build.$H$37:.$J$70]; [$Build.$E$37:.$E$70] = [.$F64]); COM.MICROSOFT.FILTER([$'Combat Abilities Master List'.G:.I]; [$'Combat Abilities Master List'.C:.C] = [.F64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7:.$E$55]; [Build.$G$37:.$G$55]=&quot;Stance&quot;);[.A64]);&quot;&quot;);&quot;&quot;)">
            <text:p/>
          </table:table-cell>
          <table:table-cell table:formula="of:=IFERROR(IFNA(INDEX(COM.MICROSOFT.FILTER([Build.$F$37:.$F$55];[Build.$G$37:.$G$55]=&quot;Stance&quot;); [.A64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64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7:.$E$55]; [Build.$G$37:.$G$55]=&quot;Stance&quot;);[.A65]);&quot;&quot;);&quot;&quot;)">
            <text:p/>
          </table:table-cell>
          <table:table-cell table:formula="of:=IFERROR(IFNA(INDEX(COM.MICROSOFT.FILTER([Build.$F$37:.$F$55];[Build.$G$37:.$G$55]=&quot;Stance&quot;); [.A65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64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formula="of:=IFERROR(IFNA(INDEX(COM.MICROSOFT.FILTER([Build.$E$37:.$E$55]; [Build.$G$37:.$G$55]=&quot;Stance&quot;);[.A66]);&quot;&quot;);&quot;&quot;)">
            <text:p/>
          </table:table-cell>
          <table:table-cell table:formula="of:=IFERROR(IFNA(INDEX(COM.MICROSOFT.FILTER([Build.$F$37:.$F$55];[Build.$G$37:.$G$55]=&quot;Stance&quot;); [.A66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F64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17" table:formula="of:=IFNA(INDEX(COM.MICROSOFT.SORT([$Build.$E$37:.$G$55];3;-1);[.E69];1); &quot;&quot;)" office:value-type="string" office:string-value="Recover" calcext:value-type="string">
            <text:p>Recover</text:p>
          </table:table-cell>
          <table:table-cell table:style-name="ce216" table:formula="of:=IFERROR(IFNA(INDEX(COM.MICROSOFT.FILTER([$'Combat Abilities Master List'.$F$2:.$F$73];['Combat Abilities Master List'.$C$2:.$C$73]=[.F69]);1);&quot;&quot;);&quot;&quot;)" office:value-type="string" office:string-value="Target: Self&#10;Effect: Reduce current **Fatigue** or **Stress** by 1 or end one **Status**  &#10;" calcext:value-type="string" table:number-columns-spanned="4" table:number-rows-spanned="5">
            <text:p>Target: Self</text:p>
            <text:p>Effect: Reduce current **Fatigue** or **Stress** by 1 or end one **Status**  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69]); COM.MICROSOFT.FILTER([$'Combat Abilities Master List'.G:.I]; [$'Combat Abilities Master List'.C:.C] = [.F69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7:.$E$55]; [Build.$G$37:.$G$55]=&quot;Passive&quot;);[.A69]);&quot;&quot;);&quot;&quot;)">
            <text:p/>
          </table:table-cell>
          <table:table-cell table:formula="of:=IFERROR(IFNA(INDEX(COM.MICROSOFT.FILTER([Build.$F$37:.$F$55];[Build.$G$37:.$G$55]=&quot;Passive&quot;); [.A69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69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7:.$E$55]; [Build.$G$37:.$G$55]=&quot;Passive&quot;);[.A70]);&quot;&quot;);&quot;&quot;)">
            <text:p/>
          </table:table-cell>
          <table:table-cell table:formula="of:=IFERROR(IFNA(INDEX(COM.MICROSOFT.FILTER([Build.$F$37:.$F$55];[Build.$G$37:.$G$55]=&quot;Passive&quot;); [.A70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69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7:.$E$55]; [Build.$G$37:.$G$55]=&quot;Passive&quot;);[.A71]);&quot;&quot;);&quot;&quot;)">
            <text:p/>
          </table:table-cell>
          <table:table-cell table:formula="of:=IFERROR(IFNA(INDEX(COM.MICROSOFT.FILTER([Build.$F$37:.$F$55];[Build.$G$37:.$G$55]=&quot;Passive&quot;); [.A71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F69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7:.$E$55]; [Build.$G$37:.$G$55]=&quot;Passive&quot;);[.A72]);&quot;&quot;);&quot;&quot;)">
            <text:p/>
          </table:table-cell>
          <table:table-cell table:formula="of:=IFERROR(IFNA(INDEX(COM.MICROSOFT.FILTER([Build.$F$37:.$F$55];[Build.$G$37:.$G$55]=&quot;Passive&quot;); [.A72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7:.$E$55]; [Build.$G$37:.$G$55]=&quot;Passive&quot;);[.A73]);&quot;&quot;);&quot;&quot;)">
            <text:p/>
          </table:table-cell>
          <table:table-cell table:formula="of:=IFERROR(IFNA(INDEX(COM.MICROSOFT.FILTER([Build.$F$37:.$F$55];[Build.$G$37:.$G$55]=&quot;Passive&quot;); [.A73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317" table:formula="of:=IFNA(INDEX(COM.MICROSOFT.SORT([$Build.$E$37:.$G$55];3;-1);[.E74];1); &quot;&quot;)" office:value-type="string" office:string-value="Resuscitate" calcext:value-type="string">
            <text:p>Resuscitate</text:p>
          </table:table-cell>
          <table:table-cell table:style-name="ce216" table:formula="of:=IFERROR(IFNA(INDEX(COM.MICROSOFT.FILTER([$'Combat Abilities Master List'.$F$2:.$F$73];['Combat Abilities Master List'.$C$2:.$C$73]=[.F74]);1);&quot;&quot;);&quot;&quot;)" office:value-type="string" office:string-value="Range: 1&#10;Target: One ally who is **Incapacitated**&#10;Effect: The target is no longer **Incapacitated**, their **Fatigue** and&#10;**Stress** are halved (round down), and they clear any negative **statuses**&#10;" calcext:value-type="string" table:number-columns-spanned="4" table:number-rows-spanned="5">
            <text:p>Range: 1</text:p>
            <text:p>Target: One ally who is **Incapacitated**</text:p>
            <text:p>Effect: The target is no longer **Incapacitated**, their **Fatigue** and</text:p>
            <text:p>**Stress** are halved (round down), and they clear any negative **statuses**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74]); COM.MICROSOFT.FILTER([$'Combat Abilities Master List'.G:.I]; [$'Combat Abilities Master List'.C:.C] = [.F74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7:.$E$55]; [Build.$G$37:.$G$55]=&quot;Passive&quot;);[.A74]);&quot;&quot;);&quot;&quot;)">
            <text:p/>
          </table:table-cell>
          <table:table-cell table:formula="of:=IFERROR(IFNA(INDEX(COM.MICROSOFT.FILTER([Build.$F$37:.$F$55];[Build.$G$37:.$G$55]=&quot;Passive&quot;); [.A74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F74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7:.$E$55]; [Build.$G$37:.$G$55]=&quot;Passive&quot;);[.A75]);&quot;&quot;);&quot;&quot;)">
            <text:p/>
          </table:table-cell>
          <table:table-cell table:formula="of:=IFERROR(IFNA(INDEX(COM.MICROSOFT.FILTER([Build.$F$37:.$F$55];[Build.$G$37:.$G$55]=&quot;Passive&quot;); [.A75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74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7:.$E$55]; [Build.$G$37:.$G$55]=&quot;Passive&quot;);[.A76]);&quot;&quot;);&quot;&quot;)">
            <text:p/>
          </table:table-cell>
          <table:table-cell table:formula="of:=IFERROR(IFNA(INDEX(COM.MICROSOFT.FILTER([Build.$F$37:.$F$55];[Build.$G$37:.$G$55]=&quot;Passive&quot;); [.A76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F74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formula="of:=IFERROR(IFNA(INDEX(COM.MICROSOFT.FILTER([Build.$E$37:.$E$55]; [Build.$G$37:.$G$55]=&quot;Passive&quot;);[.A77]);&quot;&quot;);&quot;&quot;)">
            <text:p/>
          </table:table-cell>
          <table:table-cell table:formula="of:=IFERROR(IFNA(INDEX(COM.MICROSOFT.FILTER([Build.$F$37:.$F$55];[Build.$G$37:.$G$55]=&quot;Passive&quot;); [.A77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table:style-name="ce317" table:formula="of:=IFNA(INDEX(COM.MICROSOFT.SORT([$Build.$E$37:.$G$55];3;-1);[.E79];1); &quot;&quot;)" office:value-type="string" office:string-value="Piercing Shot" calcext:value-type="string">
            <text:p>Piercing Shot</text:p>
          </table:table-cell>
          <table:table-cell table:style-name="ce216" table:formula="of:=IFERROR(IFNA(INDEX(COM.MICROSOFT.FILTER([$'Combat Abilities Master List'.$F$2:.$F$73];['Combat Abilities Master List'.$C$2:.$C$73]=[.F79]);1);&quot;&quot;);&quot;&quot;)" office:value-type="string" office:string-value="Range: 6&#10;Target: One enemy&#10;Special: Targeting and effects from this ability do not trigger any&#10;Triggered Effects granted by enemy abilities&#10;Succeed: Deal **2 Fatigue**  &#10;Critical: Deal an additional **1**$^a$ **Fatigue**&#10;" calcext:value-type="string" table:number-columns-spanned="4" table:number-rows-spanned="5">
            <text:p>Range: 6</text:p>
            <text:p>Target: One enemy</text:p>
            <text:p>Special: Targeting and effects from this ability do not trigger any</text:p>
            <text:p>Triggered Effects granted by enemy abilities</text:p>
            <text:p>Succeed: Deal **2 Fatigue**  </text:p>
            <text:p>Critical: Deal an additional **1**$^a$ **Fatigue**</text:p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79]); COM.MICROSOFT.FILTER([$'Combat Abilities Master List'.G:.I]; [$'Combat Abilities Master List'.C:.C] = [.F79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C$2:.$C$68];['Combat Abilities By Art'.$B$2:.$B$68]=[.F79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79]);&quot;&quot;);&quot;&quot;)" office:value-type="string" office:string-value="Physical Attack, Ranged" calcext:value-type="string">
            <text:p>Physical Attack, Ranged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8]; ['Combat Abilities By Art'.$B$2:.$B$68]=[.F79]);&quot;&quot;);&quot;&quot;)" office:value-type="string" office:string-value="Archery" calcext:value-type="string">
            <text:p>Archery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style-name="ce317" table:formula="of:=IFNA(INDEX(COM.MICROSOFT.SORT([$Build.$E$37:.$G$55];3;-1);[.E84];1); &quot;&quot;)">
            <text:p/>
          </table:table-cell>
          <table:table-cell table:style-name="ce216" table:formula="of:=IFERROR(IFNA(INDEX(COM.MICROSOFT.FILTER([$'Combat Abilities Master List'.$F$2:.$F$73];['Combat Abilities Master List'.$C$2:.$C$73]=[.F84]);1);&quot;&quot;);&quot;&quot;)" table:number-columns-spanned="4" table:number-rows-spanned="5"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84]); COM.MICROSOFT.FILTER([$'Combat Abilities Master List'.G:.I]; [$'Combat Abilities Master List'.C:.C] = [.F84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C$2:.$C$68];['Combat Abilities By Art'.$B$2:.$B$68]=[.F84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84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8]; ['Combat Abilities By Art'.$B$2:.$B$68]=[.F84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style-name="ce317" table:formula="of:=IFNA(INDEX(COM.MICROSOFT.SORT([$Build.$E$37:.$G$55];3;-1);[.E89];1); &quot;&quot;)">
            <text:p/>
          </table:table-cell>
          <table:table-cell table:style-name="ce216" table:formula="of:=IFERROR(IFNA(INDEX(COM.MICROSOFT.FILTER([$'Combat Abilities Master List'.$F$2:.$F$73];['Combat Abilities Master List'.$C$2:.$C$73]=[.F89]);1);&quot;&quot;);&quot;&quot;)" table:number-columns-spanned="4" table:number-rows-spanned="5"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89]); COM.MICROSOFT.FILTER([$'Combat Abilities Master List'.G:.I]; [$'Combat Abilities Master List'.C:.C] = [.F89]); &quot;&quot;))" table:number-columns-spanned="1" table:number-rows-spanned="5">
            <text:p/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C$2:.$C$68];['Combat Abilities By Art'.$B$2:.$B$68]=[.F89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89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8]; ['Combat Abilities By Art'.$B$2:.$B$68]=[.F89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6" calcext:value-type="float">
            <text:p>16</text:p>
          </table:table-cell>
          <table:table-cell table:style-name="ce317" table:formula="of:=IFNA(INDEX(COM.MICROSOFT.SORT([$Build.$E$37:.$G$55];3;-1);[.E94];1); &quot;&quot;)">
            <text:p/>
          </table:table-cell>
          <table:table-cell table:style-name="ce216" table:formula="of:=IFERROR(IFNA(INDEX(COM.MICROSOFT.FILTER([$'Combat Abilities Master List'.$F$2:.$F$73];['Combat Abilities Master List'.$C$2:.$C$73]=[.F94]);1);&quot;&quot;);&quot;&quot;)" table:number-columns-spanned="4" table:number-rows-spanned="5"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94]); COM.MICROSOFT.FILTER([$'Combat Abilities Master List'.G:.I]; [$'Combat Abilities Master List'.C:.C] = [.F94]); &quot;&quot;))" table:number-columns-spanned="1" table:number-rows-spanned="5">
            <text:p/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C$2:.$C$68];['Combat Abilities By Art'.$B$2:.$B$68]=[.F94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94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8]; ['Combat Abilities By Art'.$B$2:.$B$68]=[.F94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7" calcext:value-type="float">
            <text:p>17</text:p>
          </table:table-cell>
          <table:table-cell table:style-name="ce317" table:formula="of:=IFNA(INDEX(COM.MICROSOFT.SORT([$Build.$E$37:.$G$55];3;-1);[.E99];1); &quot;&quot;)">
            <text:p/>
          </table:table-cell>
          <table:table-cell table:style-name="ce216" table:formula="of:=IFERROR(IFNA(INDEX(COM.MICROSOFT.FILTER([$'Combat Abilities Master List'.$F$2:.$F$73];['Combat Abilities Master List'.$C$2:.$C$73]=[.F99]);1);&quot;&quot;);&quot;&quot;)" table:number-columns-spanned="4" table:number-rows-spanned="5"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99]); COM.MICROSOFT.FILTER([$'Combat Abilities Master List'.G:.I]; [$'Combat Abilities Master List'.C:.C] = [.F99]); &quot;&quot;))" table:number-columns-spanned="1" table:number-rows-spanned="5">
            <text:p/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C$2:.$C$68];['Combat Abilities By Art'.$B$2:.$B$68]=[.F99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99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8]; ['Combat Abilities By Art'.$B$2:.$B$68]=[.F99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8" calcext:value-type="float">
            <text:p>18</text:p>
          </table:table-cell>
          <table:table-cell table:style-name="ce317" table:formula="of:=IFNA(INDEX(COM.MICROSOFT.SORT([$Build.$E$37:.$G$55];3;-1);[.E104];1); &quot;&quot;)">
            <text:p/>
          </table:table-cell>
          <table:table-cell table:style-name="ce216" table:formula="of:=IFERROR(IFNA(INDEX(COM.MICROSOFT.FILTER([$'Combat Abilities Master List'.$F$2:.$F$73];['Combat Abilities Master List'.$C$2:.$C$73]=[.F104]);1);&quot;&quot;);&quot;&quot;)" table:number-columns-spanned="4" table:number-rows-spanned="5"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104]); COM.MICROSOFT.FILTER([$'Combat Abilities Master List'.G:.I]; [$'Combat Abilities Master List'.C:.C] = [.F104]); &quot;&quot;))" table:number-columns-spanned="1" table:number-rows-spanned="5">
            <text:p/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C$2:.$C$68];['Combat Abilities By Art'.$B$2:.$B$68]=[.F104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104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8]; ['Combat Abilities By Art'.$B$2:.$B$68]=[.F104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ce2" table:number-columns-repeated="2"/>
          <table:table-cell table:style-name="Default"/>
          <table:table-cell table:number-columns-repeated="2"/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 office:value-type="float" office:value="19" calcext:value-type="float">
            <text:p>19</text:p>
          </table:table-cell>
          <table:table-cell table:style-name="ce317" table:formula="of:=IFNA(INDEX(COM.MICROSOFT.SORT([$Build.$E$37:.$G$55];3;-1);[.E109];1); &quot;&quot;)">
            <text:p/>
          </table:table-cell>
          <table:table-cell table:style-name="ce216" table:formula="of:=IFERROR(IFNA(INDEX(COM.MICROSOFT.FILTER([$'Combat Abilities Master List'.$F$2:.$F$73];['Combat Abilities Master List'.$C$2:.$C$73]=[.F109]);1);&quot;&quot;);&quot;&quot;)" table:number-columns-spanned="4" table:number-rows-spanned="5">
            <text:p/>
          </table:table-cell>
          <table:covered-table-cell table:number-columns-repeated="3"/>
          <table:table-cell table:style-name="ce257" table:formula="of:=COM.MICROSOFT.TEXTJOIN(CHAR(10); 1; IF(COM.MICROSOFT.FILTER([$Build.$H$37:.$J$70]; [$Build.$E$37:.$E$70] = [.$F109]); COM.MICROSOFT.FILTER([$'Combat Abilities Master List'.G:.I]; [$'Combat Abilities Master List'.C:.C] = [.F109]); &quot;&quot;))" table:number-columns-spanned="1" table:number-rows-spanned="5">
            <text:p/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/>
          <table:table-cell table:style-name="ce318" table:formula="of:=IFERROR(IFNA(COM.MICROSOFT.FILTER(['Combat Abilities By Art'.$C$2:.$C$68];['Combat Abilities By Art'.$B$2:.$B$68]=[.F109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/>
          <table:table-cell table:formula="of:=IFERROR(IFNA(COM.MICROSOFT.FILTER(['Combat Abilities By Art'.$D$2:.$D$68]; ['Combat Abilities By Art'.$B$2:.$B$68]=[.F109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/>
          <table:table-cell table:formula="of:=IFERROR(IFNA(COM.MICROSOFT.FILTER(['Combat Abilities By Art'.$A$2:.$A$68]; ['Combat Abilities By Art'.$B$2:.$B$68]=[.F109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2"/>
          <table:covered-table-cell table:number-columns-repeated="5"/>
          <table:table-cell table:style-name="Default" table:number-columns-repeated="5"/>
        </table:table-row>
      </table:table>
      <table:table table:name="Archetype Traits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row table:style-name="ro3">
          <table:table-cell table:style-name="ce283" office:value-type="string" calcext:value-type="string">
            <text:p>Archetype</text:p>
          </table:table-cell>
          <table:table-cell table:style-name="ce283" office:value-type="string" calcext:value-type="string">
            <text:p>Type</text:p>
          </table:table-cell>
          <table:table-cell table:style-name="ce283" office:value-type="string" calcext:value-type="string">
            <text:p>Attribute Bonus</text:p>
          </table:table-cell>
          <table:table-cell table:style-name="ce283" office:value-type="string" calcext:value-type="string">
            <text:p>Trait</text:p>
          </table:table-cell>
          <table:table-cell table:style-name="ce283" office:value-type="string" calcext:value-type="string">
            <text:p>Upgrade</text:p>
          </table:table-cell>
        </table:table-row>
        <table:table-row table:style-name="ro3">
          <table:table-cell office:value-type="string" calcext:value-type="string">
            <text:p>The Hero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Gain +1 to Struction, Athletics, and Leadership Training</text:p>
          </table:table-cell>
          <table:table-cell office:value-type="string" calcext:value-type="string">
            <text:p>Increase the Training Bonuses to +2</text:p>
          </table:table-cell>
        </table:table-row>
        <table:table-row table:style-name="ro3">
          <table:table-cell office:value-type="string" calcext:value-type="string">
            <text:p>The Artist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Gain +1 to Craft, Stealth, and Influence Training</text:p>
          </table:table-cell>
          <table:table-cell office:value-type="string" calcext:value-type="string">
            <text:p>Increase the Training Bonuses to +2</text:p>
          </table:table-cell>
        </table:table-row>
        <table:table-row table:style-name="ro3">
          <table:table-cell office:value-type="string" calcext:value-type="string">
            <text:p>The Sage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Gain +1 to Research, Problem-Solving, and Reconnaissance Training</text:p>
          </table:table-cell>
          <table:table-cell office:value-type="string" calcext:value-type="string">
            <text:p>Increase the Training Bonuses to +2</text:p>
          </table:table-cell>
        </table:table-row>
        <table:table-row table:style-name="ro3">
          <table:table-cell office:value-type="string" calcext:value-type="string">
            <text:p>The Loom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paces orthogonally adjacent to you are Difficult Terrain for your enemies</text:p>
          </table:table-cell>
          <table:table-cell office:value-type="string" calcext:value-type="string">
            <text:p>Extend the effect to diagonally adjacent spaces as well</text:p>
          </table:table-cell>
        </table:table-row>
        <table:table-row table:style-name="ro3">
          <table:table-cell office:value-type="string" calcext:value-type="string">
            <text:p>The Weav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gnore the first effect from terrain or an ability that would reduce your Movement on each of your turns</text:p>
          </table:table-cell>
          <table:table-cell office:value-type="string" calcext:value-type="string">
            <text:p>Ignore all effects that would reduce your Movement on your turn</text:p>
          </table:table-cell>
        </table:table-row>
        <table:table-row table:style-name="ro3">
          <table:table-cell office:value-type="string" calcext:value-type="string">
            <text:p>The Quill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You have +1 on Defense Rolls when the Attacker is 3 or more spaces away</text:p>
          </table:table-cell>
          <table:table-cell office:value-type="string" calcext:value-type="string">
            <text:p>Increase the bonus to +2</text:p>
          </table:table-cell>
        </table:table-row>
      </table:table>
      <table:table table:name="Utility Abilities By Art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9" table:default-cell-style-name="Default"/>
        <table:table-column table:style-name="co40" table:default-cell-style-name="ce223"/>
        <table:table-row table:style-name="ro4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<text:span text:style-name="T1">Uses/Cooldown:</text:span>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3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7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3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3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5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3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3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3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3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5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3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3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3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6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6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3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6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6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6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3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19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7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3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3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223"/>
        <table:table-row table:style-name="ro4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Tags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1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ce221" office:value-type="string" calcext:value-type="string">
            <text:p>Physical Attack, Ranged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ce221"/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ce221"/>
          <table:table-cell table:style-name="Default" office:value-type="string" calcext:value-type="string">
            <text:p><text:span text:style-name="T1">Target:</text:span> Self</text:p>
            <text:p><text:span text:style-name="T1">Effect:</text:span> Reduce current Fatigue or Stress by 1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ce221"/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ce221"/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ce221"/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Resolve rolls</text:p>
          </table:table-cell>
        </table:table-row>
        <table:table-row table:style-name="ro17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7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3">
          <table:table-cell/>
          <table:table-cell office:value-type="string" calcext:value-type="string">
            <text:p>BRAWLING</text:p>
          </table:table-cell>
          <table:table-cell table:number-columns-repeated="2"/>
          <table:table-cell table:style-name="Default"/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Effect: Choose one: move the target [Tier] squares in any direction, </text:p>
            <text:p>or target gains +[Tier] Slowed</text:p>
            <text:p>Succeed: Deal Fatigue</text:p>
            <text:p>Critical: Deal 2 Fatigue instead and the target is Stunned.</text:p>
          </table:table-cell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 within half your</text:p>
            <text:p>speed of your starting position.</text:p>
            <text:p>Succeed: If the target is an enemy, they take Fatigue</text:p>
            <text:p>Critical: Deal 2 Fatigue instead and you may move the target to any open space</text:p>
            <text:p>adjacent to 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you are no longer in range</text:p>
            <text:p>or you choose to release them at any time. You can only have up to [Tier] targets</text:p>
            <text:p>in this effect at a time. If you would exceed this number, you can choose which to</text:p>
            <text:p>release. An affected target may use their Action to attempt to break this effect on</text:p>
            <text:p>their turn by making a Physical Attack contested by your Resilience. On a Critical</text:p>
            <text:p>Success they may take another action. You may drag immobilized targets at a cost</text:p>
            <text:p>of +1 additional square per square moved.</text:p>
            <text:p>Critical: Deal Fatigue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An enemy that has not triggered this stance on the current turn exits a </text:p>
            <text:p>square adjacent to you as part of their Move, Action or Stance effect</text:p>
            <text:p>Effect: They must spend [Tier] extra squares of movement or else return to</text:p>
            <text:p>the square they exited. Make a Physical Attack against the triggering enemy.</text:p>
            <text:p>Success: Deal Fatigue.</text:p>
            <text:p>Critical: The target is Immobilized until the end of the turn.</text:p>
          </table:table-cell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rigger: An enemy within range targets one of your allies with an attack.</text:p>
            <text:p>Effect: You may move up to half your speed to any space adjacent to the</text:p>
            <text:p>triggering enemy and end this stance. The target may redirect the triggering</text:p>
            <text:p>ability to you (this does not count as a new instance of targeting for the purpose</text:p>
            <text:p>of this or other triggered effects). If they don't, they are Weakened until the end</text:p>
            <text:p>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maximum Fatigue Tolerance by [Tier]</text:p>
          </table:table-cell>
        </table:table-row>
        <table:table-row table:style-name="ro17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Type: Passive Effect: When you are dealt Fatigue and are not incapacitated,</text:p>
            <text:p>you may end or ignore one Status of your choice affecting (or that would effect)</text:p>
            <text:p>you. While your Fatigue Load exceeds your Fatigue Tolerance you have</text:p>
            <text:p>+[Tier] Boons on Panic Rolls</text:p>
          </table:table-cell>
        </table:table-row>
        <table:table-row table:style-name="ro3">
          <table:table-cell/>
          <table:table-cell office:value-type="string" calcext:value-type="string">
            <text:p>DUELING</text:p>
          </table:table-cell>
          <table:table-cell table:number-columns-repeated="2"/>
          <table:table-cell table:style-name="Default"/>
        </table:table-row>
        <table:table-row table:style-name="ro15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Succeed: Deal Fatigue</text:p>
            <text:p>Effect: The target gains +[Tier] Bleed</text:p>
            <text:p>Critical: Deal Fatigue again</text:p>
          </table:table-cell>
        </table:table-row>
        <table:table-row table:style-name="ro15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Succeed: Deal Fatigue</text:p>
            <text:p>Critical: Deal 2 Fatigue instead and the target also gains +1 Vulnerable</text:p>
            <text:p>Effect: The target gains +[Tier] Dazed.</text:p>
          </table:table-cell>
        </table:table-row>
        <table:table-row table:style-name="ro17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  <text:p>Critical: You may move the target 1 space to an unoccupied space within range</text:p>
          </table:table-cell>
        </table:table-row>
        <table:table-row table:style-name="ro15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 do, </text:p>
            <text:p>end this stance. If your contesting roll is a Critical, make a Physical Attack</text:p>
            <text:p>against the triggering enemy, dealing Fatigue on a success.</text:p>
          </table:table-cell>
        </table:table-row>
        <table:table-row table:style-name="ro13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or an adjacent character are targeted with an ability</text:p>
            <text:p>Effect: You may end this stance and enter any Basic Stance of your choice.</text:p>
            <text:p>If the stance has an effect that shares a trigger with this one, you may carry it out 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ttack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3">
          <table:table-cell/>
          <table:table-cell office:value-type="string" calcext:value-type="string">
            <text:p>INFUSION</text:p>
          </table:table-cell>
          <table:table-cell table:number-columns-repeated="2"/>
          <table:table-cell table:style-name="Default"/>
        </table:table-row>
        <table:table-row table:style-name="ro15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Effect: Make a Basic Attack against a valid target resolved using Infusion.</text:p>
            <text:p>If the target is adjacent to you, the Attack loses the Ranged tag for this use.</text:p>
            <text:p>Critical: Deal 1 additional Fatigue Effect: Choose of the following to apply to </text:p>
            <text:p>the target: +1 Burning, +1 Slowed, +1 Blinded or +1 Dazed. If the attack was </text:p>
            <text:p>a Success, choose [Tier] additional times (you may choose the same one more than once)</text:p>
          </table:table-cell>
        </table:table-row>
        <table:table-row table:style-name="ro17">
          <table:table-cell office:value-type="string" calcext:value-type="string">
            <text:p>Infusion</text:p>
          </table:table-cell>
          <table:table-cell office:value-type="string" calcext:value-type="string">
            <text:p>Wave of Mutilation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0</text:p>
            <text:p>Target: Area 2+[Tier]</text:p>
            <text:p>Effect: Choose of the following statuses: Burning, Slowed, Blinded, Dazed.</text:p>
            <text:p>All characters in the area (including Self) receive +1 of that status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5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5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attempts to exit a space in range for the first time on their turn,</text:p>
            <text:p>or an enemy ability would move an ally out of an adjacent square.</text:p>
            <text:p>Effect: The enemy attempting to move is +1 Slowed and does not move,</text:p>
            <text:p>or the ally is Immobilized until the end of the current turn. </text:p>
          </table:table-cell>
        </table:table-row>
        <table:table-row table:style-name="ro13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5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3">
          <table:table-cell/>
          <table:table-cell office:value-type="string" calcext:value-type="string">
            <text:p>ARCHERY</text:p>
          </table:table-cell>
          <table:table-cell table:number-columns-repeated="2"/>
          <table:table-cell table:style-name="Default"/>
        </table:table-row>
        <table:table-row table:style-name="ro15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 or attacked</text:p>
            <text:p>Succeed: Deal Fatigue</text:p>
            <text:p>Critical: Deal 2 Fatigue instead</text:p>
          </table:table-cell>
        </table:table-row>
        <table:table-row table:style-name="ro19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1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6</text:p>
            <text:p>Target: One enemy</text:p>
            <text:p>Succeed: Deal Fatigue and inflict +1 Burning. 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2</text:p>
            <text:p>Target: One enemy</text:p>
            <text:p>Effect: Push the target up to [Tier] spaces (you may move them any direction</text:p>
            <text:p>provided each square of movement is in the same direction and leaves them</text:p>
            <text:p>further from you than they started)</text:p>
            <text:p>Succeed: Deal Fatigue</text:p>
            <text:p>Critical: Deal 2 Fatigue instead and push the target up to an additional [Tier] spaces</text:p>
          </table:table-cell>
        </table:table-row>
        <table:table-row table:style-name="ro19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Aura 6</text:p>
            <text:p>Trigger: An enemy moves into the Aura</text:p>
            <text:p>Effect: You may make a Ranged Physical Attack against the triggering enemy.</text:p>
            <text:p>If you do, end this stance and you cannot take an action during your next turn</text:p>
            <text:p>Succeed: Deal Fatigue.</text:p>
            <text:p>Critical: Deal 2 Fatigue instead. </text:p>
          </table:table-cell>
        </table:table-row>
        <table:table-row table:style-name="ro13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f you do not move during your turn your Ranged Attacks until the start</text:p>
            <text:p>of your next turn have +[Tier] Boons. Subtract 1 Boon for each enemy up to [Tier]</text:p>
            <text:p>in range 2 of you when making the attack.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3">
          <table:table-cell/>
          <table:table-cell office:value-type="string" calcext:value-type="string">
            <text:p>NINJUTSU</text:p>
          </table:table-cell>
          <table:table-cell table:number-columns-repeated="2"/>
          <table:table-cell table:style-name="Default"/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1 + the number of stacks of Mark on the target.</text:p>
            <text:p>If the target becomes Incapacitated, clear all stacks of Mark and become Hidden.</text:p>
            <text:p>Otherwise, reduce the target's Mark by one.</text:p>
            <text:p>Critical: If the target becomes Incapacitated, apply +1 Mark to another target in range.</text:p>
            <text:p>Otherwise, the target retains all Mark instead of reducing it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Effect: The target is Scouted and is Weakened until the end of their next turn.</text:p>
            <text:p>Succeed: The target is also +1 Bleeding.</text:p>
            <text:p>Critical: Deal Fatigue</text:p>
            <text:p>Effect: You may move up to half your speed (round up) (plus [Tier]-1 additional spaces)</text:p>
          </table:table-cell>
        </table:table-row>
        <table:table-row table:style-name="ro15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3</text:p>
            <text:p>Target: Area 2</text:p>
            <text:p>Effect: Characters in the area gain +[Tier] Blinded</text:p>
            <text:p>Succeed: Deal Stress</text:p>
            <text:p>Critical: Characters in the area are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make an Evasion roll</text:p>
            <text:p>Effect: If you Critically Succeeded, you may remove all stacks of any one status</text:p>
            <text:p>from yourself. Otherwise, you may treat the outcome as one category better</text:p>
            <text:p>than the roll. In either case, end this stance.</text:p>
          </table:table-cell>
        </table:table-row>
        <table:table-row table:style-name="ro15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arget: One enemy</text:p>
            <text:p>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Speed by [Tier]</text:p>
          </table:table-cell>
        </table:table-row>
        <table:table-row table:style-name="ro13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/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3">
          <table:table-cell/>
          <table:table-cell office:value-type="string" calcext:value-type="string">
            <text:p>KINETICISM</text:p>
          </table:table-cell>
          <table:table-cell table:number-columns-repeated="2"/>
          <table:table-cell table:style-name="Default"/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wo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Target: One character in range and a second character within 4 who shares a row or </text:p>
            <text:p>column with the first target. If neither target is an enemy, the attack automatically Succeeds.</text:p>
            <text:p>Effect: Propel one or both targets closer to each other along the line until they are adjacent</text:p>
            <text:p>Succeed: You may deal Fatigue to one [Tier 2: or both] of the targets</text:p>
            <text:p>Critical: You may impose +1 Dazed on the first (Tier 2: or both) target(s).</text:p>
          </table:table-cell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4</text:p>
            <text:p>Target: Area 2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 Movement</text:p>
            <text:p>triggered by this effect does not trigger this effect.</text:p>
          </table:table-cell>
        </table:table-row>
        <table:table-row table:style-name="ro13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Range: 4</text:p>
            <text:p>Target: One Ally or Self</text:p>
            <text:p>Effect: Target is Hastened</text:p>
          </table:table-cell>
        </table:table-row>
        <table:table-row table:style-name="ro18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table:number-columns-repeated="2"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 Kineticism</text:p>
            <text:p>and end this stance</text:p>
            <text:p>Success: Avoid the effect as if by Evasion</text:p>
            <text:p>Critical: Apply the effect to a new target sharing a row or column with you which is at a right</text:p>
            <text:p>angle to the row or column you share with the triggering enemy.</text:p>
          </table:table-cell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3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n unobstructed</text:p>
            <text:p>path to you</text:p>
          </table:table-cell>
        </table:table-row>
        <table:table-row table:style-name="ro13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3">
          <table:table-cell/>
          <table:table-cell office:value-type="string" calcext:value-type="string">
            <text:p>ANIMISM</text:p>
          </table:table-cell>
          <table:table-cell table:number-columns-repeated="2"/>
          <table:table-cell table:style-name="Default"/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[Tier]</text:p>
            <text:p>Target: One Ally or Self</text:p>
            <text:p>Effect: Reduce the target's Fatigue or Stress by 1 or end one Status.</text:p>
            <text:p>(Tier 2+: You may end a Status at the same time that you reduce Fatigue or Stress)</text:p>
            <text:p>Overexert: Reduce the target's Fatigue or Stress by 2 instead, or reduce both by 1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Range: 2</text:p>
            <text:p>Target: One Ally or Self</text:p>
            <text:p>Effect: If the target fails a Resilience roll, they may treat the result as a success.</text:p>
            <text:p>Alternatively if they fail a roll to become Incapacitated they may reroll. Either</text:p>
            <text:p>way, end this Buff after it is used.</text:p>
            <text:p>Either way, end this Buff after it is used.</text:p>
          </table:table-cell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Effect: Position a Minion. You may have your minion make a Physical Attack</text:p>
            <text:p>against an enemy adjacent to it (resolve using your Animism)</text:p>
            <text:p>Effect: Push the target 1 space</text:p>
            <text:p>Success: Deal Fatigue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</text:p>
            <text:p>Trigger: An enemy exits a space adjacent to your minion for the first time on their turn.</text:p>
            <text:p>Effect: You may make a Physical Attack against the triggering enemy. </text:p>
            <text:p>If you do, end this stance.</text:p>
            <text:p>Success: Deal Fatigue</text:p>
          </table:table-cell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. </text:p>
            <text:p>Effect: The minion has Aura [Tier]. You and your allies have +1 to all</text:p>
            <text:p>defensive rolls while in the aura. </text:p>
            <text:p/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take the Basic Attack, Resuscitate or Coup de Grace action</text:p>
            <text:p>or the Assist or Protect stances, you may use your Minion's space instead of </text:p>
            <text:p>your own for the purpose of determining whether a target is in Range. You </text:p>
            <text:p>may also select targets for other abilities you have as if you were in your Minion's</text:p>
            <text:p>space, but if they have a Range greater than [Tier], they are treated as if they had a </text:p>
            <text:p>Range of [Tier] instead (this does not apply to basic actions and stances). 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oul Bon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r minion would disappear as a result of taking Fatigue or Stress,</text:p>
            <text:p>you may prevent it from disappearing by taking Stress</text:p>
          </table:table-cell>
        </table:table-row>
        <table:table-row table:style-name="ro3">
          <table:table-cell/>
          <table:table-cell office:value-type="string" calcext:value-type="string">
            <text:p>MESMERISM</text:p>
          </table:table-cell>
          <table:table-cell table:number-columns-repeated="2"/>
          <table:table-cell table:style-name="Default"/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character. If the target is an ally they must be willing and the attack</text:p>
            <text:p>automatically Succeeds</text:p>
            <text:p>Effect: Force the target to move up to half their Speed to any other space of your</text:p>
            <text:p>choice within range Success: Force the target to move up to their full Speed instead</text:p>
            <text:p>Critical: If the target is an Enemy, deal Stress</text:p>
            <text:p>Overexert: If the attack Succeeds, the target is Immobilized until the end of their turn.</text:p>
            <text:p>You may choose to use Overexert after the attack resolves. 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table:style-name="Default" office:value-type="string" calcext:value-type="string">
            <text:p>Range: 4</text:p>
            <text:p>Target: One enemy</text:p>
            <text:p>Success: The target is Disoriented and gains +[Tier]-1 Slowed</text:p>
            <text:p>Critical: Deal Stress</text:p>
          </table:table-cell>
        </table:table-row>
        <table:table-row table:style-name="ro18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table:style-name="Default" office:value-type="string" calcext:value-type="string">
            <text:p>Range: 4</text:p>
            <text:p>Target: One character in range. If the target is an ally the attack automatically</text:p>
            <text:p>Succeeds. Success: The target makes a Basic Attack against a valid target, resolved</text:p>
            <text:p>using your Mesmerism.</text:p>
            <text:p>Overexert: You may direct the target to use a different action you have access to</text:p>
            <text:p>instead of a Basic Attack</text:p>
            <text:p>Critical: If the target is an enemy,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/>
          <table:table-cell table:style-name="Default" office:value-type="string" calcext:value-type="string">
            <text:p>Trigger: You are targeted by an enemy attack</text:p>
            <text:p>Effect: If there is another character adjacent to you that isn't the attacker, you may</text:p>
            <text:p>swap places with them, causing them to be targeted by the triggering attack</text:p>
            <text:p>instead of you. This might cause an ability that can normally only target an enemy</text:p>
            <text:p>of the attacker to target their ally instead. If the other character is an enemy,</text:p>
            <text:p>roll Mesmerism contested by their Resolve. If they succeed this effect fails but</text:p>
            <text:p>you may contest the triggering attack normally. Alternatively, or if there is no</text:p>
            <text:p>adjacent character, you may move to an adjacent space before the triggering</text:p>
            <text:p>attack resolves. If this puts you out of its range, it automatically fails. Otherwise,</text:p>
            <text:p>contest it normally. After this effect triggers, end this stance unless you take</text:p>
            <text:p>Stress to maintain it.</text:p>
          </table:table-cell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/>
          <table:table-cell table:style-name="Default" office:value-type="string" calcext:value-type="string">
            <text:p>Effect: If you would take Fatigue, you may choose to take Stress instead. If you do, end</text:p>
            <text:p>this stance unless you take another Stress to maintain it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Effect: Increase your maximum Stress Tolerance by 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3">
          <table:table-cell/>
          <table:table-cell office:value-type="string" calcext:value-type="string">
            <text:p>ELEMENTALISM</text:p>
          </table:table-cell>
          <table:table-cell table:number-columns-repeated="2"/>
          <table:table-cell table:style-name="Default"/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table:style-name="Default" office:value-type="string" calcext:value-type="string">
            <text:p>Range: 4</text:p>
            <text:p>Target: Area 1+[Tier]</text:p>
            <text:p>Success: Deal Fatigue</text:p>
            <text:p>Critical: The target gains +1 Burning</text:p>
            <text:p>Overexert: Choose 1: Increase the area to Area 3+[Tier], treat normal Successes</text:p>
            <text:p>as Criticals, or increase the Critical effect by an additional +[Tier] Burning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table:style-name="Default" office:value-type="string" calcext:value-type="string">
            <text:p>Range: 4</text:p>
            <text:p>Target: Area 2+[Tier]</text:p>
            <text:p>Effect: The area is Difficult Terrain</text:p>
            <text:p>Overexert: Whenever a character starts their turn in the area or enters it for the</text:p>
            <text:p>first time on a turn, roll Elementalism contested by their Resilience. If you succeed,</text:p>
            <text:p>they take Fatigue. At the start of your turn you may maintain this effect by paying </text:p>
            <text:p>the Overexert cost again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</text:p>
            <text:p>Effect: The target is +1 Dazed</text:p>
            <text:p>Overexert: The target becomes Aura [Tier] and on a Success you may repeat this action</text:p>
            <text:p>immediately, except the targets are resolved as if you were the previous target, and</text:p>
            <text:p>you cannot target a character that has been targeted by this ability this tur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/>
          <table:table-cell table:style-name="Default" office:value-type="string" calcext:value-type="string">
            <text:p>Trigger: You are targeted by a Physical Attack</text:p>
            <text:p>Effect: In lieu of rolling Resilience you may roll Elementalism,</text:p>
            <text:p>with +X Banes where X is your current Stress Load. Resolve the</text:p>
            <text:p>effect as if you had rolled Resilience. If you roll a Critical success,</text:p>
            <text:p>you may remain in this stance. Otherwise, end this stance unless </text:p>
            <text:p>you take Stress to stay in it.</text:p>
          </table:table-cell>
        </table:table-row>
        <table:table-row table:style-name="ro15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/>
          <table:table-cell table:style-name="Default" office:value-type="string" calcext:value-type="string">
            <text:p>Trigger: You are targeted by an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</text:p>
            <text:p>stance unless you take Stress to stay in it.</text:p>
          </table:table-cell>
        </table:table-row>
        <table:table-row table:style-name="ro13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Effect: Whenever a character in Range 4 loses the Burning condition without</text:p>
            <text:p>using the Recover action, you may apply +1 Burning to another character within range</text:p>
            <text:p>1+[Tier] of them.</text:p>
          </table:table-cell>
        </table:table-row>
        <table:table-row table:style-name="ro13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table table:name="Combat Abilities Master List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number-columns-repeated="3" table:default-cell-style-name="Default"/>
        <table:table-row table:style-name="ro3"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 a</text:p>
          </table:table-cell>
          <table:table-cell office:value-type="string" calcext:value-type="string">
            <text:p>Upgrade b</text:p>
          </table:table-cell>
          <table:table-cell office:value-type="string" calcext:value-type="string">
            <text:p>Upgrade c</text:p>
          </table:table-cell>
        </table:table-row>
        <table:table-row table:style-name="ro15"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sic Attac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3</text:p>
            <text:p>Target: One enemy</text:p>
            <text:p>Effect: Roll an attack using your highest Combat Art modifier  </text:p>
            <text:p>Success: Deal **2 Fatigue**  </text:p>
            <text:p/>
          </table:table-cell>
          <table:table-cell table:number-columns-repeated="3"/>
        </table:table-row>
        <table:table-row table:style-name="ro16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Effect: Move a number of spaces up to your speed  </text:p>
            <text:p/>
          </table:table-cell>
          <table:table-cell table:number-columns-repeated="3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Target: Self</text:p>
            <text:p>Effect: Reduce current **Fatigue** or **Stress** by 1 or end one **Status**  </text:p>
            <text:p/>
          </table:table-cell>
          <table:table-cell table:number-columns-repeated="3"/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uscitat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1</text:p>
            <text:p>Target: One ally who is **Incapacitated**</text:p>
            <text:p>Effect: The target is no longer **Incapacitated**, their **Fatigue** and</text:p>
            <text:p>**Stress** are halved (round down), and they clear any negative **statuses**</text:p>
            <text:p/>
          </table:table-cell>
          <table:table-cell table:number-columns-repeated="3"/>
        </table:table-row>
        <table:table-row table:style-name="ro16"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ra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**+1 Boon** on **Resilience** rolls  </text:p>
            <text:p/>
          </table:table-cell>
          <table:table-cell table:number-columns-repeated="3"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**+1 Boon** on **Evasion** rolls  </text:p>
            <text:p/>
          </table:table-cell>
          <table:table-cell table:number-columns-repeated="3"/>
        </table:table-row>
        <table:table-row table:style-name="ro16"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**+1 Boon** on **Resolve** rolls  </text:p>
            <text:p/>
          </table:table-cell>
          <table:table-cell table:number-columns-repeated="3"/>
        </table:table-row>
        <table:table-row table:style-name="ro15">
          <table:table-cell office:value-type="float" office:value="7" calcext:value-type="float">
            <text:p>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Ally targets an Enemy within range</text:p>
            <text:p>Effect: You may impose **+1 Bane** on the Enemy's defensive roll.</text:p>
            <text:p>If you do, end this stance.  </text:p>
            <text:p/>
          </table:table-cell>
          <table:table-cell table:number-columns-repeated="3"/>
        </table:table-row>
        <table:table-row table:style-name="ro15"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</text:p>
            <text:p>If you do, end this stance.  </text:p>
            <text:p/>
          </table:table-cell>
          <table:table-cell table:number-columns-repeated="3"/>
        </table:table-row>
        <table:table-row table:style-name="ro19">
          <table:table-cell office:value-type="float" office:value="0" calcext:value-type="float">
            <text:p>0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One enemy</text:p>
            <text:p>Effect: Choose one: move the target **1**$^b$ in any direction, or target gains **1**$^c$ Slowed**</text:p>
            <text:p>Succeed: Deal **2 Fatigue**</text:p>
            <text:p>Critical: Deal an additional **1**$^a$ **Fatigue** and the target is **Stunned**</text:p>
            <text:p/>
          </table:table-cell>
          <table:table-cell office:value-type="string" calcext:value-type="string">
            <text:p>Add half your POW to the additional Fatigue you deal on a Critical</text:p>
            <text:p/>
          </table:table-cell>
          <table:table-cell office:value-type="string" calcext:value-type="string">
            <text:p>Add half your REA to the distance you can move the target</text:p>
            <text:p/>
          </table:table-cell>
          <table:table-cell office:value-type="string" calcext:value-type="string">
            <text:p>When you add Slowed add additional stacks equal to half your FIN</text:p>
            <text:p>    </text:p>
            <text:p/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 within half your speed$^b$</text:p>
            <text:p>of your starting position</text:p>
            <text:p>Succeed: If the target is an enemy, they take **2 Fatigue**</text:p>
            <text:p>Critical: Deal an additional **1**$^(a)$ **Fatigue** and you may move the target</text:p>
            <text:p>to any open space adjacent to their starting position</text:p>
            <text:p/>
          </table:table-cell>
          <table:table-cell office:value-type="string" calcext:value-type="string">
            <text:p>Add half your POW to the additional Fatigue you deal on a Critical</text:p>
            <text:p/>
          </table:table-cell>
          <table:table-cell office:value-type="string" calcext:value-type="string">
            <text:p>Add half your FIN to the distance you can move before the attack</text:p>
            <text:p/>
          </table:table-cell>
          <table:table-cell/>
        </table:table-row>
        <table:table-row table:style-name="ro20">
          <table:table-cell office:value-type="float" office:value="2" calcext:value-type="float">
            <text:p>2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character</text:p>
            <text:p>Succeed: Target is **Immobilized** and **Weakened** until you are no longer in range</text:p>
            <text:p>or you choose to release them at any time. You can only have up to **1**$^b$ targets</text:p>
            <text:p>in this effect at a time. If you would exceed this number, you can choose which to release.</text:p>
            <text:p>An affected target may use their Action to attempt to break this effect on their turn</text:p>
            <text:p>by making a Physical Attack contested by your **Resilience**.</text:p>
            <text:p>On a Critical Success they may take another action. You may drag immobilized targets at</text:p>
            <text:p>a cost of +1 additional square per square moved.</text:p>
            <text:p>Critical: Deal **1**$^a$ **Fatigue**</text:p>
            <text:p/>
          </table:table-cell>
          <table:table-cell office:value-type="string" calcext:value-type="string">
            <text:p>Add half your POW to the additional Fatigue you deal on a Critical</text:p>
            <text:p/>
          </table:table-cell>
          <table:table-cell office:value-type="string" calcext:value-type="string">
            <text:p>Add half your FIN to the number of targets you can affect at once</text:p>
            <text:p/>
          </table:table-cell>
          <table:table-cell/>
        </table:table-row>
        <table:table-row table:style-name="ro18">
          <table:table-cell office:value-type="float" office:value="3" calcext:value-type="float">
            <text:p>3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An enemy that has not triggered this stance on the current turn exits a square</text:p>
            <text:p>adjacent to you as part of their Move, Action or Stance effect</text:p>
            <text:p>Effect: They must spend 2 extra squares of movement or else return to the square they exited.</text:p>
            <text:p>Make a Physical Attack against the triggering enemy.  </text:p>
            <text:p>Success: Deal **1**$^a$ **Fatigue**.  </text:p>
            <text:p>Critical: The target is **Immobilized** until the end of the turn.  </text:p>
            <text:p/>
          </table:table-cell>
          <table:table-cell office:value-type="string" calcext:value-type="string">
            <text:p>Add half your POW to the Fatigue you deal on a Success  </text:p>
            <text:p/>
          </table:table-cell>
          <table:table-cell office:value-type="string" calcext:value-type="string">
            <text:p>Enemy movement may trigger the effect when they exit a square within 2</text:p>
            <text:p>instead of needing to be adjacent, provided they are moving further away from you  </text:p>
            <text:p/>
          </table:table-cell>
          <table:table-cell/>
        </table:table-row>
        <table:table-row table:style-name="ro25">
          <table:table-cell office:value-type="float" office:value="4" calcext:value-type="float">
            <text:p>4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rigger: An enemy within range targets one of your allies with an attack</text:p>
            <text:p>Effect: You may move up to half your speed to any space adjacent to the triggering enemy and</text:p>
            <text:p>end this stance. If the attack does not target an Area, the target may redirect the</text:p>
            <text:p>triggering ability from the ally to you (this does not count as a new instance of</text:p>
            <text:p>targeting for the purpose of this or other triggered effects). If the attack targets</text:p>
            <text:p>multiple characters, only one of the targets is replaced. If the attack targets an</text:p>
            <text:p>Area or the attacker chooses not to retarget to you, they gain **+1 Weakened**.</text:p>
            <text:p/>
          </table:table-cell>
          <table:table-cell office:value-type="string" calcext:value-type="string">
            <text:p>You may deal **Fatigue** to the triggering enemy equal to half your POW</text:p>
            <text:p/>
          </table:table-cell>
          <table:table-cell office:value-type="string" calcext:value-type="string">
            <text:p>Instead of moving normally as part of the triggered effect, you may **Teleport**</text:p>
            <text:p>a number of spaces equal to 2 + half your REA</text:p>
            <text:p/>
          </table:table-cell>
          <table:table-cell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**Maximum Fatigue Tolerance** by **1**$^a$  </text:p>
            <text:p/>
          </table:table-cell>
          <table:table-cell office:value-type="string" calcext:value-type="string">
            <text:p>Further increase your Maximum Fatigue Tolerance by half your END   </text:p>
            <text:p/>
          </table:table-cell>
          <table:table-cell table:number-columns-repeated="2"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are dealt **Fatigue**, you may end or ignore</text:p>
            <text:p>one **Status** of your choice affecting (or that would effect) you.</text:p>
            <text:p>While you are **Exhausted** you have **+1**$^a$ **Boons** on **Panic Rolls**</text:p>
            <text:p/>
          </table:table-cell>
          <table:table-cell office:value-type="string" calcext:value-type="string">
            <text:p>Increase the number of Boons this ability grants to Panic Rolls by half your REA  </text:p>
            <text:p/>
          </table:table-cell>
          <table:table-cell office:value-type="string" calcext:value-type="string">
            <text:p>When you take Fatigue, you may choose to reduce your **Stress Load** by 1</text:p>
            <text:p>instead of ending or ignoring a Status</text:p>
            <text:p/>
          </table:table-cell>
          <table:table-cell/>
        </table:table-row>
        <table:table-row table:style-name="ro19">
          <table:table-cell office:value-type="float" office:value="0" calcext:value-type="float">
            <text:p>0</text:p>
          </table:table-cell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One enemy</text:p>
            <text:p>Succeed: Deal **2 Fatigue**</text:p>
            <text:p>Critical: Deal an additional **1**$^a$ **Fatigue**  </text:p>
            <text:p>Effect: The target gains **1**$^b$ **Bleed**  </text:p>
            <text:p/>
          </table:table-cell>
          <table:table-cell office:value-type="string" calcext:value-type="string">
            <text:p>Add half your POW to Fatigue you deal on a Critical  </text:p>
            <text:p/>
          </table:table-cell>
          <table:table-cell office:value-type="string" calcext:value-type="string">
            <text:p>Increase the Bleed stacks by half your FIN  </text:p>
            <text:p/>
          </table:table-cell>
          <table:table-cell/>
        </table:table-row>
        <table:table-row table:style-name="ro19">
          <table:table-cell office:value-type="float" office:value="1" calcext:value-type="float">
            <text:p>1</text:p>
          </table:table-cell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One enemy</text:p>
            <text:p>Succeed: Deal **2 Fatigue**</text:p>
            <text:p>Critical: Deal an additional **1**$^a$ **Fatigue**  </text:p>
            <text:p>Effect: The target gains **1**$^b$ **Hamstrung**  </text:p>
            <text:p/>
          </table:table-cell>
          <table:table-cell office:value-type="string" calcext:value-type="string">
            <text:p>Add half your POW to Fatigue you deal on a Critical  </text:p>
            <text:p/>
          </table:table-cell>
          <table:table-cell office:value-type="string" calcext:value-type="string">
            <text:p>Increase the Hamstrung stacks by half your FIN  </text:p>
            <text:p/>
          </table:table-cell>
          <table:table-cell/>
        </table:table-row>
        <table:table-row table:style-name="ro15">
          <table:table-cell office:value-type="float" office:value="2" calcext:value-type="float">
            <text:p>2</text:p>
          </table:table-cell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Up to **2**$^b$ enemies within range</text:p>
            <text:p>Succeed: Deal **1**$^a$ **Fatigue**  </text:p>
            <text:p>Critical: You may move the target 1 space to an unoccupied space within range  </text:p>
            <text:p/>
          </table:table-cell>
          <table:table-cell office:value-type="string" calcext:value-type="string">
            <text:p>Add half your POW to the damage you deal on a Success  </text:p>
            <text:p/>
          </table:table-cell>
          <table:table-cell office:value-type="string" calcext:value-type="string">
            <text:p>The maximum number of targets increases by half your REA  </text:p>
            <text:p/>
          </table:table-cell>
          <table:table-cell/>
        </table:table-row>
        <table:table-row table:style-name="ro18">
          <table:table-cell office:value-type="float" office:value="3" calcext:value-type="float">
            <text:p>3</text:p>
          </table:table-cell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in range targets you with an attack.</text:p>
            <text:p>Effect: You may add your Dueling Training Level to your defense roll.</text:p>
            <text:p>If you do, end this stance. If your contesting roll is a **Critical**,</text:p>
            <text:p>make a Physical Attack with Finisher against the triggering enemy,</text:p>
            <text:p>dealing **[1] Fatigue** on a Success.  </text:p>
            <text:p/>
          </table:table-cell>
          <table:table-cell office:value-type="string" calcext:value-type="string">
            <text:p>Add half your POW to the damage you deal on a Success  </text:p>
            <text:p/>
          </table:table-cell>
          <table:table-cell office:value-type="string" calcext:value-type="string">
            <text:p>Increase the bonus to your defense roll by an amount equal to half your FIN  </text:p>
            <text:p/>
          </table:table-cell>
          <table:table-cell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or an adjacent character are targeted with an attack</text:p>
            <text:p>Effect: End this stance and enter any **Basic Stance** of your choice.</text:p>
            <text:p>If the stance has an effect that shares a trigger with this one,</text:p>
            <text:p>you may carry it out immediately.</text:p>
            <text:p/>
          </table:table-cell>
          <table:table-cell office:value-type="string" calcext:value-type="string">
            <text:p>If the Stance would normally end after triggering, you may</text:p>
            <text:p>stay in it or enter a different Basic Stance instead  </text:p>
            <text:p/>
          </table:table-cell>
          <table:table-cell office:value-type="string" calcext:value-type="string">
            <text:p>If the Stance grants a Boon to your Defense Roll, gain an</text:p>
            <text:p>additional Boon for the attack triggering this ability  </text:p>
            <text:p/>
          </table:table-cell>
          <table:table-cell/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ttacks that target an enemy suffering at least one **Status**</text:p>
            <text:p>are at +**1**$^a$ Boons  </text:p>
            <text:p/>
          </table:table-cell>
          <table:table-cell office:value-type="string" calcext:value-type="string">
            <text:p>Gain additional Boons equal to half your FIN  </text:p>
            <text:p/>
          </table:table-cell>
          <table:table-cell office:value-type="string" calcext:value-type="string">
            <text:p>In addition, when you get a Critical against an enemy with one or more Statuses,</text:p>
            <text:p>add +1 additional stack. If the target has more than one, add +1 to up to</text:p>
            <text:p>half your FIN of them  </text:p>
            <text:p/>
          </table:table-cell>
          <table:table-cell/>
        </table:table-row>
        <table:table-row table:style-name="ro16">
          <table:table-cell office:value-type="float" office:value="6" calcext:value-type="float">
            <text:p>6</text:p>
          </table:table-cell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bilities listed as having Range 1 have Range 2 instead</text:p>
            <text:p/>
          </table:table-cell>
          <table:table-cell table:number-columns-repeated="3"/>
        </table:table-row>
        <table:table-row table:style-name="ro24">
          <table:table-cell office:value-type="float" office:value="0" calcext:value-type="float">
            <text:p>0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Effect: Make a Basic Attack against a valid target resolved using Infusion.</text:p>
            <text:p>If the target is adjacent to you, the Attack loses the Ranged tag for this</text:p>
            <text:p>use and gains Finisher.</text:p>
            <text:p>Critical: Deal **1**$^a$ additional Fatigue  </text:p>
            <text:p>Effect: Choose of the following to apply to the target: **+1 Burning**, +1 **Slowed**,</text:p>
            <text:p>+1 **Blinded** or +1 **Shocked**. If the attack was a Success, choose **1**$^b$</text:p>
            <text:p>additional times (you may choose the same one more than once)  </text:p>
            <text:p/>
          </table:table-cell>
          <table:table-cell office:value-type="string" calcext:value-type="string">
            <text:p>Add half your POW to Fatigue you deal on a Critical  </text:p>
            <text:p/>
          </table:table-cell>
          <table:table-cell office:value-type="string" calcext:value-type="string">
            <text:p>Add half your FIN to the additional Status stacks you deal on a Success  </text:p>
            <text:p/>
          </table:table-cell>
          <table:table-cell/>
        </table:table-row>
        <table:table-row table:style-name="ro19">
          <table:table-cell office:value-type="float" office:value="1" calcext:value-type="float">
            <text:p>1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Wave of Mutilation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0</text:p>
            <text:p>Target: Area **2**$^a</text:p>
            <text:p>Effect: Choose one of the following statuses: **Burning**, **Slowed**, **Blinded**,</text:p>
            <text:p>**Shocked**. All characters in the area (including Self) receive +**1**$^b$</text:p>
            <text:p>of that status.  </text:p>
            <text:p/>
          </table:table-cell>
          <table:table-cell office:value-type="string" calcext:value-type="string">
            <text:p>Increase the area by half your REA</text:p>
          </table:table-cell>
          <table:table-cell office:value-type="string" calcext:value-type="string">
            <text:p>Increase the number of Status stacks on characters other than you by half your FIN</text:p>
          </table:table-cell>
          <table:table-cell/>
        </table:table-row>
        <table:table-row table:style-name="ro18">
          <table:table-cell office:value-type="float" office:value="2" calcext:value-type="float">
            <text:p>2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0</text:p>
            <text:p>Target: Area **3**$^a$</text:p>
            <text:p>Effect: While the effect is present, you may spend 4 spaces of movement or your Action</text:p>
            <text:p>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 to you.</text:p>
            <text:p/>
          </table:table-cell>
          <table:table-cell office:value-type="string" calcext:value-type="string">
            <text:p>Increase the Area by half your REA  </text:p>
            <text:p/>
          </table:table-cell>
          <table:table-cell office:value-type="string" calcext:value-type="string">
            <text:p>Teleporting costs only 2 spaces of movement  </text:p>
            <text:p/>
          </table:table-cell>
          <table:table-cell office:value-type="string" calcext:value-type="string">
            <text:p>The area is no longer considered a Terrain Effect for the purpose of limits</text:p>
            <text:p>on simultaneous active Terrain Effects  </text:p>
            <text:p/>
          </table:table-cell>
        </table:table-row>
        <table:table-row table:style-name="ro19">
          <table:table-cell office:value-type="float" office:value="3" calcext:value-type="float">
            <text:p>3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succeed on a Resilience roll against an enemy attack</text:p>
            <text:p>Effect: Push the enemy up to **1**$^a$ spaces away from you (each space pushed must be</text:p>
            <text:p>in the same direction and must increase the distance between you).</text:p>
            <text:p>If you Critically Succeed, push them up to **2**$^a$ spaces instead.</text:p>
            <text:p>The attack otherwise resolves as normal based on the rolls involved.  </text:p>
            <text:p/>
          </table:table-cell>
          <table:table-cell office:value-type="string" calcext:value-type="string">
            <text:p>Increase the distance pushed on a Success by half your REA and the distance</text:p>
            <text:p>pushed on a Critical by your full REA  </text:p>
            <text:p/>
          </table:table-cell>
          <table:table-cell office:value-type="string" calcext:value-type="string">
            <text:p>If you have not used the effect since your last turn, you may add half your</text:p>
            <text:p>FOC to your Resilience roll  </text:p>
            <text:p/>
          </table:table-cell>
          <table:table-cell/>
        </table:table-row>
        <table:table-row table:style-name="ro19">
          <table:table-cell office:value-type="float" office:value="4" calcext:value-type="float">
            <text:p>4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attempts to exit a space in range for the first time on their turn,</text:p>
            <text:p> or an enemy ability would move an ally out of an adjacent square.</text:p>
            <text:p>Effect: The enemy attempting to move is **1**$^a$ **Slowed** and does not move, or the ally</text:p>
            <text:p>is **Immobilized** until the end of the current turn.  </text:p>
            <text:p/>
          </table:table-cell>
          <table:table-cell office:value-type="string" calcext:value-type="string">
            <text:p>Increase the stacks of Slowed by half your FIN  </text:p>
            <text:p/>
          </table:table-cell>
          <table:table-cell office:value-type="string" calcext:value-type="string">
            <text:p>Deal Fatigue to the triggering enemy equal to half your POW  </text:p>
            <text:p/>
          </table:table-cell>
          <table:table-cell/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Range: **1**$^a$</text:p>
            <text:p>Effect: Whenever you or one of your allies afflicts an enemy within Range with one of the</text:p>
            <text:p>following statuses: **Burning**, **Slowed**, **Blinded**, **Shocked**, </text:p>
            <text:p>you may replace that application of the status with a different status from the same list.  </text:p>
            <text:p/>
          </table:table-cell>
          <table:table-cell office:value-type="string" calcext:value-type="string">
            <text:p>Increase the range by half your REA  </text:p>
            <text:p/>
          </table:table-cell>
          <table:table-cell office:value-type="string" calcext:value-type="string">
            <text:p>If the target was already suffering from the chosen status, you may deal **1 Stress**</text:p>
            <text:p>to them in addition to the other effects  </text:p>
            <text:p/>
          </table:table-cell>
          <table:table-cell/>
        </table:table-row>
        <table:table-row table:style-name="ro19">
          <table:table-cell office:value-type="float" office:value="6" calcext:value-type="float">
            <text:p>6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are suffering from **Burning**, **Slowed**, **Blinded** or **Shocked**,</text:p>
            <text:p>you may apply **1**$^a$ stacks of that status as part of a successful attack. If you</text:p>
            <text:p>are suffering from more than one, you apply at most **1**$^b$ of them. This is in addition</text:p>
            <text:p>to any statuses the attack applies normally (and the stacks add together if the same</text:p>
            <text:p>status applies more than once and has a parameter).  </text:p>
            <text:p/>
          </table:table-cell>
          <table:table-cell office:value-type="string" calcext:value-type="string">
            <text:p>Increase the number of Status stacks you apply by half your FIN  </text:p>
            <text:p/>
          </table:table-cell>
          <table:table-cell office:value-type="string" calcext:value-type="string">
            <text:p>Increase the maximum number of different statuses you can propagate by half your REA  </text:p>
            <text:p/>
          </table:table-cell>
          <table:table-cell/>
        </table:table-row>
        <table:table-row table:style-name="ro18">
          <table:table-cell office:value-type="float" office:value="0" calcext:value-type="float">
            <text:p>0</text:p>
          </table:table-cell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, Finisher</text:p>
          </table:table-cell>
          <table:table-cell office:value-type="string" calcext:value-type="string">
            <text:p>Range: 6</text:p>
            <text:p>Target: One enemy</text:p>
            <text:p>Special: Targeting and effects from this ability do not trigger any</text:p>
            <text:p>Triggered Effects granted by enemy abilities</text:p>
            <text:p>Succeed: Deal **2 Fatigue**  </text:p>
            <text:p>Critical: Deal an additional **1**$^a$ **Fatigue**</text:p>
            <text:p/>
          </table:table-cell>
          <table:table-cell office:value-type="string" calcext:value-type="string">
            <text:p>Add half your POW to the additional Fatigue you deal on a Critical  </text:p>
            <text:p/>
          </table:table-cell>
          <table:table-cell office:value-type="string" calcext:value-type="string">
            <text:p>On a Critical, you may increase your Initiative for this combat by your REF  </text:p>
            <text:p/>
          </table:table-cell>
          <table:table-cell/>
        </table:table-row>
        <table:table-row table:style-name="ro18">
          <table:table-cell office:value-type="float" office:value="1" calcext:value-type="float">
            <text:p>1</text:p>
          </table:table-cell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, Finisher</text:p>
          </table:table-cell>
          <table:table-cell office:value-type="string" calcext:value-type="string">
            <text:p>Range: 6</text:p>
            <text:p>Target: One enemy</text:p>
            <text:p>Succeed: Deal **2 Fatigue**  </text:p>
            <text:p>Critical: Repeat this action immediately, targeting an enemy that has not been targeted</text:p>
            <text:p>by this ability this turn as if you were standing in the space of the first target.</text:p>
            <text:p>You have +**1**$^b$ **Bane** on the attack for each previous target of this ability this turn.  </text:p>
            <text:p/>
          </table:table-cell>
          <table:table-cell office:value-type="string" calcext:value-type="string">
            <text:p>On a Critical, deal additional Fatigue equal to half your POW  </text:p>
            <text:p/>
          </table:table-cell>
          <table:table-cell office:value-type="string" calcext:value-type="string">
            <text:p>Reduce the number of Banes applied for previous targets by half your REA  </text:p>
            <text:p/>
          </table:table-cell>
          <table:table-cell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6</text:p>
            <text:p>Target: One enemy</text:p>
            <text:p>Succeed: Deal **2 Fatigue** and inflict **1**$^a$ **Burning**  </text:p>
            <text:p/>
          </table:table-cell>
          <table:table-cell office:value-type="string" calcext:value-type="string">
            <text:p>Add half your FIN to the number of Burning stacks you deal on a Success  </text:p>
            <text:p/>
          </table:table-cell>
          <table:table-cell office:value-type="string" calcext:value-type="string">
            <text:p>On a Critical, deal additional Fatigue equal to half your POW  </text:p>
            <text:p/>
          </table:table-cell>
          <table:table-cell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2</text:p>
            <text:p>Target: One enemy</text:p>
            <text:p>Effect: Push the target up to **1**$^b$ spaces (you may move them any direction provided</text:p>
            <text:p>each square of movement is in the same direction and leaves them further from you</text:p>
            <text:p>than they started)</text:p>
            <text:p>Succeed: Deal **2 Fatigue**</text:p>
            <text:p>Critical: Deal an additional **1**$^a$ Fatigue and push the target up to an additional **1**$b$</text:p>
            <text:p/>
          </table:table-cell>
          <table:table-cell office:value-type="string" calcext:value-type="string">
            <text:p>Add half your POW to the additional Fatigue you deal on a Critical  </text:p>
            <text:p/>
          </table:table-cell>
          <table:table-cell office:value-type="string" calcext:value-type="string">
            <text:p>Add half your REA to the distance pushed and the additional distance pushed on a Critical  </text:p>
            <text:p/>
          </table:table-cell>
          <table:table-cell/>
        </table:table-row>
        <table:table-row table:style-name="ro25">
          <table:table-cell office:value-type="float" office:value="4" calcext:value-type="float">
            <text:p>4</text:p>
          </table:table-cell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Choose one: Gain Aura 6, or Gain Aura 4 and apply **1**$^b$ **Mark** to an enemy within 6</text:p>
            <text:p>Trigger: An enemy moves into the Aura</text:p>
            <text:p>Effect: You may make a Ranged Physical Attack against the triggering enemy,</text:p>
            <text:p>with **1**$^c$ **Boon** if the target is **Marked**. </text:p>
            <text:p>If you do, end this stance and you cannot take an action during your next turn</text:p>
            <text:p>(you can still move and take a new stance).</text:p>
            <text:p>Succeed: Deal **Fatigue** equal to 2 plus the stacks of Mark on the target.</text:p>
            <text:p>Critical: Deal an additional **1**$^a$ **Fatigue**  </text:p>
            <text:p/>
          </table:table-cell>
          <table:table-cell office:value-type="string" calcext:value-type="string">
            <text:p>Add half your POW to the additional Fatigue you deal on a Critical  </text:p>
            <text:p/>
          </table:table-cell>
          <table:table-cell office:value-type="string" calcext:value-type="string">
            <text:p>Add half your FIN to the stacks of Mark you apply  </text:p>
            <text:p/>
          </table:table-cell>
          <table:table-cell office:value-type="string" calcext:value-type="string">
            <text:p>Add half your FIN to the number of Boons you gain against Marked targets  </text:p>
            <text:p/>
          </table:table-cell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f you do not move during your turn your Ranged Attacks until the start of your</text:p>
            <text:p>next turn have **1**$^a$ **Boons**. Subtract 1 Boon for each enemy in range 2 of you</text:p>
            <text:p>when making the attack (this cannot cause you to lose more Boons than you gained</text:p>
            <text:p>from this ability).  </text:p>
            <text:p/>
          </table:table-cell>
          <table:table-cell office:value-type="string" calcext:value-type="string">
            <text:p>Increase the number of Boons by half your FIN  </text:p>
            <text:p/>
          </table:table-cell>
          <table:table-cell office:value-type="string" calcext:value-type="string">
            <text:p>You only subtract Boons for nearby enemies in excess of half your FOC  </text:p>
            <text:p/>
          </table:table-cell>
          <table:table-cell/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may take an action during your Move instead of afterwards, provided each</text:p>
            <text:p>square moved during your turn is in the same direction. If you make an attack</text:p>
            <text:p>your remaining Movement may not take you further from the target than you were</text:p>
            <text:p>when you made the attack.</text:p>
            <text:p/>
          </table:table-cell>
          <table:table-cell table:number-columns-repeated="3"/>
        </table:table-row>
        <table:table-row table:style-name="ro20">
          <table:table-cell office:value-type="float" office:value="0" calcext:value-type="float">
            <text:p>0</text:p>
          </table:table-cell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3</text:p>
            <text:p>Target: One enemy</text:p>
            <text:p>Special: You have **1**$^a$ **Boon** on the attack if the target is **Marked**</text:p>
            <text:p>Succeed: Deal **2 Fatigue** plus additional Fatigue equal to the number of stacks</text:p>
            <text:p>of **Mark** on the target. If the target becomes Incapacitated, clear all</text:p>
            <text:p>stacks of **Mark** and become **Hidden**. Otherwise, reduce the target's</text:p>
            <text:p>**Mark** by one.  </text:p>
            <text:p>Critical: If the target becomes Incapacitated on the same turn you use this ability,</text:p>
            <text:p>apply **1**$^b$ **Mark** to another target in range. Otherwise, the target retains</text:p>
            <text:p>all **Mark** instead of reducing it.  </text:p>
            <text:p/>
          </table:table-cell>
          <table:table-cell office:value-type="string" calcext:value-type="string">
            <text:p>Add half your FIN to the number of Boons you gain against Marked targets  </text:p>
            <text:p/>
          </table:table-cell>
          <table:table-cell office:value-type="string" calcext:value-type="string">
            <text:p>Add half your REA to the number of stacks of Mark you apply to a new target</text:p>
            <text:p>on a Critical against a target that becomes Incapacitated, and add **+1 Mark**</text:p>
            <text:p>to the target when you get a Critical but do not Incapacitate the target  </text:p>
            <text:p/>
          </table:table-cell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Effect: The target is **Scouted** and +**1**$^a$ **Hamstrung**</text:p>
            <text:p>Succeed: The target takes **1 Fatigue** and **1**$^a$ **Bleeding**  </text:p>
            <text:p>Critical: Deal an additional **1**$^b$ **Fatigue**</text:p>
            <text:p>Effect: You may move up to half your speed (round up) (plus **0**$^c$ additional spaces)</text:p>
            <text:p>after this ability resolves, hit or miss.  </text:p>
            <text:p/>
          </table:table-cell>
          <table:table-cell office:value-type="string" calcext:value-type="string">
            <text:p>Add half your FIN to the number of stacks of Hamstrung and Bleeding  </text:p>
            <text:p/>
          </table:table-cell>
          <table:table-cell office:value-type="string" calcext:value-type="string">
            <text:p>Add half your POW to the additional Fatigue you deal on a Critical  </text:p>
            <text:p/>
          </table:table-cell>
          <table:table-cell office:value-type="string" calcext:value-type="string">
            <text:p>Add half your FIN to the maximum spaces you may move after the attack  </text:p>
            <text:p/>
          </table:table-cell>
        </table:table-row>
        <table:table-row table:style-name="ro18">
          <table:table-cell office:value-type="float" office:value="2" calcext:value-type="float">
            <text:p>2</text:p>
          </table:table-cell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3</text:p>
            <text:p>Target: Area **2**$^c$</text:p>
            <text:p>Effect: Characters in the area gain +**1**$^b$ **Blinded**  </text:p>
            <text:p>Succeed: Deal **2 Stress**</text:p>
            <text:p>Critical: Deal an additional **1**$^a$ **Stress**, and</text:p>
            <text:p>characters in the area are **Disoriented**.  </text:p>
            <text:p/>
          </table:table-cell>
          <table:table-cell office:value-type="string" calcext:value-type="string">
            <text:p>Add half your REA to the additional Stress you deal on a Critical  </text:p>
            <text:p/>
          </table:table-cell>
          <table:table-cell office:value-type="string" calcext:value-type="string">
            <text:p>Add half your FIN to the stacks of Blinded  </text:p>
            <text:p/>
          </table:table-cell>
          <table:table-cell office:value-type="string" calcext:value-type="string">
            <text:p>You may increase the area by up to half your REA (you can set the area on each use)  </text:p>
            <text:p/>
          </table:table-cell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make an **Evasion** roll</text:p>
            <text:p>Effect: If you Critically Succeeded, you may remove **2**$^a$ stacks of any one status</text:p>
            <text:p>from yourself after the attack resolves. Otherwise, you may treat the outcome</text:p>
            <text:p>as one category better than the roll. In either case, end this stance.  </text:p>
            <text:p/>
          </table:table-cell>
          <table:table-cell office:value-type="string" calcext:value-type="string">
            <text:p>Add half your REA to the number of stacks removed on a Critical  </text:p>
            <text:p/>
          </table:table-cell>
          <table:table-cell office:value-type="string" calcext:value-type="string">
            <text:p>You may remove 1 stack of a status when you get a normal Success (before upgrading the result)</text:p>
            <text:p/>
          </table:table-cell>
          <table:table-cell/>
        </table:table-row>
        <table:table-row table:style-name="ro19">
          <table:table-cell office:value-type="float" office:value="4" calcext:value-type="float">
            <text:p>4</text:p>
          </table:table-cell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arget: One enemy</text:p>
            <text:p>Effect: The target gains **+1 Mark**, you become **Hidden**, and gain **Aura** **1**$^b$</text:p>
            <text:p>Trigger: A enemy with Mark enters a square in the Aura  </text:p>
            <text:p>Effect: The triggering enemy immediately gains +**1**$^a$ **Mark**  </text:p>
            <text:p/>
          </table:table-cell>
          <table:table-cell office:value-type="string" calcext:value-type="string">
            <text:p>Add half your FIN to the number of stacks of Mark applied by the Triggered Effect  </text:p>
            <text:p/>
          </table:table-cell>
          <table:table-cell office:value-type="string" calcext:value-type="string">
            <text:p>Increase the size of the Aura by half your REA  </text:p>
            <text:p/>
          </table:table-cell>
          <table:table-cell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Speed by **1**$^a$</text:p>
            <text:p/>
          </table:table-cell>
          <table:table-cell office:value-type="string" calcext:value-type="string">
            <text:p>Increase your Speed by an additional 1  </text:p>
            <text:p/>
          </table:table-cell>
          <table:table-cell office:value-type="string" calcext:value-type="string">
            <text:p>If you move at least 4 on your turn, gain +**1** **Boon** on your next attack  </text:p>
            <text:p/>
          </table:table-cell>
          <table:table-cell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During your move you may spend 1 space of movement to swap places</text:p>
            <text:p>with an ally in Range **1**$^b$</text:p>
            <text:p/>
          </table:table-cell>
          <table:table-cell office:value-type="string" calcext:value-type="string">
            <text:p>You may use this effect to swap with an enemy, and when you swap</text:p>
            <text:p>with an ally it does not cost movement.  </text:p>
            <text:p/>
          </table:table-cell>
          <table:table-cell office:value-type="string" calcext:value-type="string">
            <text:p>You may exchange places with an ally within a Range up to half your</text:p>
            <text:p>REA as a Teleport using only 1 space of movement  </text:p>
            <text:p/>
          </table:table-cell>
          <table:table-cell/>
        </table:table-row>
        <table:table-row table:style-name="ro23">
          <table:table-cell office:value-type="float" office:value="0" calcext:value-type="float">
            <text:p>0</text:p>
          </table:table-cell>
          <table:table-cell office:value-type="string" calcext:value-type="string">
            <text:p>Kineticism</text:p>
          </table:table-cell>
          <table:table-cell office:value-type="string" calcext:value-type="string">
            <text:p>Two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Target: One character in range and a second character within 4</text:p>
            <text:p>who shares a row or column with the first target</text:p>
            <text:p>Effect: Propel one or both targets closer to each other along the line until</text:p>
            <text:p>they are adjacent or until they collide with another character or</text:p>
            <text:p>terrain +2 or more above their starting position</text:p>
            <text:p>Succeed: You may deal up to **2**$^a$ **Fatigue** split however you wish between</text:p>
            <text:p>the targets and any other character they collided with</text:p>
            <text:p>Critical: You may cause one$^b$ of the targets to become **Dazed**  </text:p>
            <text:p/>
          </table:table-cell>
          <table:table-cell office:value-type="string" calcext:value-type="string">
            <text:p>Add half your POW to the Fatigue you deal on a Success  </text:p>
            <text:p/>
          </table:table-cell>
          <table:table-cell office:value-type="string" calcext:value-type="string">
            <text:p>You may apply **Dazed** to one target on a Success or both targets on a Critical  </text:p>
            <text:p/>
          </table:table-cell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4</text:p>
            <text:p>Target: Area **2**$^a$</text:p>
            <text:p>Effect: Indicate a side or corner of the area. Whenever a character moves</text:p>
            <text:p>into any space in the area they are pushed one space toward</text:p>
            <text:p>the indicated side or corner unless they spend **1**$^b$ additional</text:p>
            <text:p>movement to resist this effect. Movement triggered by this effect</text:p>
            <text:p>does not trigger this effect.  </text:p>
            <text:p/>
          </table:table-cell>
          <table:table-cell office:value-type="string" calcext:value-type="string">
            <text:p>Add half your REA to the size of the Area  </text:p>
            <text:p/>
          </table:table-cell>
          <table:table-cell office:value-type="string" calcext:value-type="string">
            <text:p>Add 1 to the additional movement cost  </text:p>
            <text:p/>
          </table:table-cell>
          <table:table-cell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, u, f, f</text:p>
          </table:table-cell>
          <table:table-cell office:value-type="string" calcext:value-type="string">
            <text:p>Range: 4</text:p>
            <text:p>Target: One Ally or Self</text:p>
            <text:p>Effect: Target is **Hastened**  </text:p>
            <text:p/>
          </table:table-cell>
          <table:table-cell office:value-type="string" calcext:value-type="string">
            <text:p>You may apply the effect to a second target   </text:p>
            <text:p/>
          </table:table-cell>
          <table:table-cell office:value-type="string" calcext:value-type="string">
            <text:p>After using this ability, you gain the benefit of the **Dodge** Basic Stance</text:p>
            <text:p>until the start of your next turn (in addition to your actual Stance)  </text:p>
            <text:p/>
          </table:table-cell>
          <table:table-cell/>
        </table:table-row>
        <table:table-row table:style-name="ro18">
          <table:table-cell office:value-type="float" office:value="3" calcext:value-type="float">
            <text:p>3</text:p>
          </table:table-cell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are targeted with an ability that inflicts Fatigue or Stress</text:p>
            <text:p>by an enemy sharing a row or column with your position and at least 3 spaces away</text:p>
            <text:p>Effect: Add your Kineticism Training Level to your Defense roll and end this stance</text:p>
            <text:p>Critical: Apply the effect to a new target sharing a row or column with you</text:p>
            <text:p>which is at a right angle to the row or column you share with the</text:p>
            <text:p>triggering enemy (but reduce the Fatigue or Stress dealt by 1)$^b$</text:p>
            <text:p/>
          </table:table-cell>
          <table:table-cell office:value-type="string" calcext:value-type="string">
            <text:p>Gain an additional bonus to the Defense roll equal to half your REA  </text:p>
            <text:p/>
          </table:table-cell>
          <table:table-cell office:value-type="string" calcext:value-type="string">
            <text:p>The target takes the full impact of the effect on a Critical  </text:p>
            <text:p/>
          </table:table-cell>
          <table:table-cell/>
        </table:table-row>
        <table:table-row table:style-name="ro18">
          <table:table-cell office:value-type="float" office:value="4" calcext:value-type="float">
            <text:p>4</text:p>
          </table:table-cell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Effect: Gain **Aura** **1**$^a$ and indicate an orientation: clockwise or counterclockwise.</text:p>
            <text:p>Whenever a character moves into any space in the aura, they are pushed one space</text:p>
            <text:p>in a cardinal direction in the indicated orientation unless they spend</text:p>
            <text:p>an extra space of movement to resist this effect. Movement triggered by this effect</text:p>
            <text:p>does not trigger this effect. You cannot be targeted by enemies in this aura</text:p>
            <text:p>unless they are orthogonally adjacent to you.  </text:p>
            <text:p/>
          </table:table-cell>
          <table:table-cell office:value-type="string" calcext:value-type="string">
            <text:p>Increase the size of the Aura by half your REA  </text:p>
            <text:p/>
          </table:table-cell>
          <table:table-cell office:value-type="string" calcext:value-type="string">
            <text:p>Ranged attacks targeting you from 3 or more spaces away are at **+1 Bane**</text:p>
            <text:p>while you are in this Stance  </text:p>
            <text:p/>
          </table:table-cell>
          <table:table-cell/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</text:p>
            <text:p>an unobstructed path to you.  </text:p>
            <text:p/>
          </table:table-cell>
          <table:table-cell office:value-type="string" calcext:value-type="string">
            <text:p>Abilities bounced off of you may ignore Cover  </text:p>
            <text:p/>
          </table:table-cell>
          <table:table-cell office:value-type="string" calcext:value-type="string">
            <text:p>When an ability is bounced off of you you may move 1 before the attack.</text:p>
            <text:p>Use your new position to determine whether the target is in range.  </text:p>
            <text:p/>
          </table:table-cell>
          <table:table-cell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target a creature or area with an ability using an action,</text:p>
            <text:p>you may move yourself **1**$^a$ spaces further away from that creature</text:p>
            <text:p>(or from the closest space in the area).  </text:p>
            <text:p/>
          </table:table-cell>
          <table:table-cell office:value-type="string" calcext:value-type="string">
            <text:p>Increase the distance you move by half your REA  </text:p>
            <text:p/>
          </table:table-cell>
          <table:table-cell office:value-type="string" calcext:value-type="string">
            <text:p>You may move the target 1 as well in the opposite direction you move, |</text:p>
            <text:p>after the ability resolves (in addition to any movement the ability applies normally)  </text:p>
            <text:p/>
          </table:table-cell>
          <table:table-cell/>
        </table:table-row>
        <table:table-row table:style-name="ro18">
          <table:table-cell office:value-type="float" office:value="0" calcext:value-type="float">
            <text:p>0</text:p>
          </table:table-cell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**1**$^a$</text:p>
            <text:p>Target: One Ally or Self</text:p>
            <text:p>Effect: Choose 1: Reduce the target's **Fatigue** by 1,</text:p>
            <text:p>reduce the target's **Stress** by 1, or</text:p>
            <text:p>reduce the stacks of a Status by 2</text:p>
            <text:p>Overexert: Choose 2 instead, or choose the same one twice  </text:p>
            <text:p/>
          </table:table-cell>
          <table:table-cell office:value-type="string" calcext:value-type="string">
            <text:p>Increase the Range by half your REA  </text:p>
            <text:p/>
          </table:table-cell>
          <table:table-cell office:value-type="string" calcext:value-type="string">
            <text:p>When you use this ability (in either its normal or Overexert modes)</text:p>
            <text:p>you may choose an additional option not already selected  </text:p>
            <text:p/>
          </table:table-cell>
          <table:table-cell/>
        </table:table-row>
        <table:table-row table:style-name="ro18">
          <table:table-cell office:value-type="float" office:value="1" calcext:value-type="float">
            <text:p>1</text:p>
          </table:table-cell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Range: 2</text:p>
            <text:p>Target: One Ally or Self</text:p>
            <text:p>Effect: The target may add your Animism Training level to a Defense roll,</text:p>
            <text:p>reducing any **Fatigue** or **Stress** taken by 1. Alternatively if they</text:p>
            <text:p>fail a Panic or Incapacity Roll they may reroll. Either way, end this Buff</text:p>
            <text:p>after it is used unless you take **Stress** to maintain it  </text:p>
            <text:p/>
          </table:table-cell>
          <table:table-cell office:value-type="string" calcext:value-type="string">
            <text:p>The bonus granted to the roll increases by half your FOC  </text:p>
            <text:p/>
          </table:table-cell>
          <table:table-cell office:value-type="string" calcext:value-type="string">
            <text:p>The target may add your Animism Training to their reroll  </text:p>
            <text:p/>
          </table:table-cell>
          <table:table-cell/>
        </table:table-row>
        <table:table-row table:style-name="ro18">
          <table:table-cell office:value-type="float" office:value="2" calcext:value-type="float">
            <text:p>2</text:p>
          </table:table-cell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Effect: Position a Minion. You may have your minion make a Physical Attack</text:p>
            <text:p>against an enemy adjacent to it (resolve using your Animism)</text:p>
            <text:p>Effect: Push the target **1**$^b$ spaces  </text:p>
            <text:p>Success: Deal **2 Fatigue**</text:p>
            <text:p>Critical: Deal an additional **1**$^a$ **Fatigue**   </text:p>
            <text:p/>
          </table:table-cell>
          <table:table-cell office:value-type="string" calcext:value-type="string">
            <text:p>Increase the additional Fatigue on a Critical by half your POW  </text:p>
            <text:p/>
          </table:table-cell>
          <table:table-cell office:value-type="string" calcext:value-type="string">
            <text:p>Increase the distance pushed by half your REA  </text:p>
            <text:p/>
          </table:table-cell>
          <table:table-cell/>
        </table:table-row>
        <table:table-row table:style-name="ro18">
          <table:table-cell office:value-type="float" office:value="3" calcext:value-type="float">
            <text:p>3</text:p>
          </table:table-cell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  </text:p>
            <text:p>Trigger: An enemy exits a space adjacent to your minion for the first time on their turn.  </text:p>
            <text:p>Effect: You may make a Physical Attack against the triggering enemy.</text:p>
            <text:p>If you do, end this stance.  </text:p>
            <text:p>Success: Deal **1**$^a$ **Fatigue**  </text:p>
            <text:p/>
          </table:table-cell>
          <table:table-cell office:value-type="string" calcext:value-type="string">
            <text:p>Increase the Fatigue on a success by half your POW  </text:p>
            <text:p/>
          </table:table-cell>
          <table:table-cell office:value-type="string" calcext:value-type="string">
            <text:p>On a Critical, apply **Slowed** equal to half your FIN  </text:p>
            <text:p/>
          </table:table-cell>
          <table:table-cell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.  </text:p>
            <text:p>Effect: The minion has **Aura** **1**$^a$. You and your allies have</text:p>
            <text:p>+**1**$^b$ to all defensive rolls while in the aura.  </text:p>
            <text:p/>
          </table:table-cell>
          <table:table-cell office:value-type="string" calcext:value-type="string">
            <text:p>Increase the size of the Aura by half your REA  </text:p>
            <text:p/>
          </table:table-cell>
          <table:table-cell office:value-type="string" calcext:value-type="string">
            <text:p>Increase the bonus to defensive rolls by half your FOC  </text:p>
            <text:p/>
          </table:table-cell>
          <table:table-cell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take the **Basic Attack** or **Resuscitate** actions or</text:p>
            <text:p>the **Assist** or **Protect** stances, you may use your **Minion**'s space</text:p>
            <text:p>instead of your own for the purpose of determining whether a target is in Range.</text:p>
            <text:p>You may also select targets for other abilities you have as if you were</text:p>
            <text:p>in your Minion's space, but if they have a Range greater than **[1]**,</text:p>
            <text:p>they are treated as if they had a Range of **[1]** instead (this does not</text:p>
            <text:p>apply to basic actions and stances).  </text:p>
            <text:p/>
          </table:table-cell>
          <table:table-cell office:value-type="string" calcext:value-type="string">
            <text:p>Increase the maximum Range of channeled non-Basic abilities by half your REA  </text:p>
            <text:p/>
          </table:table-cell>
          <table:table-cell office:value-type="string" calcext:value-type="string">
            <text:p>When you use a Basic Ability in this way, you may reduce your **Stress Load** by 1  </text:p>
            <text:p/>
          </table:table-cell>
          <table:table-cell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Animism</text:p>
          </table:table-cell>
          <table:table-cell office:value-type="string" calcext:value-type="string">
            <text:p>Soul Bon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r minion would disappear as a result of taking Fatigue or Stress,</text:p>
            <text:p>you may prevent it from disappearing by taking **Stress**</text:p>
            <text:p/>
          </table:table-cell>
          <table:table-cell office:value-type="string" calcext:value-type="string">
            <text:p>If an ally adjacent to your minion would take **Fatigue** or **Stress**,</text:p>
            <text:p>you may reduce the amount they take by 1 by taking **Stress**  </text:p>
            <text:p/>
          </table:table-cell>
          <table:table-cell office:value-type="string" calcext:value-type="string">
            <text:p>When you would take **Fatigue** or **Stress** while you have a minion in play,</text:p>
            <text:p>you may reduce the amount you take by 1 by removing your minion from play</text:p>
            <text:p/>
          </table:table-cell>
          <table:table-cell/>
        </table:table-row>
        <table:table-row table:style-name="ro25">
          <table:table-cell office:value-type="float" office:value="0" calcext:value-type="float">
            <text:p>0</text:p>
          </table:table-cell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character. If the target is an ally they must be willing</text:p>
            <text:p>and the attack automatically Succeeds</text:p>
            <text:p>Effect: Force the target to move up to half their Speed to any other space</text:p>
            <text:p>of your choice within range  </text:p>
            <text:p>Success: Force the target to move up to their full Speed instead  </text:p>
            <text:p>Critical: If the target is an Enemy, deal $**2**^a$ **Stress**Overexert: If the attack Succeeds, the target is **Immobilized** until the end of their turn.</text:p>
            <text:p>You may choose to use **Overexert** after the attack resolves.  </text:p>
            <text:p/>
          </table:table-cell>
          <table:table-cell office:value-type="string" calcext:value-type="string">
            <text:p>Add half your REA to the additional Stress you deal on a Critical  </text:p>
            <text:p/>
          </table:table-cell>
          <table:table-cell office:value-type="string" calcext:value-type="string">
            <text:p>On a Critical, you may use the Overexert effect without taking Stress</text:p>
            <text:p>in lieu of the normal Critical effect  </text:p>
            <text:p/>
          </table:table-cell>
          <table:table-cell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enemy</text:p>
            <text:p>Success: The target is **Disoriented** and gains +**1**$^b$ **Slowed**</text:p>
            <text:p>Overexert: Deal **2**$^a$ **Stress**  </text:p>
            <text:p/>
          </table:table-cell>
          <table:table-cell office:value-type="string" calcext:value-type="string">
            <text:p>Add half your REA to the additional Stress you deal when using Overexert  </text:p>
            <text:p/>
          </table:table-cell>
          <table:table-cell office:value-type="string" calcext:value-type="string">
            <text:p>Add half your FIN to the stacks of Slowed  </text:p>
            <text:p/>
          </table:table-cell>
          <table:table-cell/>
        </table:table-row>
        <table:table-row table:style-name="ro18">
          <table:table-cell office:value-type="float" office:value="2" calcext:value-type="float">
            <text:p>2</text:p>
          </table:table-cell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character in range. If the target is an ally the attack automatically Succeeds.</text:p>
            <text:p>Success: The target makes a **Basic Attack** against a valid target, resolved using your Mesmerism.  </text:p>
            <text:p>Overexert: You may direct the target to use a different action you have access to</text:p>
            <text:p>instead of a **Basic Attack**  </text:p>
            <text:p>Critical: If the target is an enemy, deal **2**$^a$ **Stress**  </text:p>
            <text:p/>
          </table:table-cell>
          <table:table-cell office:value-type="string" calcext:value-type="string">
            <text:p>Add half your REA to the additional Stress you deal on a Critical against the second target  </text:p>
            <text:p/>
          </table:table-cell>
          <table:table-cell office:value-type="string" calcext:value-type="string">
            <text:p>On a Critical against the first target, you may use the Overexert effect</text:p>
            <text:p>without taking Stress. If you do, you do not get this ability's normal</text:p>
            <text:p>Critical benefit against the second target  </text:p>
            <text:p/>
          </table:table-cell>
          <table:table-cell/>
        </table:table-row>
        <table:table-row table:style-name="ro23">
          <table:table-cell office:value-type="float" office:value="3" calcext:value-type="float">
            <text:p>3</text:p>
          </table:table-cell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**1**$^b$</text:p>
            <text:p>Trigger: You or an ally in Range are targeted by an enemy attack</text:p>
            <text:p>Effect: If there is another character in Range that isn't the attacker, you may</text:p>
            <text:p>swap places with them, causing the attack to target them instead of you</text:p>
            <text:p>or vice versa. This might cause an ability that can normally only target</text:p>
            <text:p>an enemy of the attacker to target their ally instead. If the new target</text:p>
            <text:p>is an enemy, make a Mental Attack against them. If they Succeed this effect</text:p>
            <text:p>fails but you may contest the triggering attack normally. After this effect</text:p>
            <text:p>triggers, end this stance unless you take **Stress** to maintain it.  </text:p>
            <text:p/>
          </table:table-cell>
          <table:table-cell office:value-type="string" calcext:value-type="string">
            <text:p>You may use the Effect even without an adjacent character, moving</text:p>
            <text:p>1 space before the attack resolves. If this results in you being</text:p>
            <text:p>out of range, the attack automatically Misses (you still take any</text:p>
            <text:p>effects that don't require a Success)  </text:p>
            <text:p/>
          </table:table-cell>
          <table:table-cell office:value-type="string" calcext:value-type="string">
            <text:p>Increase the Range to 2  </text:p>
            <text:p/>
          </table:table-cell>
          <table:table-cell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If you would take **Fatigue**, you may choose to reduce the Fatigue</text:p>
            <text:p>you take by up to **[1]** and take the same amount of **Stress** instead.</text:p>
            <text:p>If you do, end this stance unless you take an additional **[1] Stress**</text:p>
            <text:p>for each previous time you have used this effect since your last turn  </text:p>
            <text:p/>
          </table:table-cell>
          <table:table-cell office:value-type="string" calcext:value-type="string">
            <text:p>Increase the maximum amount of Fatigue you can convert to Stress by half your FOC  </text:p>
            <text:p/>
          </table:table-cell>
          <table:table-cell office:value-type="string" calcext:value-type="string">
            <text:p>Reduce the total amount of additional Stress required each time you</text:p>
            <text:p>maintain this stance by 1  </text:p>
            <text:p/>
          </table:table-cell>
          <table:table-cell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**Maximum Stress Tolerance** by **1**$^a$ and gain</text:p>
            <text:p>a bonus on **Panic Rolls** of the same amount</text:p>
            <text:p/>
          </table:table-cell>
          <table:table-cell office:value-type="string" calcext:value-type="string">
            <text:p>Add an additional 1 to both  </text:p>
            <text:p/>
          </table:table-cell>
          <table:table-cell office:value-type="string" calcext:value-type="string">
            <text:p>Apply the bonus to your **Resolve** rolls as well  </text:p>
            <text:p/>
          </table:table-cell>
          <table:table-cell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successfully defend against an enemy attack, become **Hidden**.</text:p>
            <text:p/>
          </table:table-cell>
          <table:table-cell office:value-type="string" calcext:value-type="string">
            <text:p>In addition, gain **+1 Boon** on your next attack  </text:p>
            <text:p/>
          </table:table-cell>
          <table:table-cell office:value-type="string" calcext:value-type="string">
            <text:p>After applying this effect the next attack against you before the start</text:p>
            <text:p>of your turn has **+1 Bane**, and Hidden does not end before the start</text:p>
            <text:p>of your turn unless you are Successfully attacked by an adjacent enemy</text:p>
            <text:p/>
          </table:table-cell>
          <table:table-cell/>
        </table:table-row>
        <table:table-row table:style-name="ro18">
          <table:table-cell office:value-type="float" office:value="0" calcext:value-type="float">
            <text:p>0</text:p>
          </table:table-cell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4</text:p>
            <text:p>Target: Area **2**$^a$</text:p>
            <text:p>Success: Characters in the area take **1 Fatigue**  </text:p>
            <text:p>Critical: Deal **1** additional Fatigue and the target gains +**1**$^b$ **Burning**  </text:p>
            <text:p>Overexert: Choose one: Increase the Area by 2, treat normal Successes as Criticals,</text:p>
            <text:p>or double the Critical effect  </text:p>
            <text:p/>
          </table:table-cell>
          <table:table-cell office:value-type="string" calcext:value-type="string">
            <text:p>Increase the area by half your REA  </text:p>
            <text:p/>
          </table:table-cell>
          <table:table-cell office:value-type="string" calcext:value-type="string">
            <text:p>Add +1 Burning on a Success effect, and increase the stacks on a Critical</text:p>
            <text:p>by half your POW  </text:p>
            <text:p/>
          </table:table-cell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4</text:p>
            <text:p>Target: Area **2**$^a$</text:p>
            <text:p>Effect: The area is **Difficult Terrain**.</text:p>
            <text:p>Overexert: Whenever a character starts their turn in the area or enters it</text:p>
            <text:p>for the first time on a turn, make a Physical Attack against them,</text:p>
            <text:p>dealing **Fatigue** on a success. At the start of your turn</text:p>
            <text:p>you may maintain this effect by paying the **Overexert** cost again.  </text:p>
            <text:p/>
          </table:table-cell>
          <table:table-cell office:value-type="string" calcext:value-type="string">
            <text:p>Increase the area by half your REA  </text:p>
            <text:p/>
          </table:table-cell>
          <table:table-cell office:value-type="string" calcext:value-type="string">
            <text:p>You don't need to pay the Overexert cost to maintain the Overexert effect</text:p>
            <text:p>provided your Stress Load does not exceed your Stress Tolerance  </text:p>
            <text:p/>
          </table:table-cell>
          <table:table-cell/>
        </table:table-row>
        <table:table-row table:style-name="ro25">
          <table:table-cell office:value-type="float" office:value="2" calcext:value-type="float">
            <text:p>2</text:p>
          </table:table-cell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Self</text:p>
            <text:p>Target: One adjacent enemy</text:p>
            <text:p>Success: Deal **2**$^a$ **Stress**</text:p>
            <text:p>Effect: The target gains +**1**$^b$ Shocked</text:p>
            <text:p>Overexert: The target becomes **Aura** **1**$^c$ and on a Success you may repeat</text:p>
            <text:p>this action immediately, except the targets are resolved as if you were</text:p>
            <text:p>the previous target, and you cannot target a character that has been</text:p>
            <text:p>targeted by this ability this turn.</text:p>
            <text:p/>
          </table:table-cell>
          <table:table-cell office:value-type="string" calcext:value-type="string">
            <text:p>Increase the Stress you deal on a Success by half your REA  </text:p>
            <text:p/>
          </table:table-cell>
          <table:table-cell office:value-type="string" calcext:value-type="string">
            <text:p>Increase the Shocked stacks by half your FIN  </text:p>
            <text:p/>
          </table:table-cell>
          <table:table-cell office:value-type="string" calcext:value-type="string">
            <text:p>Increase the Overexert Aura size by 1  </text:p>
            <text:p/>
          </table:table-cell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are targeted by a Physical Attack</text:p>
            <text:p>Effect: Add your Elementalism Training to your Resilience roll.</text:p>
            <text:p>If you roll a Critical success, you may remain in this stance.</text:p>
            <text:p>Otherwise, end this stance unless you take **Stress** to stay in it.  </text:p>
            <text:p/>
          </table:table-cell>
          <table:table-cell office:value-type="string" calcext:value-type="string">
            <text:p>Add half your POW to the bonus  </text:p>
            <text:p/>
          </table:table-cell>
          <table:table-cell office:value-type="string" calcext:value-type="string">
            <text:p>Reduce the threshold for a Critical Success by your FOC  </text:p>
            <text:p/>
          </table:table-cell>
          <table:table-cell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are targeted by an Attack</text:p>
            <text:p>Effect: Add your Elementalism Training to your Evasion roll. If you roll a</text:p>
            <text:p>Critical Success, you may remain in this stance. Otherwise, end this stance</text:p>
            <text:p>unless you take **Stress** to stay in it.  </text:p>
            <text:p/>
          </table:table-cell>
          <table:table-cell office:value-type="string" calcext:value-type="string">
            <text:p>Add half your FIN to the bonus  </text:p>
            <text:p/>
          </table:table-cell>
          <table:table-cell office:value-type="string" calcext:value-type="string">
            <text:p>Reduce the threshold for a Critical Success by your FOC  </text:p>
            <text:p/>
          </table:table-cell>
          <table:table-cell/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Range: **2**$^a$</text:p>
            <text:p>Effect: Whenever a character in Range loses the **Burning** condition</text:p>
            <text:p>without using the **Recover** action, you may apply +**1**$^b$ **Burning**</text:p>
            <text:p>to another character within half this ability's Range (rounded up) of them.  </text:p>
            <text:p/>
          </table:table-cell>
          <table:table-cell office:value-type="string" calcext:value-type="string">
            <text:p>Add half your REA to the Range  </text:p>
            <text:p/>
          </table:table-cell>
          <table:table-cell office:value-type="string" calcext:value-type="string">
            <text:p>Increase the stacks of Burning on the new target by half your FIN  </text:p>
            <text:p/>
          </table:table-cell>
          <table:table-cell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an enemy enters any space in a Terrain Effect you created</text:p>
            <text:p>for the first time on a turn, you may make a Mental Attack against them.</text:p>
            <text:p>On a Success they gain +**1**$^a$ **Slowed**  </text:p>
            <text:p/>
          </table:table-cell>
          <table:table-cell office:value-type="string" calcext:value-type="string">
            <text:p>Add half your FIN to the stacks of Slowed  </text:p>
            <text:p/>
          </table:table-cell>
          <table:table-cell office:value-type="string" calcext:value-type="string">
            <text:p>On a Critical, deal **Fatigue** equal to half your POW  </text:p>
            <text:p/>
          </table:table-cell>
          <table:table-cell/>
        </table:table-row>
      </table:table>
      <table:named-expressions/>
      <table:database-ranges>
        <table:database-range table:name="AttributeModifiers" table:target-range-address="Build.C6:Build.C11" table:on-update-keep-styles="true" table:on-update-keep-size="false"/>
        <table:database-range table:name="__Anonymous_Sheet_DB__0" table:target-range-address="Build.I37:Build.K4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+</number:text>
      <number:number number:decimal-places="0" number:min-decimal-places="0" number:min-integer-digits="1"/>
    </number:number-style>
    <number:number-style style:name="N135P1" style:volatile="true">
      <number:text>-</number:text>
      <number:number number:decimal-places="0" number:min-decimal-places="0" number:min-integer-digits="1"/>
    </number:number-style>
    <number:number-style style:name="N135">
      <number:text>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text/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  <style:text-properties fo:font-size="2p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style:style style:name="Untitled1" style:family="table-cell" style:parent-style-name="Default"/>
    <style:style style:name="Ghost_20_Text" style:display-name="Ghost Text" style:family="table-cell" style:parent-style-name="Default">
      <style:text-properties fo:color="#333333" fo:font-size="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5:17:29.999410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9-16T14:47:37.579158979</dc:date>
    <meta:editing-duration>P5DT8H11M57S</meta:editing-duration>
    <meta:editing-cycles>111</meta:editing-cycles>
    <meta:generator>LibreOffice/25.2.5.2$Linux_X86_64 LibreOffice_project/520$Build-2</meta:generator>
    <meta:document-statistic meta:table-count="7" meta:cell-count="1973" meta:object-count="0"/>
  </office:meta>
</office:document-meta>
</file>